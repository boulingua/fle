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rrespondance avec Montré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rrespondance avec Montré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 · Parcours G+M · classe 8 · Niveau M</text:span></text:p>
            <text:p text:style-name="P3"><text:span text:style-name="T2">Écrire à un·e correspondant·e : le courriel amical (présent + passé composé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riel personnel de Montréal</text:span></text:p>
              </text:list-item>
              <text:list-item>
                <text:p text:style-name="P6"><text:span text:style-name="T2">Distinguer présent et passé composé dans un texte</text:span></text:p>
              </text:list-item>
              <text:list-item>
                <text:p text:style-name="P6"><text:span text:style-name="T2">Écrire un courriel amical d’environ 80 mots</text:span></text:p>
              </text:list-item>
              <text:list-item>
                <text:p text:style-name="P6"><text:span text:style-name="T2">Reconnaître quelques mots du français du Québec</text:span></text:p>
              </text:list-item>
              <text:list-item>
                <text:p text:style-name="P6"><text:span text:style-name="T2">Poser une question à mon correspondant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(classe 8, Bade-Wurtemberg) reçoit son premier courriel de Montréal.</text:span></text:p>
            <text:list text:style-name="L3">
              <text:list-item>
                <text:p text:style-name="P3"><text:span text:style-name="T2">« Elle dit que son école est </text:span><text:span text:style-name="T3">écœurante</text:span><text:span text:style-name="T2"> ! »</text:span></text:p>
              </text:list-item>
              <text:list-item>
                <text:p text:style-name="P3"><text:span text:style-name="T2">Au Québec, </text:span><text:span text:style-name="T3">écœurant</text:span><text:span text:style-name="T2"> = </text:span><text:span text:style-name="T4">génial</text:span><text:span text:style-name="T2">, super !</text:span></text:p>
              </text:list-item>
            </text:list>
            <text:p text:style-name="P3"><text:span text:style-name="T2">À votre avis : de quoi Inès va-t-elle parle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savez-vous du Québec ? (ville, langue, saisons, sport)</text:span></text:p>
              </text:list-item>
              <text:list-item>
                <text:p text:style-name="P6"><text:span text:style-name="T2">Trois mots attendus dans un courriel d’élève</text:span></text:p>
              </text:list-item>
              <text:list-item>
                <text:p text:style-name="P6"><text:span text:style-name="T2">Une question pour une jeune Montréalaise</text:span></text:p>
              </text:list-item>
              <text:list-item>
                <text:p text:style-name="P6"><text:span text:style-name="T2">Comment forme-t-on le passé composé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courriel = un e-mail</text:span></text:p>
              </text:list-item>
              <text:list-item>
                <text:p text:style-name="P6"><text:span text:style-name="T2">la 2e secondaire ≈ la classe 8</text:span></text:p>
              </text:list-item>
              <text:list-item>
                <text:p text:style-name="P6"><text:span text:style-name="T2">la fin de semaine = le week-end</text:span></text:p>
              </text:list-item>
              <text:list-item>
                <text:p text:style-name="P6"><text:span text:style-name="T2">écœurant·e (Québec) = génial·e</text:span></text:p>
              </text:list-item>
              <text:list-item>
                <text:p text:style-name="P6"><text:span text:style-name="T2">magasiner (Québec) = faire les cour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: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: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xiliaire au présent (</text:span><text:span text:style-name="T3">avoir</text:span><text:span text:style-name="T2"> / </text:span><text:span text:style-name="T3">être</text:span><text:span text:style-name="T2">) + participe passé</text:span></text:p>
            <text:list text:style-name="L3">
              <text:list-item>
                <text:p text:style-name="P3"><text:span text:style-name="T3">avoir</text:span><text:span text:style-name="T2"> : j’ai écrit, elle a joué</text:span></text:p>
              </text:list-item>
              <text:list-item>
                <text:p text:style-name="P3"><text:span text:style-name="T3">être</text:span><text:span text:style-name="T2"> (aller, monter, rentrer, rester… + pronominaux) : je suis allé·e, elle est montée</text:span></text:p>
              </text:list-item>
              <text:list-item>
                <text:p text:style-name="P3"><text:span text:style-name="T2">Avec </text:span><text:span text:style-name="T3">être</text:span><text:span text:style-name="T2"> : accord avec le sujet</text:span></text:p>
              </text:list-item>
              <text:list-item>
                <text:p text:style-name="P3"><text:span text:style-name="T2">Présent = habituel · Passé composé = déjà arriv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ourriel d’Inè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courriel d’Inè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e suis en 2e secondaire à Montréal…</text:span></text:p>
            <text:p text:style-name="P3"><text:span text:style-name="T2">En semaine : maths, théâtre d’impro, métro (ligne orange), devoirs.</text:span></text:p>
            <text:p text:style-name="P3"><text:span text:style-name="T2">La fin de semaine dernière : je </text:span><text:span text:style-name="T4">suis montée</text:span><text:span text:style-name="T2"> au mont Royal, nous </text:span><text:span text:style-name="T4">avons marché</text:span><text:span text:style-name="T2"> jusqu’au belvédère, on </text:span><text:span text:style-name="T4">a magasiné</text:span><text:span text:style-name="T2"> au centre-ville.</text:span></text:p>
            <text:p text:style-name="P3"><text:span text:style-name="T2">« Qu’est-ce que tu as fait le week-end dernier ?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: le mont Roy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: le mont Roy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olline qui a donné son nom à Montréal</text:span></text:p>
              </text:list-item>
              <text:list-item>
                <text:p text:style-name="P6"><text:span text:style-name="T2">Sommet principal : environ 233 m, trois sommets</text:span></text:p>
              </text:list-item>
              <text:list-item>
                <text:p text:style-name="P6"><text:span text:style-name="T2">Parc dessiné par F. L. Olmsted (Central Park, New York)</text:span></text:p>
              </text:list-item>
              <text:list-item>
                <text:p text:style-name="P6"><text:span text:style-name="T2">Site protégé depuis 2005 · belvédère avec vue panoramique</text:span></text:p>
              </text:list-item>
              <text:list-item>
                <text:p text:style-name="P6"><text:span text:style-name="T2">Métro : ligne orange ouverte en 1966, la plus longue du réseau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Vrai ou faux ? (compréhension)</text:span></text:p>
              </text:list-item>
              <text:list-item>
                <text:p text:style-name="P6"><text:span text:style-name="T2">Ex. 2 — Français du Québec → français de France</text:span></text:p>
              </text:list-item>
              <text:list-item>
                <text:p text:style-name="P6"><text:span text:style-name="T2">Ex. 3 — Passé composé : </text:span><text:span text:style-name="T3">avoir</text:span><text:span text:style-name="T2"> ou </text:span><text:span text:style-name="T3">être</text:span><text:span text:style-name="T2"> ?</text:span></text:p>
              </text:list-item>
              <text:list-item>
                <text:p text:style-name="P6"><text:span text:style-name="T2">Ex. 4 — Présent ou passé composé ?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u es Léa — réponds à Inès (environ 80 mots)</text:span></text:p>
            <text:list text:style-name="L3">
              <text:list-item>
                <text:p text:style-name="P3"><text:span text:style-name="T2">Appel + présentation (nom, âge, ville)</text:span></text:p>
              </text:list-item>
              <text:list-item>
                <text:p text:style-name="P3"><text:span text:style-name="T2">Deux activités de la semaine (présent)</text:span></text:p>
              </text:list-item>
              <text:list-item>
                <text:p text:style-name="P3"><text:span text:style-name="T2">Une chose faite le week-end dernier (passé composé)</text:span></text:p>
              </text:list-item>
              <text:list-item>
                <text:p text:style-name="P3"><text:span text:style-name="T2">Une question pour Inès</text:span></text:p>
              </text:list-item>
              <text:list-item>
                <text:p text:style-name="P3"><text:span text:style-name="T2">Formule de f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un courriel personnel</text:span></text:p>
              </text:list-item>
              <text:list-item>
                <text:p text:style-name="P6"><text:span text:style-name="T2">☐ </text:span><text:span text:style-name="T2">Je reconnais présent et passé composé</text:span></text:p>
              </text:list-item>
              <text:list-item>
                <text:p text:style-name="P6"><text:span text:style-name="T2">☐ </text:span><text:span text:style-name="T2">Je choisis entre </text:span><text:span text:style-name="T3">avoir</text:span><text:span text:style-name="T2"> et </text:span><text:span text:style-name="T3">être</text:span></text:p>
              </text:list-item>
              <text:list-item>
                <text:p text:style-name="P6"><text:span text:style-name="T2">☐ </text:span><text:span text:style-name="T2">J’écris un courriel amical avec une question</text:span></text:p>
              </text:list-item>
              <text:list-item>
                <text:p text:style-name="P6"><text:span text:style-name="T2">☐ </text:span><text:span text:style-name="T2">Je connais des mots québéco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45 min · 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45 min · 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ts)</text:span></text:p>
              </text:list-item>
              <text:list-item>
                <text:p text:style-name="P6"><text:span text:style-name="T2">Tâche 2 — Repérage grammatical (5 pts)</text:span></text:p>
              </text:list-item>
              <text:list-item>
                <text:p text:style-name="P6"><text:span text:style-name="T2">Tâche 3 — Expression écrite : courriel à Inès (15 pts)</text:span></text:p>
              </text:list-item>
            </text:list>
            <text:p text:style-name="P3"><text:span text:style-name="T2">Notenschlüssel : 1 ≥ 27 · 2 ≥ 23 · 3 ≥ 18 · 4 ≥ 14 · 5 ≥ 8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ont Royal — Wikipédia (CC BY-SA 4.0)</text:span></text:p>
              </text:list-item>
              <text:list-item>
                <text:p text:style-name="P6"><text:span text:style-name="T2">Ligne orange du métro de Montréal — Wikipédia (CC BY-SA 4.0)</text:span></text:p>
              </text:list-item>
              <text:list-item>
                <text:p text:style-name="P6"><text:span text:style-name="T2">Mount Royal — Wikipedia (CC BY-SA 4.0)</text:span></text:p>
              </text:list-item>
            </text:list>
            <text:p text:style-name="P3"><text:span text:style-name="T2">Plateforme éducative indépendante, sans affiliation. Textes français originaux ; faits paraphrasés de sources libr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35</meta:creation-date>
    <dc:date>2026-07-21T15:33:35</dc:date>
    <meta:document-statistic meta:object-count="185"/>
    <meta:generator>LibreOffice/24.2.7.2$Linux_X86_64 LibreOffice_project/420$Build-2</meta:generator>
  </office:meta>
</office:document-meta>
</file>