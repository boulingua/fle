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1.058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Écrire sur soi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crire sur soi</text:span></text:p>
          </draw:text-box>
        </draw:frame>
        <draw:frame draw:name="Content Placeholder 2" presentation:style-name="pr2" draw:text-style-name="P5" draw:layer="layout" svg:width="22.859cm" svg:height="9.428cm" svg:x="1.27cm" svg:y="3.334cm" presentation:class="outline" presentation:user-transformed="true">
          <draw:text-box>
            <text:p text:style-name="P3"><text:span text:style-name="T2">Annie Ernaux et l’« écriture de soi »</text:span></text:p>
            <text:p text:style-name="P4"><text:span text:style-name="T3">Parcours E · Classe 11 · Niveau E Modèle : 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5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7"><text:span text:style-name="T3">Lire un court récit de soi et en dégager le sens (CE)</text:span></text:p>
              </text:list-item>
              <text:list-item>
                <text:p text:style-name="P7"><text:span text:style-name="T3">Distinguer autobiographie / autofiction / récit transpersonnel</text:span></text:p>
              </text:list-item>
              <text:list-item>
                <text:p text:style-name="P7"><text:span text:style-name="T3">Employer l’imparfait pour évoquer un souvenir</text:span></text:p>
              </text:list-item>
              <text:list-item>
                <text:p text:style-name="P7"><text:span text:style-name="T3">Rédiger une page d’écriture de soi (200–250 mots)</text:span></text:p>
              </text:list-item>
              <text:list-item>
                <text:p text:style-name="P7"><text:span text:style-name="T3">Présenter une autrice contemporaine sans la recopier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5" draw:layer="layout" svg:width="22.859cm" svg:height="9.428cm" svg:x="1.27cm" svg:y="3.334cm" presentation:class="outline" presentation:user-transformed="true">
          <draw:text-box>
            <text:p text:style-name="P4"><text:span text:style-name="T3">Au tableau : </text:span><text:span text:style-name="T2">souvenir · image · vérité</text:span><text:span text:style-name="T3"> « Écrivez : </text:span><text:span text:style-name="T4">Je me souviens d’une cuisine…</text:span><text:span text:style-name="T3"> et continuez 3 minutes. » — C’est un devoir ou un journal intime ? — Les deux. Aujourd’hui, on apprend à </text:span><text:span text:style-name="T2">écrire sur soi</text:span><text:span text:style-name="T3">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5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7"><text:span text:style-name="T3">Journal intime ou autobiographie : quelle différence ?</text:span></text:p>
              </text:list-item>
              <text:list-item>
                <text:p text:style-name="P7"><text:span text:style-name="T3">Pourquoi écrire sa propre vie ?</text:span></text:p>
              </text:list-item>
              <text:list-item>
                <text:p text:style-name="P7"><text:span text:style-name="T3">Un souvenir personnel peut-il parler d’une </text:span><text:span text:style-name="T2">époque</text:span><text:span text:style-name="T3">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2" presentation:style-name="pr2" draw:text-style-name="P5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7"><text:span text:style-name="T3">un souvenir · se souvenir de · évoquer</text:span></text:p>
              </text:list-item>
              <text:list-item>
                <text:p text:style-name="P7"><text:span text:style-name="T3">l’écriture de soi · l’autobiographie · l’autofiction</text:span></text:p>
              </text:list-item>
              <text:list-item>
                <text:p text:style-name="P7"><text:span text:style-name="T3">le récit · la mémoire · une image</text:span></text:p>
              </text:list-item>
              <text:list-item>
                <text:p text:style-name="P7"><text:span text:style-name="T3">l’incipit · une génération · le pacte de vérité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 de langue — l’imparfait du souven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oint de langue — l’imparfait du souvenir</text:span></text:p>
          </draw:text-box>
        </draw:frame>
        <draw:frame draw:name="Content Placeholder 2" presentation:style-name="pr2" draw:text-style-name="P5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7"><text:span text:style-name="T3">Scène </text:span><text:span text:style-name="T2">habituelle</text:span><text:span text:style-name="T3"> : </text:span><text:span text:style-name="T4">le dimanche, on écoutait la radio</text:span></text:p>
              </text:list-item>
              <text:list-item>
                <text:p text:style-name="P7"><text:span text:style-name="T2">Décor / atmosphère</text:span><text:span text:style-name="T3"> : </text:span><text:span text:style-name="T4">la cuisine sentait le café</text:span></text:p>
              </text:list-item>
              <text:list-item>
                <text:p text:style-name="P7"><text:span text:style-name="T2">État / émotion</text:span><text:span text:style-name="T3"> : </text:span><text:span text:style-name="T4">je croyais que…</text:span></text:p>
              </text:list-item>
              <text:list-item>
                <text:p text:style-name="P7"><text:span text:style-name="T3">Formation : radical de </text:span><text:span text:style-name="T4">nous</text:span><text:span text:style-name="T3"> + -ais, -ais, -ait, -ions, -iez, -aient</text:span></text:p>
              </text:list-item>
              <text:list-item>
                <text:p text:style-name="P7"><text:span text:style-name="T3">≠ </text:span><text:span text:style-name="T3">passé composé (fait ponctuel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xte — « La cuisine du dimanche »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Texte — « La cuisine du dimanche »</text:span></text:p>
          </draw:text-box>
        </draw:frame>
        <draw:frame draw:name="Content Placeholder 2" presentation:style-name="pr2" draw:text-style-name="P5" draw:layer="layout" svg:width="22.859cm" svg:height="9.428cm" svg:x="1.27cm" svg:y="3.334cm" presentation:class="outline" presentation:user-transformed="true">
          <draw:text-box>
            <text:p text:style-name="P4"><text:span text:style-name="T3">La cuisine sentait le café réchauffé et le linge humide. Ma grand-mère se tenait devant la fenêtre, les mains dans la farine. Le dimanche, la radio grésillait dans la pièce d’à côté. Je croyais que ces matins-là ne finiraient jamais. </text:span><text:span text:style-name="T4">(Texte original — à la manière de.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nie Ernaux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Annie Ernaux</text:span></text:p>
          </draw:text-box>
        </draw:frame>
        <draw:frame draw:name="Content Placeholder 2" presentation:style-name="pr2" draw:text-style-name="P5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7"><text:span text:style-name="T3">Née en 1940, en Normandie</text:span></text:p>
              </text:list-item>
              <text:list-item>
                <text:p text:style-name="P7"><text:span text:style-name="T2">Prix Nobel de littérature 2022</text:span></text:p>
              </text:list-item>
              <text:list-item>
                <text:p text:style-name="P7"><text:span text:style-name="T3">Part de sa </text:span><text:span text:style-name="T2">propre vie</text:span><text:span text:style-name="T3"> (milieu populaire, études)</text:span></text:p>
              </text:list-item>
              <text:list-item>
                <text:p text:style-name="P7"><text:span text:style-name="T3">Écriture « </text:span><text:span text:style-name="T2">transpersonnelle</text:span><text:span text:style-name="T3"> » : le « je » dit aussi le « nous »</text:span></text:p>
              </text:list-item>
              <text:list-item>
                <text:p text:style-name="P7"><text:span text:style-name="T3">⚠️ </text:span><text:span text:style-name="T3">Autrice protégée : on la </text:span><text:span text:style-name="T2">cite</text:span><text:span text:style-name="T3">, on ne la </text:span><text:span text:style-name="T2">recopie pa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5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7"><text:span text:style-name="T3">Ex. 1 — Compréhension du texte</text:span></text:p>
              </text:list-item>
              <text:list-item>
                <text:p text:style-name="P7"><text:span text:style-name="T3">Ex. 2 — L’imparfait (conjugaison)</text:span></text:p>
              </text:list-item>
              <text:list-item>
                <text:p text:style-name="P7"><text:span text:style-name="T3">Ex. 3 — Vocabulaire (associer)</text:span></text:p>
              </text:list-item>
              <text:list-item>
                <text:p text:style-name="P7"><text:span text:style-name="T3">Ex. 4 — Reconnaître le genre Différenciation G / M / 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5" draw:layer="layout" svg:width="22.859cm" svg:height="9.428cm" svg:x="1.27cm" svg:y="3.334cm" presentation:class="outline" presentation:user-transformed="true">
          <draw:text-box>
            <text:p text:style-name="P4"><text:span text:style-name="T2">Page d’écriture de soi (200–250 mots)</text:span><text:span text:style-name="T3"> - un incipit frappant - l’imparfait (décor, habitudes, émotions) - une image collective - une chute : ce que le souvenir signifie aujourd’hui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5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7"><text:span text:style-name="T3">Je lis et je comprends un récit de soi</text:span></text:p>
              </text:list-item>
              <text:list-item>
                <text:p text:style-name="P7"><text:span text:style-name="T3">Je distingue les trois genres</text:span></text:p>
              </text:list-item>
              <text:list-item>
                <text:p text:style-name="P7"><text:span text:style-name="T3">J’emploie l’imparfait du souvenir</text:span></text:p>
              </text:list-item>
              <text:list-item>
                <text:p text:style-name="P7"><text:span text:style-name="T3">J’ai écrit ma page de 200–250 mots</text:span></text:p>
              </text:list-item>
              <text:list-item>
                <text:p text:style-name="P7"><text:span text:style-name="T3">Je présente Ernaux sans la recopier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 (30 P.)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 (30 P.)</text:span></text:p>
          </draw:text-box>
        </draw:frame>
        <draw:frame draw:name="Content Placeholder 2" presentation:style-name="pr2" draw:text-style-name="P5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7"><text:span text:style-name="T3">Tâche 1 — Compréhension écrite (12 P.)</text:span></text:p>
              </text:list-item>
              <text:list-item>
                <text:p text:style-name="P7"><text:span text:style-name="T3">Tâche 2 — Expression écrite : page d’écriture de soi (18 P.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5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7"><text:span text:style-name="T4">Annie Ernaux</text:span><text:span text:style-name="T3"> — Wikipédia (fr), CC BY-SA 4.0</text:span></text:p>
              </text:list-item>
              <text:list-item>
                <text:p text:style-name="P7"><text:span text:style-name="T4">Imparfait</text:span><text:span text:style-name="T3"> — Wikipédia (fr), CC BY-SA 4.0</text:span></text:p>
              </text:list-item>
              <text:list-item>
                <text:p text:style-name="P7"><text:span text:style-name="T4">Nobel Prize in Literature 2022</text:span><text:span text:style-name="T3"> — nobelprize.org</text:span></text:p>
              </text:list-item>
              <text:list-item>
                <text:p text:style-name="P7"><text:span text:style-name="T3">Textes originaux rédigés pour l’unité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6:29:21</meta:creation-date>
    <dc:date>2026-07-21T16:29:21</dc:date>
    <meta:document-statistic meta:object-count="185"/>
    <meta:generator>LibreOffice/24.2.7.2$Linux_X86_64 LibreOffice_project/420$Build-2</meta:generator>
  </office:meta>
</office:document-meta>
</file>