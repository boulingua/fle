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Introduire Camus — l’incipit et l’absurd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Introduire Camus — l’incipit et l’absurd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2 · Niveau E Compréhension écrite + Expression écri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ertissement « droits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vertissement « droits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L’Étranger</text:span><text:span text:style-name="T2"> (Camus, † 1960) n’est pas dans le domaine public</text:span></text:p>
              </text:list-item>
              <text:list-item>
                <text:p text:style-name="P6"><text:span text:style-name="T2">Aucun extrait du roman n’est reproduit</text:span></text:p>
              </text:list-item>
              <text:list-item>
                <text:p text:style-name="P6"><text:span text:style-name="T2">On s’entraîne sur des incipits </text:span><text:span text:style-name="T4">originaux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ituer Camus et expliquer l’absurde</text:span></text:p>
              </text:list-item>
              <text:list-item>
                <text:p text:style-name="P6"><text:span text:style-name="T2">Définir un incipit et ses fonctions</text:span></text:p>
              </text:list-item>
              <text:list-item>
                <text:p text:style-name="P6"><text:span text:style-name="T2">Repérer point de vue, temps, ton</text:span></text:p>
              </text:list-item>
              <text:list-item>
                <text:p text:style-name="P6"><text:span text:style-name="T2">Rédiger une étude d’incipit (~300 mots)</text:span></text:p>
              </text:list-item>
              <text:list-item>
                <text:p text:style-name="P6"><text:span text:style-name="T2">Relire avec une grille de critèr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Aujourd’hui, on ne lit qu’une chose : la première page. » - L’incipit décide du narrateur, du ton, de la question posée - Un incipit peut cacher autant qu’il montr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 savez-vous d’Albert Camus ?</text:span></text:p>
              </text:list-item>
              <text:list-item>
                <text:p text:style-name="P6"><text:span text:style-name="T2">« Absurde » : que signifie ce mot pour vous ?</text:span></text:p>
              </text:list-item>
              <text:list-item>
                <text:p text:style-name="P6"><text:span text:style-name="T2">Quelle phrase vous donne envie de continuer un roman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 cl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 cl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incipit — der Romananfang</text:span></text:p>
              </text:list-item>
              <text:list-item>
                <text:p text:style-name="P6"><text:span text:style-name="T2">le narrateur — der Erzähler</text:span></text:p>
              </text:list-item>
              <text:list-item>
                <text:p text:style-name="P6"><text:span text:style-name="T2">le point de vue — die Erzählperspektive</text:span></text:p>
              </text:list-item>
              <text:list-item>
                <text:p text:style-name="P6"><text:span text:style-name="T2">in medias res — mitten in die Handlung</text:span></text:p>
              </text:list-item>
              <text:list-item>
                <text:p text:style-name="P6"><text:span text:style-name="T2">la distance affective — die emotionale Distanz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temps du réci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temps du réci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Passé composé</text:span><text:span text:style-name="T2"> → premier plan : </text:span><text:span text:style-name="T3">Le train est arrivé.</text:span></text:p>
              </text:list-item>
              <text:list-item>
                <text:p text:style-name="P6"><text:span text:style-name="T4">Imparfait</text:span><text:span text:style-name="T2"> → arrière-plan / décor : </text:span><text:span text:style-name="T3">Il pleuvait.</text:span></text:p>
              </text:list-item>
              <text:list-item>
                <text:p text:style-name="P6"><text:span text:style-name="T2">Phrases courtes au PC = effet sec et rapid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d’appui (original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d’appui (original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Le train est arrivé à sept heures. Il pleuvait, ou peut-être non ; je ne regardais pas la fenêtre. La lettre disait : “Poste vacant. Présentez-vous lundi.” … Personne n’est venu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mus et l’absurde (reformulé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amus et l’absurde (reformulé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1913 Mondovi (Algérie) – 1960 (accident)</text:span></text:p>
              </text:list-item>
              <text:list-item>
                <text:p text:style-name="P6"><text:span text:style-name="T2">Prix Nobel de littérature </text:span><text:span text:style-name="T4">1957</text:span></text:p>
              </text:list-item>
              <text:list-item>
                <text:p text:style-name="P6"><text:span text:style-name="T3">L’Étranger</text:span><text:span text:style-name="T2"> (1942), « cycle de l’absurde »</text:span></text:p>
              </text:list-item>
              <text:list-item>
                <text:p text:style-name="P6"><text:span text:style-name="T2">Absurde = décalage entre besoin de sens et monde silencieux</text:span></text:p>
              </text:list-item>
              <text:list-item>
                <text:p text:style-name="P6"><text:span text:style-name="T2">Source :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Compréhension (personne, document, in medias res)</text:span></text:p>
              </text:list-item>
              <text:list-item>
                <text:p text:style-name="P6"><text:span text:style-name="T2">Ex. 2 Passé composé vs imparfait — effet</text:span></text:p>
              </text:list-item>
              <text:list-item>
                <text:p text:style-name="P6"><text:span text:style-name="T2">Ex. 3 Deux indices de distance affective</text:span></text:p>
              </text:list-item>
              <text:list-item>
                <text:p text:style-name="P6"><text:span text:style-name="T2">Ex. 4 Reformuler l’effet de l’incipi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Étude d’incipit ~300 mots, 3 paragraphes : 1. Situation 2. Procédés (point de vue, temps, phrases, ton) 3. Effet / interprétat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définis l’incipit et l’absurde</text:span></text:p>
              </text:list-item>
              <text:list-item>
                <text:p text:style-name="P6"><text:span text:style-name="T2">Je repère point de vue, temps, ton</text:span></text:p>
              </text:list-item>
              <text:list-item>
                <text:p text:style-name="P6"><text:span text:style-name="T2">Je distingue PC et imparfait</text:span></text:p>
              </text:list-item>
              <text:list-item>
                <text:p text:style-name="P6"><text:span text:style-name="T2">J’ai écrit une étude structuré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— 30 poi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— 30 poi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Compréhension écrite — 12 pts</text:span></text:p>
              </text:list-item>
              <text:list-item>
                <text:p text:style-name="P6"><text:span text:style-name="T2">Tâche 2 Expression écrite (~300 mots) — 18 pts</text:span></text:p>
              </text:list-item>
              <text:list-item>
                <text:p text:style-name="P6"><text:span text:style-name="T2">Sur un incipit original fourni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: Albert Camus / L’Étranger / Le Mythe de Sisyphe / Absurde (CC BY-SA)</text:span></text:p>
              </text:list-item>
              <text:list-item>
                <text:p text:style-name="P6"><text:span text:style-name="T2">Incipits : originaux, rédigés pour cette uni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9:58</meta:creation-date>
    <dc:date>2026-07-21T16:29:58</dc:date>
    <meta:document-statistic meta:object-count="189"/>
    <meta:generator>LibreOffice/24.2.7.2$Linux_X86_64 LibreOffice_project/420$Build-2</meta:generator>
  </office:meta>
</office:document-meta>
</file>