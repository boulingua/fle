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La rentr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La rentr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et engager une conversation à la rentrée</text:span></text:p>
              </text:list-item>
              <text:list-item>
                <text:p text:style-name="P6"><text:span text:style-name="T2">Décrire sa classe et son emploi du temps au présent</text:span></text:p>
              </text:list-item>
              <text:list-item>
                <text:p text:style-name="P6"><text:span text:style-name="T2">Poser des questions et y répondre (interaction orale)</text:span></text:p>
              </text:list-item>
              <text:list-item>
                <text:p text:style-name="P6"><text:span text:style-name="T2">Conjuguer être, avoir, aller, faire et les verbes en -er</text:span></text:p>
              </text:list-item>
              <text:list-item>
                <text:p text:style-name="P6"><text:span text:style-name="T2">Comprendre un court texte sur la vie scol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a cour, 8 h 05 : Léa retrouve Malik.</text:span></text:p>
            <text:list text:style-name="L3">
              <text:list-item>
                <text:p text:style-name="P3"><text:span text:style-name="T2">« Salut Malik ! Ça va ? On est dans la même classe ? »</text:span></text:p>
              </text:list-item>
              <text:list-item>
                <text:p text:style-name="P3"><text:span text:style-name="T2">« Salut ! Oui, je crois. Je suis en 7e B. Et toi ? »</text:span></text:p>
              </text:list-item>
              <text:list-item>
                <text:p text:style-name="P3"><text:span text:style-name="T2">« Pareil ! Tu sais où est la salle 214 ? »</text:span></text:p>
              </text:list-item>
              <text:list-item>
                <text:p text:style-name="P3"><text:span text:style-name="T2">« Au deuxième étage. On y va ensemble ?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ux façons de dire « bonjour » à un·e ami·e</text:span></text:p>
              </text:list-item>
              <text:list-item>
                <text:p text:style-name="P6"><text:span text:style-name="T2">Trois matières de cette année</text:span></text:p>
              </text:list-item>
              <text:list-item>
                <text:p text:style-name="P6"><text:span text:style-name="T2">Ta salle de classe principale ?</text:span></text:p>
              </text:list-item>
              <text:list-item>
                <text:p text:style-name="P6"><text:span text:style-name="T2">Ton sentiment le jour de la rentré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rentrée · l’emploi du temps</text:span></text:p>
              </text:list-item>
              <text:list-item>
                <text:p text:style-name="P6"><text:span text:style-name="T2">la matière · la salle · l’étage</text:span></text:p>
              </text:list-item>
              <text:list-item>
                <text:p text:style-name="P6"><text:span text:style-name="T2">le/la prof principal·e</text:span></text:p>
              </text:list-item>
              <text:list-item>
                <text:p text:style-name="P6"><text:span text:style-name="T2">être en retard · avoir cou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rés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rés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être : suis, es, est, sommes, êtes, sont</text:span></text:p>
              </text:list-item>
              <text:list-item>
                <text:p text:style-name="P6"><text:span text:style-name="T2">avoir : ai, as, a, avons, avez, ont</text:span></text:p>
              </text:list-item>
              <text:list-item>
                <text:p text:style-name="P6"><text:span text:style-name="T2">aller : vais, vas, va, allons, allez, vont</text:span></text:p>
              </text:list-item>
              <text:list-item>
                <text:p text:style-name="P6"><text:span text:style-name="T2">faire : fais, fais, fait, faisons, faites, font</text:span></text:p>
              </text:list-item>
              <text:list-item>
                <text:p text:style-name="P6"><text:span text:style-name="T2">verbes en -er : -e, -es, -e, -ons, -ez, -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« Le premier jour de Nour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« Le premier jour de Nour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ur range son sac : peur + curiosité</text:span></text:p>
              </text:list-item>
              <text:list-item>
                <text:p text:style-name="P6"><text:span text:style-name="T2">Elle retrouve deux amies dans la cour</text:span></text:p>
              </text:list-item>
              <text:list-item>
                <text:p text:style-name="P6"><text:span text:style-name="T2">La prof principale explique l’emploi du temps</text:span></text:p>
              </text:list-item>
              <text:list-item>
                <text:p text:style-name="P6"><text:span text:style-name="T2">À la cantine : la rentrée, pas si stressa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rentr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rentr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ntrée début septembre, le même jour pour toute la France</text:span></text:p>
              </text:list-item>
              <text:list-item>
                <text:p text:style-name="P6"><text:span text:style-name="T2">Vacances d’hiver/printemps décalées en 3 zones (A, B, C)</text:span></text:p>
              </text:list-item>
              <text:list-item>
                <text:p text:style-name="P6"><text:span text:style-name="T2">Été et rentrée : communs à tout le pays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présent (être/avoir/aller/faire)</text:span></text:p>
              </text:list-item>
              <text:list-item>
                <text:p text:style-name="P6"><text:span text:style-name="T2">Ex. 3 : verbes en -er</text:span></text:p>
              </text:list-item>
              <text:list-item>
                <text:p text:style-name="P6"><text:span text:style-name="T2">Ex. 4 : remettre un dialogue dans l’ordre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8 répliques) : saluer → nouvelles → classe + emploi du temps → proposer une activité → conclure</text:span></text:p>
            <text:p text:style-name="P3"><text:span text:style-name="T2">Critères : tâche · interaction · présent · lexiq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alue de plusieurs façons</text:span></text:p>
              </text:list-item>
              <text:list-item>
                <text:p text:style-name="P6"><text:span text:style-name="T2">Je pose et je réponds à une question</text:span></text:p>
              </text:list-item>
              <text:list-item>
                <text:p text:style-name="P6"><text:span text:style-name="T2">Je décris ma classe au présent</text:span></text:p>
              </text:list-item>
              <text:list-item>
                <text:p text:style-name="P6"><text:span text:style-name="T2">Je conjugue les verbes clés</text:span></text:p>
              </text:list-item>
              <text:list-item>
                <text:p text:style-name="P6"><text:span text:style-name="T2">Je tiens un dialogue de 8 répliq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preuve orale d’interaction (binôme, 3–4 min) Barème /20 : tâche 5 · interaction 5 · grammaire 5 · lexique 3 · prononciation 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Vacances scolaires en France », CC BY-SA 4.0</text:span></text:p>
              </text:list-item>
              <text:list-item>
                <text:p text:style-name="P6"><text:span text:style-name="T2">Wikipédia, « Rentrée scolaire », CC BY-SA 4.0</text:span></text:p>
              </text:list-item>
              <text:list-item>
                <text:p text:style-name="P6"><text:span text:style-name="T2">Textes et dialogues : originaux de l’auteur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18</meta:creation-date>
    <dc:date>2026-07-21T16:09:18</dc:date>
    <meta:document-statistic meta:object-count="185"/>
    <meta:generator>LibreOffice/24.2.7.2$Linux_X86_64 LibreOffice_project/420$Build-2</meta:generator>
  </office:meta>
</office:document-meta>
</file>