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 monde du trava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monde du trava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tage d’orientation au lycée · Parcours E · classe 9 · Niveau 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rapport de stage</text:span></text:p>
              </text:list-item>
              <text:list-item>
                <text:p text:style-name="P6"><text:span text:style-name="T2">Utiliser 10 mots du monde du travail</text:span></text:p>
              </text:list-item>
              <text:list-item>
                <text:p text:style-name="P6"><text:span text:style-name="T2">Enchaîner les étapes avec des connecteurs</text:span></text:p>
              </text:list-item>
              <text:list-item>
                <text:p text:style-name="P6"><text:span text:style-name="T2">Rédiger un rapport d’une journée (~15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. Klein distribue le dossier de stage.</text:span></text:p>
            <text:list text:style-name="L3">
              <text:list-item>
                <text:p text:style-name="P3"><text:span text:style-name="T2">Anouk → Institut français de Karlsruhe</text:span></text:p>
              </text:list-item>
              <text:list-item>
                <text:p text:style-name="P3"><text:span text:style-name="T2">Karim → maison d’édition à Lille (futur journaliste)</text:span></text:p>
              </text:list-item>
              <text:list-item>
                <text:p text:style-name="P3"><text:span text:style-name="T2">À la fin : chacun rédige un </text:span><text:span text:style-name="T3">rapport de stag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s-tu déjà visité une entreprise ?</text:span></text:p>
              </text:list-item>
              <text:list-item>
                <text:p text:style-name="P6"><text:span text:style-name="T2">Quel métier t’intéresse ? Pourquoi ?</text:span></text:p>
              </text:list-item>
              <text:list-item>
                <text:p text:style-name="P6"><text:span text:style-name="T2">Stage ou job d’été : quelle différe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stage · un·e stagiaire · une entreprise · un·e collègue · un patron / une patronne · un·e tuteur·rice · un métier · un emploi · une convention de stage · un rapport de stag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 compo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passé compo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voir</text:span><text:span text:style-name="T2"> / </text:span><text:span text:style-name="T4">être</text:span><text:span text:style-name="T2"> (présent) + participe passé</text:span></text:p>
              </text:list-item>
              <text:list-item>
                <text:p text:style-name="P6"><text:span text:style-name="T4">J’</text:span><text:span text:style-name="T5">ai visité</text:span><text:span text:style-name="T4"> la médiathèque.</text:span></text:p>
              </text:list-item>
              <text:list-item>
                <text:p text:style-name="P6"><text:span text:style-name="T4">Je </text:span><text:span text:style-name="T5">suis arrivée</text:span><text:span text:style-name="T4"> à 9 h.</text:span><text:span text:style-name="T2"> → accord avec </text:span><text:span text:style-name="T4">être</text:span></text:p>
              </text:list-item>
              <text:list-item>
                <text:p text:style-name="P6"><text:span text:style-name="T4">être</text:span><text:span text:style-name="T2"> : elle est parti</text:span><text:span text:style-name="T3">e</text:span><text:span text:style-name="T2"> · ils sont arriv</text:span><text:span text:style-name="T3">é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eurs de séque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necteurs de séque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début · d’abord · ensuite · puis · pendant · grâce à · enfi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Rapport d’Anouk, jour 1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Rapport d’Anouk, jour 1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stitut français de Karlsruhe</text:span></text:p>
            <text:list text:style-name="L3">
              <text:list-item>
                <text:p text:style-name="P3"><text:span text:style-name="T2">Au début : accueil par Mme Lambert à 9 h</text:span></text:p>
              </text:list-item>
              <text:list-item>
                <text:p text:style-name="P3"><text:span text:style-name="T2">D’abord : visite de la médiathèque</text:span></text:p>
              </text:list-item>
              <text:list-item>
                <text:p text:style-name="P3"><text:span text:style-name="T2">Ensuite : cours de français pour adultes</text:span></text:p>
              </text:list-item>
              <text:list-item>
                <text:p text:style-name="P3"><text:span text:style-name="T2">Enfin : rangement + compte rend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convention de stag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convention de stag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ocument signé par 3 parties : élève, entreprise, école</text:span></text:p>
              </text:list-item>
              <text:list-item>
                <text:p text:style-name="P6"><text:span text:style-name="T2">Précise dates, missions, encadrement</text:span></text:p>
              </text:list-item>
              <text:list-item>
                <text:p text:style-name="P6"><text:span text:style-name="T2">Stage &gt; 2 mois → gratification minimale</text:span></text:p>
              </text:list-item>
              <text:list-item>
                <text:p text:style-name="P6"><text:span text:style-name="T2">Source : Wikipédia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écrite (4 questions)</text:span></text:p>
              </text:list-item>
              <text:list-item>
                <text:p text:style-name="P6"><text:span text:style-name="T2">Ex. 2 : vocabulaire à compléter</text:span></text:p>
              </text:list-item>
              <text:list-item>
                <text:p text:style-name="P6"><text:span text:style-name="T2">Ex. 3 : insérer 5 connecteurs</text:span></text:p>
              </text:list-item>
              <text:list-item>
                <text:p text:style-name="P6"><text:span text:style-name="T2">Ex. 4 : passé composé (accords avec </text:span><text:span text:style-name="T4">être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érenc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fférenc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G</text:span><text:span text:style-name="T2"> : Ex. 1 et 2 + encadré Point de langue</text:span></text:p>
              </text:list-item>
              <text:list-item>
                <text:p text:style-name="P6"><text:span text:style-name="T3">M</text:span><text:span text:style-name="T2"> : + Ex. 3 (4 connecteurs)</text:span></text:p>
              </text:list-item>
              <text:list-item>
                <text:p text:style-name="P6"><text:span text:style-name="T3">E</text:span><text:span text:style-name="T2"> : Ex. 4 + réécriture au fémin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on rapport de stage (~150 mots)</text:span></text:p>
            <text:list text:style-name="L3">
              <text:list-item>
                <text:p text:style-name="P3"><text:span text:style-name="T2">4 étapes : matin, midi, après-midi, soir</text:span></text:p>
              </text:list-item>
              <text:list-item>
                <text:p text:style-name="P3"><text:span text:style-name="T2">5 connecteurs · 6 mots du travail</text:span></text:p>
              </text:list-item>
              <text:list-item>
                <text:p text:style-name="P3"><text:span text:style-name="T2">passé composé · une phrase-bila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10 mots du travail</text:span></text:p>
              </text:list-item>
              <text:list-item>
                <text:p text:style-name="P6"><text:span text:style-name="T2">☐ </text:span><text:span text:style-name="T2">5 connecteurs</text:span></text:p>
              </text:list-item>
              <text:list-item>
                <text:p text:style-name="P6"><text:span text:style-name="T2">☐ </text:span><text:span text:style-name="T2">passé composé + accords</text:span></text:p>
              </text:list-item>
              <text:list-item>
                <text:p text:style-name="P6"><text:span text:style-name="T2">☐ </text:span><text:span text:style-name="T2">rapport de 150 mots rel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.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.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écrite (10 P.)</text:span></text:p>
              </text:list-item>
              <text:list-item>
                <text:p text:style-name="P6"><text:span text:style-name="T2">Tâche 2 : vocabulaire (8 P.)</text:span></text:p>
              </text:list-item>
              <text:list-item>
                <text:p text:style-name="P6"><text:span text:style-name="T2">Tâche 3 : expression écrite ~150 mots (12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« Stage en entreprise » (CC BY-SA 4.0)</text:span></text:p>
              </text:list-item>
              <text:list-item>
                <text:p text:style-name="P6"><text:span text:style-name="T2">Onisep — Découvrir les métiers</text:span></text:p>
              </text:list-item>
              <text:list-item>
                <text:p text:style-name="P6"><text:span text:style-name="T2">OFAJ — Stages franco-allemand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00</meta:creation-date>
    <dc:date>2026-07-21T16:16:00</dc:date>
    <meta:document-statistic meta:object-count="193"/>
    <meta:generator>LibreOffice/24.2.7.2$Linux_X86_64 LibreOffice_project/420$Build-2</meta:generator>
  </office:meta>
</office:document-meta>
</file>