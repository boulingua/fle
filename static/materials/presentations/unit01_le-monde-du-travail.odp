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e monde du travail — le Praktikum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monde du travail — le Praktikum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1 · Parcours G+M · classe 9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10 métiers et 5 secteurs d’activité</text:span></text:p>
              </text:list-item>
              <text:list-item>
                <text:p text:style-name="P6"><text:span text:style-name="T2">Comprendre un rapport de stage</text:span></text:p>
              </text:list-item>
              <text:list-item>
                <text:p text:style-name="P6"><text:span text:style-name="T2">Décrire une journée de stage au passé composé</text:span></text:p>
              </text:list-item>
              <text:list-item>
                <text:p text:style-name="P6"><text:span text:style-name="T2">Rédiger un court rapport de Praktikum</text:span></text:p>
              </text:list-item>
              <text:list-item>
                <text:p text:style-name="P6"><text:span text:style-name="T2">Exprimer un ressenti simp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, élève de 9e, commence lundi son stage à la boulangerie « Chez Hugo ».</text:span></text:p>
            <text:list text:style-name="L3">
              <text:list-item>
                <text:p text:style-name="P3"><text:span text:style-name="T2">Léa : J’ai un peu peur… mais je suis curieuse.</text:span></text:p>
              </text:list-item>
              <text:list-item>
                <text:p text:style-name="P3"><text:span text:style-name="T2">Sarah : Tu vas faire quoi ?</text:span></text:p>
              </text:list-item>
              <text:list-item>
                <text:p text:style-name="P3"><text:span text:style-name="T2">Léa : Observer, peser la farine, aider à ranger. Et me lever à 4 h !</text:span></text:p>
              </text:list-item>
            </text:list>
            <text:p text:style-name="P3"><text:span text:style-name="T2">Et vous ? Feriez-vous ce stag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métier rêvez-vous d’exercer ?</text:span></text:p>
              </text:list-item>
              <text:list-item>
                <text:p text:style-name="P6"><text:span text:style-name="T2">Avez-vous déjà fait un stage ?</text:span></text:p>
              </text:list-item>
              <text:list-item>
                <text:p text:style-name="P6"><text:span text:style-name="T2">Quel secteur vous intéresse ?</text:span></text:p>
              </text:list-item>
              <text:list-item>
                <text:p text:style-name="P6"><text:span text:style-name="T2">À quoi sert un stag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stage / une stagiaire — das Praktikum</text:span></text:p>
              </text:list-item>
              <text:list-item>
                <text:p text:style-name="P6"><text:span text:style-name="T2">une entreprise — ein Betrieb</text:span></text:p>
              </text:list-item>
              <text:list-item>
                <text:p text:style-name="P6"><text:span text:style-name="T2">le tuteur / la tutrice — der·die Betreuer·in</text:span></text:p>
              </text:list-item>
              <text:list-item>
                <text:p text:style-name="P6"><text:span text:style-name="T2">les horaires — die Arbeitszeiten</text:span></text:p>
              </text:list-item>
              <text:list-item>
                <text:p text:style-name="P6"><text:span text:style-name="T2">une tâche — eine Aufgabe</text:span></text:p>
              </text:list-item>
              <text:list-item>
                <text:p text:style-name="P6"><text:span text:style-name="T2">un rapport de stage — ein Praktikumsberich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x métie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x métie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boulanger·ère · infirmier·ère · professeur·e · ingénieur·e · journaliste · commerçant·e · électricien·ne · coiffeur·euse · informaticien·ne · architect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nq s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inq s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’artisanat (Handwerk)</text:span></text:p>
              </text:list-item>
              <text:list-item>
                <text:p text:style-name="P6"><text:span text:style-name="T2">la santé (Gesundheit)</text:span></text:p>
              </text:list-item>
              <text:list-item>
                <text:p text:style-name="P6"><text:span text:style-name="T2">l’enseignement (Bildung)</text:span></text:p>
              </text:list-item>
              <text:list-item>
                <text:p text:style-name="P6"><text:span text:style-name="T2">le commerce (Handel)</text:span></text:p>
              </text:list-item>
              <text:list-item>
                <text:p text:style-name="P6"><text:span text:style-name="T2">les nouvelles technologies (IT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passé compos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passé compos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voir / être (présent) + participe passé</text:span></text:p>
            <text:list text:style-name="L3">
              <text:list-item>
                <text:p text:style-name="P3"><text:span text:style-name="T2">Avec </text:span><text:span text:style-name="T3">avoir</text:span><text:span text:style-name="T2"> : j’ai pesé · elle a appris</text:span></text:p>
              </text:list-item>
              <text:list-item>
                <text:p text:style-name="P3"><text:span text:style-name="T2">Avec </text:span><text:span text:style-name="T3">être</text:span><text:span text:style-name="T2"> (mouvement, pronominaux) : je suis arrivée · ils sont partis</text:span></text:p>
              </text:list-item>
              <text:list-item>
                <text:p text:style-name="P3"><text:span text:style-name="T2">Avec </text:span><text:span text:style-name="T3">être</text:span><text:span text:style-name="T2"> : le participe s’accorde → Léa est arriv</text:span><text:span text:style-name="T4">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la journée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la journée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e matin, je suis arrivée à 5 h. Hugo m’a accueillie avec un café. D’abord, j’ai pesé la farine. Ensuite, j’ai aidé à pétrir la pâte. À 8 h, les clients sont arrivés et j’ai vendu trois baguettes.</text:span></text:p>
            <text:p text:style-name="P3"><text:span text:style-name="T2">J’ai appris la patience, la précision et l’importance d’aimer son méti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stage de 3e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stage de 3e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tage obligatoire de 5 jours en classe de 3e (≈ 9e)</text:span></text:p>
              </text:list-item>
              <text:list-item>
                <text:p text:style-name="P6"><text:span text:style-name="T2">En entreprise, association ou administration</text:span></text:p>
              </text:list-item>
              <text:list-item>
                <text:p text:style-name="P6"><text:span text:style-name="T2">But : découvrir le monde du travail, préciser son orientation</text:span></text:p>
              </text:list-item>
              <text:list-item>
                <text:p text:style-name="P6"><text:span text:style-name="T2">Convention de stage obligatoire (assurance, accident)</text:span></text:p>
              </text:list-item>
            </text:list>
            <text:p text:style-name="P3"><text:span text:style-name="T2">Source : Wikipédia « Stage en France » (CC BY-SA) ; édusco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écrite (texte)</text:span></text:p>
              </text:list-item>
              <text:list-item>
                <text:p text:style-name="P6"><text:span text:style-name="T2">Vocabulaire — métiers et secteurs</text:span></text:p>
              </text:list-item>
              <text:list-item>
                <text:p text:style-name="P6"><text:span text:style-name="T2">Conjugaison — passé composé</text:span></text:p>
              </text:list-item>
              <text:list-item>
                <text:p text:style-name="P6"><text:span text:style-name="T2">Production guidée — mini-rapport à trou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mon rapport de Praktikum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mon rapport de Praktikum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~120 mots, 10–12 phrases :</text:span></text:p>
            <text:list text:style-name="L3">
              <text:list-item>
                <text:p text:style-name="P3"><text:span text:style-name="T2">date et lieu · tuteur · horaires</text:span></text:p>
              </text:list-item>
              <text:list-item>
                <text:p text:style-name="P3"><text:span text:style-name="T2">3 tâches au passé composé</text:span></text:p>
              </text:list-item>
              <text:list-item>
                <text:p text:style-name="P3"><text:span text:style-name="T2">2 choses apprises</text:span></text:p>
              </text:list-item>
              <text:list-item>
                <text:p text:style-name="P3"><text:span text:style-name="T2">votre ressenti</text:span></text:p>
              </text:list-item>
            </text:list>
            <text:p text:style-name="P3"><text:span text:style-name="T2">Connecteurs : d’abord, ensuite, enfi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10 métiers et 5 secteurs</text:span></text:p>
              </text:list-item>
              <text:list-item>
                <text:p text:style-name="P6"><text:span text:style-name="T2">Je comprends un rapport de stage</text:span></text:p>
              </text:list-item>
              <text:list-item>
                <text:p text:style-name="P6"><text:span text:style-name="T2">Je décris une journée au passé composé</text:span></text:p>
              </text:list-item>
              <text:list-item>
                <text:p text:style-name="P6"><text:span text:style-name="T2">Je rédige un rapport structuré</text:span></text:p>
              </text:list-item>
              <text:list-item>
                <text:p text:style-name="P6"><text:span text:style-name="T2">J’exprime un ressent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10 P.</text:span></text:p>
              </text:list-item>
              <text:list-item>
                <text:p text:style-name="P6"><text:span text:style-name="T2">Tâche 2 — Vocabulaire : 8 P.</text:span></text:p>
              </text:list-item>
              <text:list-item>
                <text:p text:style-name="P6"><text:span text:style-name="T2">Tâche 3 — Expression écrite : 12 P.</text:span></text:p>
              </text:list-item>
            </text:list>
            <text:p text:style-name="P3"><text:span text:style-name="T2">Total : 30 P. · Réussite M : 18 / 3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Stage en France », CC BY-SA 4.0</text:span></text:p>
              </text:list-item>
              <text:list-item>
                <text:p text:style-name="P6"><text:span text:style-name="T2">éduscol / education.gouv.fr, Licence Ouverte (Etalab)</text:span></text:p>
              </text:list-item>
              <text:list-item>
                <text:p text:style-name="P6"><text:span text:style-name="T2">ONISEP — orientation (référenc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13</meta:creation-date>
    <dc:date>2026-07-21T15:34:13</dc:date>
    <meta:document-statistic meta:object-count="193"/>
    <meta:generator>LibreOffice/24.2.7.2$Linux_X86_64 LibreOffice_project/420$Build-2</meta:generator>
  </office:meta>
</office:document-meta>
</file>