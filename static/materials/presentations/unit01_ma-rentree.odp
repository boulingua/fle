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1.43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 — Ma rentré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 — Ma rentré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7 · Niveau M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aluer et demander des nouvelles des vacances</text:span></text:p>
              </text:list-item>
              <text:list-item>
                <text:p text:style-name="P6"><text:span text:style-name="T2">Raconter ma rentrée en 3-4 phrases au présent</text:span></text:p>
              </text:list-item>
              <text:list-item>
                <text:p text:style-name="P6"><text:span text:style-name="T2">Exprimer un sentiment et le justifier</text:span></text:p>
              </text:list-item>
              <text:list-item>
                <text:p text:style-name="P6"><text:span text:style-name="T2">Nommer 8 objets et lieux de l’école</text:span></text:p>
              </text:list-item>
              <text:list-item>
                <text:p text:style-name="P6"><text:span text:style-name="T2">Conjuguer </text:span><text:span text:style-name="T3">être</text:span><text:span text:style-name="T2">, </text:span><text:span text:style-name="T3">avoir</text:span><text:span text:style-name="T2"> et un verbe en </text:span><text:span text:style-name="T3">-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undi 1er septembre, 8 h 05. Dans la cour, Léa retrouve Théo.</text:span></text:p>
            <text:list text:style-name="L3">
              <text:list-item>
                <text:p text:style-name="P3"><text:span text:style-name="T2">Léa : Salut ! Tu as passé de bonnes vacances ?</text:span></text:p>
              </text:list-item>
              <text:list-item>
                <text:p text:style-name="P3"><text:span text:style-name="T2">Théo : Oui, super. J’étais en Bretagne. Et toi ?</text:span></text:p>
              </text:list-item>
              <text:list-item>
                <text:p text:style-name="P3"><text:span text:style-name="T2">Léa : Je suis restée à Karlsruhe. On a le même emploi du temps !</text:span></text:p>
              </text:list-item>
              <text:list-item>
                <text:p text:style-name="P3"><text:span text:style-name="T2">Théo : On commence par le français à 8 h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ment s’est passée votre rentrée ?</text:span></text:p>
              </text:list-item>
              <text:list-item>
                <text:p text:style-name="P6"><text:span text:style-name="T2">Citez trois sentiments du premier jour.</text:span></text:p>
              </text:list-item>
              <text:list-item>
                <text:p text:style-name="P6"><text:span text:style-name="T2">Cinq objets dans votre cartable ?</text:span></text:p>
              </text:list-item>
              <text:list-item>
                <text:p text:style-name="P6"><text:span text:style-name="T2">Brainstorming : tous les mots de l’école que vous connaissez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5" draw:style-name="gr2" draw:layer="layout" svg:width="22.859cm" svg:height="4.174cm" svg:x="1.27cm" svg:y="3.31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4">Matériel et lieux</text:span></text:p>
              </table:table-cell>
              <table:table-cell>
                <text:p text:style-name="P7"><text:span text:style-name="T4">Sentiments et actions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le cartable · le manuel</text:span></text:p>
              </table:table-cell>
              <table:table-cell>
                <text:p text:style-name="P7"><text:span text:style-name="T5">content·e · curieux·euse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5">la trousse · le classeur</text:span></text:p>
              </table:table-cell>
              <table:table-cell>
                <text:p text:style-name="P7"><text:span text:style-name="T5">inquiet·e · nerveux·eus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la cour · la salle de classe</text:span></text:p>
              </table:table-cell>
              <table:table-cell>
                <text:p text:style-name="P7"><text:span text:style-name="T5">fatigué·e · pressé·e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5">l’emploi du temps</text:span></text:p>
              </table:table-cell>
              <table:table-cell>
                <text:p text:style-name="P7"><text:span text:style-name="T5">retrouver · commenc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 présen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 présen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6">être :</text:span><text:span text:style-name="T2"> je suis, tu es, il/elle est, nous sommes, vous êtes, ils/elles sont</text:span></text:p>
              </text:list-item>
              <text:list-item>
                <text:p text:style-name="P6"><text:span text:style-name="T6">avoir :</text:span><text:span text:style-name="T2"> j’ai, tu as, il/elle a, nous avons, vous avez, ils/elles ont</text:span></text:p>
              </text:list-item>
              <text:list-item>
                <text:p text:style-name="P6"><text:span text:style-name="T6">commencer :</text:span><text:span text:style-name="T2"> je commence, … nous commençons, … ils/elles commencent</text:span></text:p>
              </text:list-item>
            </text:list>
            <text:p text:style-name="P3"><text:span text:style-name="T3">Je suis en cinquième, j’ai un nouvel emploi du temps et les cours commencent à 8 h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e calendrier scolaire français :</text:span></text:p>
            <text:list text:style-name="L3">
              <text:list-item>
                <text:p text:style-name="P3"><text:span text:style-name="T2">Année d’environ 36 semaines de cours</text:span></text:p>
              </text:list-item>
              <text:list-item>
                <text:p text:style-name="P3"><text:span text:style-name="T2">Rentrée début septembre, après 8 semaines de grandes vacances</text:span></text:p>
              </text:list-item>
              <text:list-item>
                <text:p text:style-name="P3"><text:span text:style-name="T2">Vacances : Toussaint, Noël, hiver, printemps</text:span></text:p>
              </text:list-item>
              <text:list-item>
                <text:p text:style-name="P3"><text:span text:style-name="T2">Trois zones (A, B, C) pour étaler les départs</text:span></text:p>
              </text:list-item>
            </text:list>
            <text:p text:style-name="P3"><text:span text:style-name="T3">(D’après Wikipédia, CC BY-SA.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6">Ex. 1</text:span><text:span text:style-name="T2"> Compréhension du texte « La rentrée de Sarah »</text:span></text:p>
              </text:list-item>
              <text:list-item>
                <text:p text:style-name="P6"><text:span text:style-name="T6">Ex. 2</text:span><text:span text:style-name="T2"> Relier situations et sentiments</text:span></text:p>
              </text:list-item>
              <text:list-item>
                <text:p text:style-name="P6"><text:span text:style-name="T6">Ex. 3</text:span><text:span text:style-name="T2"> Compléter au présent (</text:span><text:span text:style-name="T3">être / avoir / commencer</text:span><text:span text:style-name="T2">)</text:span></text:p>
              </text:list-item>
              <text:list-item>
                <text:p text:style-name="P6"><text:span text:style-name="T6">Ex. 4</text:span><text:span text:style-name="T2"> « Dans mon cartable, il y a… »</text:span></text:p>
              </text:list-item>
            </text:list>
            <text:p text:style-name="P3"><text:span text:style-name="T2">Différenciation :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ialogue de rentrée en binôme (1-2 min) :</text:span></text:p>
            <text:list text:style-name="L3">
              <text:list-item>
                <text:p text:style-name="P3"><text:span text:style-name="T2">Saluer, demander des nouvelles des vacances</text:span></text:p>
              </text:list-item>
              <text:list-item>
                <text:p text:style-name="P3"><text:span text:style-name="T2">Une chose faite pendant les vacances</text:span></text:p>
              </text:list-item>
              <text:list-item>
                <text:p text:style-name="P3"><text:span text:style-name="T2">Un sentiment justifié</text:span></text:p>
              </text:list-item>
              <text:list-item>
                <text:p text:style-name="P3"><text:span text:style-name="T2">L’emploi du temps (</text:span><text:span text:style-name="T3">On commence par…</text:span><text:span text:style-name="T2">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salue et pose une question</text:span></text:p>
              </text:list-item>
              <text:list-item>
                <text:p text:style-name="P6"><text:span text:style-name="T2">☐ </text:span><text:span text:style-name="T2">Je raconte ma rentrée (3-4 phrases)</text:span></text:p>
              </text:list-item>
              <text:list-item>
                <text:p text:style-name="P6"><text:span text:style-name="T2">☐ </text:span><text:span text:style-name="T2">J’utilise 3 adjectifs de sentiment</text:span></text:p>
              </text:list-item>
              <text:list-item>
                <text:p text:style-name="P6"><text:span text:style-name="T2">☐ </text:span><text:span text:style-name="T2">Je nomme 6 objets/lieux</text:span></text:p>
              </text:list-item>
              <text:list-item>
                <text:p text:style-name="P6"><text:span text:style-name="T2">☐ </text:span><text:span text:style-name="T2">Je conjugue être, avoir, un verbe en -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evoir surveillé (Niveau M) — 30 points</text:span></text:p>
            <text:list text:style-name="L3">
              <text:list-item>
                <text:p text:style-name="P3"><text:span text:style-name="T2">Compréhension écrite — 8 P.</text:span></text:p>
              </text:list-item>
              <text:list-item>
                <text:p text:style-name="P3"><text:span text:style-name="T2">Expression orale (interaction) — 12 P.</text:span></text:p>
              </text:list-item>
              <text:list-item>
                <text:p text:style-name="P3"><text:span text:style-name="T2">Expression écrite (~50 mots) — 10 P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Rentrée scolaire — Wikipédia, CC BY-SA</text:span></text:p>
              </text:list-item>
              <text:list-item>
                <text:p text:style-name="P6"><text:span text:style-name="T2">Calendrier scolaire — Wikipédia, CC BY-SA</text:span></text:p>
              </text:list-item>
              <text:list-item>
                <text:p text:style-name="P6"><text:span text:style-name="T2">Collège en France — Wikipédia, CC BY-SA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08:13</meta:creation-date>
    <dc:date>2026-07-21T15:08:13</dc:date>
    <meta:document-statistic meta:object-count="181"/>
    <meta:generator>LibreOffice/24.2.7.2$Linux_X86_64 LibreOffice_project/420$Build-2</meta:generator>
  </office:meta>
</office:document-meta>
</file>