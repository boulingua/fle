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 — Salutations et prénom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 — Salutations et prénom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aluer : familier et formel</text:span></text:p>
              </text:list-item>
              <text:list-item>
                <text:p text:style-name="P6"><text:span text:style-name="T2">Se présenter : prénom, nom, âge, classe, nationalité</text:span></text:p>
              </text:list-item>
              <text:list-item>
                <text:p text:style-name="P6"><text:span text:style-name="T2">Épeler son nom en français</text:span></text:p>
              </text:list-item>
              <text:list-item>
                <text:p text:style-name="P6"><text:span text:style-name="T2">Choisir « tu » ou « vous »</text:span></text:p>
              </text:list-item>
              <text:list-item>
                <text:p text:style-name="P6"><text:span text:style-name="T2">Tenir un court dialogue de rencon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’est la rentrée, dans la cour du lycée. — Salut ! Tu es en sixième, toi aussi ? — Oui, en 6ᵉ B. Moi, c’est Anouk. — Enchanté, moi c’est Tristan. — Bonjour, madame ! Vous êtes la prof de français ? — Bonjour à tous les deux. Bienvenue au lycée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Bonjour » en allemand, anglais, espagnol ?</text:span></text:p>
              </text:list-item>
              <text:list-item>
                <text:p text:style-name="P6"><text:span text:style-name="T2">Quels mots français pour saluer connaissez-vous ?</text:span></text:p>
              </text:list-item>
              <text:list-item>
                <text:p text:style-name="P6"><text:span text:style-name="T2">« du » / « Sie » : et en français ?</text:span></text:p>
              </text:list-item>
              <text:list-item>
                <text:p text:style-name="P6"><text:span text:style-name="T2">Récitez l’alphabet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Saluta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Saluta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onjour · Bonsoir · Salut · Coucou</text:span></text:p>
              </text:list-item>
              <text:list-item>
                <text:p text:style-name="P6"><text:span text:style-name="T2">Au revoir · À bientôt · Bonne journée</text:span></text:p>
              </text:list-item>
              <text:list-item>
                <text:p text:style-name="P6"><text:span text:style-name="T2">Enchanté(e)</text:span></text:p>
              </text:list-item>
              <text:list-item>
                <text:p text:style-name="P6"><text:span text:style-name="T2">Familier vs forme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Se présent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Se présent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m’appelle… / Moi, c’est…</text:span></text:p>
              </text:list-item>
              <text:list-item>
                <text:p text:style-name="P6"><text:span text:style-name="T2">J’ai … ans</text:span></text:p>
              </text:list-item>
              <text:list-item>
                <text:p text:style-name="P6"><text:span text:style-name="T2">Je suis en 6ᵉ</text:span></text:p>
              </text:list-item>
              <text:list-item>
                <text:p text:style-name="P6"><text:span text:style-name="T2">J’habite à…</text:span></text:p>
              </text:list-item>
              <text:list-item>
                <text:p text:style-name="P6"><text:span text:style-name="T2">Je suis allemand(e) / belge / français(e) / suis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Alphabe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Alphabe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 B C D E F G H I J K L M N O P Q R S T U V W X Y Z - W = « double-vé » - Y = « i grec » - H muet : Hugo → « Ugo » - Accents : é è ê à â î ï ô û ç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tu / vou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tu / vou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u : ami, camarade, famille</text:span></text:p>
              </text:list-item>
              <text:list-item>
                <text:p text:style-name="P6"><text:span text:style-name="T2">Vous : adulte inconnu, professeur, commerçant ; aussi pluriel</text:span></text:p>
              </text:list-item>
              <text:list-item>
                <text:p text:style-name="P6"><text:span text:style-name="T2">Comment </text:span><text:span text:style-name="T3">tu t’appelles</text:span><text:span text:style-name="T2"> ? → Comment </text:span><text:span text:style-name="T3">vous appelez-vous</text:span><text:span text:style-name="T2"> ?</text:span></text:p>
              </text:list-item>
              <text:list-item>
                <text:p text:style-name="P6"><text:span text:style-name="T2">En cas de doute avec un adulte → vou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bi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bi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tre proches : baiser sur la joue</text:span></text:p>
              </text:list-item>
              <text:list-item>
                <text:p text:style-name="P6"><text:span text:style-name="T2">Nombre variable selon les régions (2, 3, 4)</text:span></text:p>
              </text:list-item>
              <text:list-item>
                <text:p text:style-name="P6"><text:span text:style-name="T2">En contexte formel : poignée de main ou « Bonjour »</text:span></text:p>
              </text:list-item>
              <text:list-item>
                <text:p text:style-name="P6"><text:span text:style-name="T2">Pas de règle unique — observer l’usage local (d’après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Compréhension du texte</text:span></text:p>
              </text:list-item>
              <text:list-item>
                <text:p text:style-name="P6"><text:span text:style-name="T2">Ex. 2 Tu ou vous ?</text:span></text:p>
              </text:list-item>
              <text:list-item>
                <text:p text:style-name="P6"><text:span text:style-name="T2">Ex. 3 Quelle salutation ?</text:span></text:p>
              </text:list-item>
              <text:list-item>
                <text:p text:style-name="P6"><text:span text:style-name="T2">Ex. 4 Épeler son nom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en binôme (~8 répliques) : saluer · prénom + nom épelé · âge · classe · nationalité · congé + une réplique en « vous » à un adulte Critères : salutation adaptée, présentation complète, épellation, tu/vous,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aluer familier et formel</text:span></text:p>
              </text:list-item>
              <text:list-item>
                <text:p text:style-name="P6"><text:span text:style-name="T2">Se présenter en 5 phrases</text:span></text:p>
              </text:list-item>
              <text:list-item>
                <text:p text:style-name="P6"><text:span text:style-name="T2">Épeler mon nom</text:span></text:p>
              </text:list-item>
              <text:list-item>
                <text:p text:style-name="P6"><text:span text:style-name="T2">Tu / vous</text:span></text:p>
              </text:list-item>
              <text:list-item>
                <text:p text:style-name="P6"><text:span text:style-name="T2">Tenir un dialogue de rencon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interaction orale (10 pts)</text:span></text:p>
              </text:list-item>
              <text:list-item>
                <text:p text:style-name="P6"><text:span text:style-name="T2">Tâche 2 : vocabulaire et langue (8 pts)</text:span></text:p>
              </text:list-item>
              <text:list-item>
                <text:p text:style-name="P6"><text:span text:style-name="T2">Tâche 3 : carte d’identité écrite, ~60 mots (12 pts) Total : 30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ise (salutation) — Wikipédia, CC BY-SA 4.0</text:span></text:p>
              </text:list-item>
              <text:list-item>
                <text:p text:style-name="P6"><text:span text:style-name="T2">Tutoiement et vouvoiement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56</meta:creation-date>
    <dc:date>2026-07-21T15:46:56</dc:date>
    <meta:document-statistic meta:object-count="189"/>
    <meta:generator>LibreOffice/24.2.7.2$Linux_X86_64 LibreOffice_project/420$Build-2</meta:generator>
  </office:meta>
</office:document-meta>
</file>