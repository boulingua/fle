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 — Salutations et prénom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 — Salutations et prénom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6 · Niveau M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aluer et prendre congé</text:span></text:p>
              </text:list-item>
              <text:list-item>
                <text:p text:style-name="P6"><text:span text:style-name="T2">Me présenter et épeler mon prénom</text:span></text:p>
              </text:list-item>
              <text:list-item>
                <text:p text:style-name="P6"><text:span text:style-name="T2">Demander le prénom et l’âge</text:span></text:p>
              </text:list-item>
              <text:list-item>
                <text:p text:style-name="P6"><text:span text:style-name="T2">Choisir </text:span><text:span text:style-name="T3">tu</text:span><text:span text:style-name="T2"> ou </text:span><text:span text:style-name="T3">vous</text:span></text:p>
              </text:list-item>
              <text:list-item>
                <text:p text:style-name="P6"><text:span text:style-name="T2">Bien prononcer et inton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’est la rentrée, devant le collège.</text:span></text:p>
            <text:list text:style-name="L3">
              <text:list-item>
                <text:p text:style-name="P3"><text:span text:style-name="T2">Camille : Bonjour ! Moi, c’est Camille. Et toi ?</text:span></text:p>
              </text:list-item>
              <text:list-item>
                <text:p text:style-name="P3"><text:span text:style-name="T2">Yanis : Salut ! Je m’appelle Yanis. Y-A-N-I-S.</text:span></text:p>
              </text:list-item>
              <text:list-item>
                <text:p text:style-name="P3"><text:span text:style-name="T2">Camille : Tu as quel âge ?</text:span></text:p>
              </text:list-item>
              <text:list-item>
                <text:p text:style-name="P3"><text:span text:style-name="T2">Yanis : J’ai onze ans.</text:span></text:p>
              </text:list-item>
              <text:list-item>
                <text:p text:style-name="P3"><text:span text:style-name="T2">(À la directrice) : Bonjour, madame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l est ton prénom ?</text:span></text:p>
              </text:list-item>
              <text:list-item>
                <text:p text:style-name="P6"><text:span text:style-name="T2">Comment dit-on </text:span><text:span text:style-name="T3">Hallo</text:span><text:span text:style-name="T2"> en français ? Et </text:span><text:span text:style-name="T3">Tschüss</text:span><text:span text:style-name="T2"> ?</text:span></text:p>
              </text:list-item>
              <text:list-item>
                <text:p text:style-name="P6"><text:span text:style-name="T2">Connais-tu déjà un mot français ?</text:span></text:p>
              </text:list-item>
              <text:list-item>
                <text:p text:style-name="P6"><text:span text:style-name="T2">À qui dit-on </text:span><text:span text:style-name="T3">tu</text:span><text:span text:style-name="T2"> ? À qui dit-on </text:span><text:span text:style-name="T3">vous</text:span><text:span text:style-name="T2">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Bonjour / Bonsoir · Salut</text:span></text:p>
              </text:list-item>
              <text:list-item>
                <text:p text:style-name="P6"><text:span text:style-name="T2">Au revoir · À bientôt</text:span></text:p>
              </text:list-item>
              <text:list-item>
                <text:p text:style-name="P6"><text:span text:style-name="T2">Je m’appelle … · Comment tu t’appelles ?</text:span></text:p>
              </text:list-item>
              <text:list-item>
                <text:p text:style-name="P6"><text:span text:style-name="T2">Tu as quel âge ? — J’ai … ans</text:span></text:p>
              </text:list-item>
              <text:list-item>
                <text:p text:style-name="P6"><text:span text:style-name="T2">Merci · S’il te / vous plaît · Enchanté·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tu / vou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tu / vou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u</text:span><text:span text:style-name="T2"> = camarade, ami·e, même âge</text:span></text:p>
              </text:list-item>
              <text:list-item>
                <text:p text:style-name="P6"><text:span text:style-name="T4">vous</text:span><text:span text:style-name="T2"> = adulte, inconnu, politesse</text:span></text:p>
              </text:list-item>
              <text:list-item>
                <text:p text:style-name="P6"><text:span text:style-name="T2">L’âge → verbe </text:span><text:span text:style-name="T4">avoir</text:span><text:span text:style-name="T2"> : </text:span><text:span text:style-name="T3">J’ai onze ans</text:span></text:p>
              </text:list-item>
              <text:list-item>
                <text:p text:style-name="P6"><text:span text:style-name="T2">Question : l’intonation monte ↗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bi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bi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n se salue souvent par </text:span><text:span text:style-name="T3">la bise</text:span><text:span text:style-name="T2"> : joue contre joue</text:span></text:p>
              </text:list-item>
              <text:list-item>
                <text:p text:style-name="P6"><text:span text:style-name="T2">Signe amical, entre proches</text:span></text:p>
              </text:list-item>
              <text:list-item>
                <text:p text:style-name="P6"><text:span text:style-name="T2">Le nombre de bises varie selon les régions</text:span></text:p>
              </text:list-item>
              <text:list-item>
                <text:p text:style-name="P6"><text:span text:style-name="T2">Cadre formel → poignée de main + </text:span><text:span text:style-name="T3">Bonjour</text:span></text:p>
              </text:list-item>
              <text:list-item>
                <text:p text:style-name="P6"><text:span text:style-name="T2">(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Formel ou informel ?</text:span></text:p>
              </text:list-item>
              <text:list-item>
                <text:p text:style-name="P6"><text:span text:style-name="T2">Ex. 2 — Compléter le dialogue</text:span></text:p>
              </text:list-item>
              <text:list-item>
                <text:p text:style-name="P6"><text:span text:style-name="T2">Ex. 3 — </text:span><text:span text:style-name="T3">tu</text:span><text:span text:style-name="T2"> ou </text:span><text:span text:style-name="T3">vous</text:span><text:span text:style-name="T2"> ?</text:span></text:p>
              </text:list-item>
              <text:list-item>
                <text:p text:style-name="P6"><text:span text:style-name="T2">Ex. 4 — Épeler des prénoms</text:span></text:p>
              </text:list-item>
              <text:list-item>
                <text:p text:style-name="P6"><text:span text:style-name="T2">Correction commune (Solution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n binôme, 1 min : saluer + prénom + âge + question + congé. Rotation : trois camarades différents.</text:span></text:p>
            <text:p text:style-name="P3"><text:span text:style-name="T2">Critères : tâche (4) · prononciation (3) · langue (3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alue et je prends congé</text:span></text:p>
              </text:list-item>
              <text:list-item>
                <text:p text:style-name="P6"><text:span text:style-name="T2">Je dis et j’épelle mon prénom</text:span></text:p>
              </text:list-item>
              <text:list-item>
                <text:p text:style-name="P6"><text:span text:style-name="T2">Je dis mon âge avec </text:span><text:span text:style-name="T3">avoir</text:span></text:p>
              </text:list-item>
              <text:list-item>
                <text:p text:style-name="P6"><text:span text:style-name="T2">Je demande prénom et âge</text:span></text:p>
              </text:list-item>
              <text:list-item>
                <text:p text:style-name="P6"><text:span text:style-name="T2">Je choisis </text:span><text:span text:style-name="T3">tu</text:span><text:span text:style-name="T2"> ou </text:span><text:span text:style-name="T3">vou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ouez une rencontre à la rentrée (1 min) : saluer · se présenter + épeler · âge · congé.</text:span></text:p>
            <text:p text:style-name="P3"><text:span text:style-name="T2">Barème /20 : salutation 4 · présentation 4 · âge 4 · prononciation 4 · langue 4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3:23:15</meta:creation-date>
    <dc:date>2026-07-21T13:23:15</dc:date>
    <meta:document-statistic meta:object-count="177"/>
    <meta:generator>LibreOffice/24.2.7.2$Linux_X86_64 LibreOffice_project/420$Build-2</meta:generator>
  </office:meta>
</office:document-meta>
</file>