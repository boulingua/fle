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ynthèse des thèmes littérair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ynthèse des thèmes littérair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lière E · classe 13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pérer un thème récurrent dans plusieurs textes</text:span></text:p>
              </text:list-item>
              <text:list-item>
                <text:p text:style-name="P6"><text:span text:style-name="T2">Mettre en relation (comparer), pas résumer</text:span></text:p>
              </text:list-item>
              <text:list-item>
                <text:p text:style-name="P6"><text:span text:style-name="T2">Citer avec précision un extrait du domaine public</text:span></text:p>
              </text:list-item>
              <text:list-item>
                <text:p text:style-name="P6"><text:span text:style-name="T2">Rédiger une synthèse comparative (~450 mots)</text:span></text:p>
              </text:list-item>
              <text:list-item>
                <text:p text:style-name="P6"><text:span text:style-name="T2">Relire et améliorer avec connecteurs et nominalis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aïma : « Une pile de fiches sans fil conducteur. » Yusuf : « Une synthèse, c’est une carte : un thème, plusieurs auteurs. »</text:span></text:p>
            <text:p text:style-name="P3"><text:span text:style-name="T2">Exemple : la révolte est poétique chez Rimbaud, sociale chez Hugo.</text:span></text:p>
            <text:p text:style-name="P3"><text:span text:style-name="T2">→ </text:span><text:span text:style-name="T2">On part d’une question, pas d’une lis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thème vous a marqué·e cette année ?</text:span></text:p>
              </text:list-item>
              <text:list-item>
                <text:p text:style-name="P6"><text:span text:style-name="T2">Deux textes qui parlent du même thème ?</text:span></text:p>
              </text:list-item>
              <text:list-item>
                <text:p text:style-name="P6"><text:span text:style-name="T2">« Une synthèse, ce n’est pas ______, c’est ______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thème / un motif</text:span></text:p>
              </text:list-item>
              <text:list-item>
                <text:p text:style-name="P6"><text:span text:style-name="T2">mettre en relation, confronter</text:span></text:p>
              </text:list-item>
              <text:list-item>
                <text:p text:style-name="P6"><text:span text:style-name="T2">une problématique</text:span></text:p>
              </text:list-item>
              <text:list-item>
                <text:p text:style-name="P6"><text:span text:style-name="T2">un registre, un procédé stylistique</text:span></text:p>
              </text:list-item>
              <text:list-item>
                <text:p text:style-name="P6"><text:span text:style-name="T2">étayer une idée par une citation</text:span></text:p>
              </text:list-item>
              <text:list-item>
                <text:p text:style-name="P6"><text:span text:style-name="T2">en somme, en définitiv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necteurs : d’abord, ensuite · en revanche, tandis que · de même, comme · ainsi, en somme</text:span></text:p>
            <text:p text:style-name="P3"><text:span text:style-name="T2">Nominalisation : - se révolter → la révolte - se souvenir → le travail de la mémoi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-modèle : « La révolte, du poème à la barricad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-modèle : « La révolte, du poème à la barricade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imbaud : révolte de la </text:span><text:span text:style-name="T3">langue</text:span><text:span text:style-name="T2"> (« Je est un autre », 1871)</text:span></text:p>
              </text:list-item>
              <text:list-item>
                <text:p text:style-name="P6"><text:span text:style-name="T2">Hugo &amp; Zola : révolte de la </text:span><text:span text:style-name="T3">cité</text:span><text:span text:style-name="T2"> (</text:span><text:span text:style-name="T4">Les Misérables</text:span><text:span text:style-name="T2"> 1862 ; « J’accuse… ! » 1898)</text:span></text:p>
              </text:list-item>
              <text:list-item>
                <text:p text:style-name="P6"><text:span text:style-name="T2">Baudelaire : révolte du </text:span><text:span text:style-name="T3">regard</text:span><text:span text:style-name="T2"> (</text:span><text:span text:style-name="T4">Les Fleurs du mal</text:span><text:span text:style-name="T2">, 1857)</text:span></text:p>
              </text:list-item>
            </text:list>
            <text:p text:style-name="P3"><text:span text:style-name="T2">En somme : un thème, trois gestes distinct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1857, la littérature en procè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1857, la littérature en procè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Madame Bovary</text:span><text:span text:style-name="T2"> (Flaubert) : jugé, </text:span><text:span text:style-name="T3">acquitté</text:span></text:p>
              </text:list-item>
              <text:list-item>
                <text:p text:style-name="P6"><text:span text:style-name="T4">Les Fleurs du mal</text:span><text:span text:style-name="T2"> (Baudelaire) : </text:span><text:span text:style-name="T3">condamné</text:span><text:span text:style-name="T2">, six poèmes censurés</text:span></text:p>
              </text:list-item>
              <text:list-item>
                <text:p text:style-name="P6"><text:span text:style-name="T2">Interdiction levée seulement en </text:span><text:span text:style-name="T3">1949</text:span></text:p>
              </text:list-item>
            </text:list>
            <text:p text:style-name="P3"><text:span text:style-name="T2">Source : Wikipédia, CC BY-SA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-modèle</text:span></text:p>
              </text:list-item>
              <text:list-item>
                <text:p text:style-name="P6"><text:span text:style-name="T2">Résumer ou synthétiser ?</text:span></text:p>
              </text:list-item>
              <text:list-item>
                <text:p text:style-name="P6"><text:span text:style-name="T2">Nominalisation</text:span></text:p>
              </text:list-item>
              <text:list-item>
                <text:p text:style-name="P6"><text:span text:style-name="T2">Connecteurs</text:span></text:p>
              </text:list-item>
            </text:list>
            <text:p text:style-name="P3"><text:span text:style-name="T2">Différenciation : G (ex. 1 + 4) · M (+ ex. 3) · E (les quatre + reformuler la thès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u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révolte ; la langue ; Hugo &amp; Zola ; la mélancolie juge le monde</text:span></text:p>
              </text:list-item>
              <text:list-item>
                <text:p text:style-name="P6"><text:span text:style-name="T2">Ex. 2 : (b) synthétise (oppose langue / société)</text:span></text:p>
              </text:list-item>
              <text:list-item>
                <text:p text:style-name="P6"><text:span text:style-name="T2">Ex. 3 : le refus… par le poète ; l’accusation… par Hugo ; le souvenir de l’enfance</text:span></text:p>
              </text:list-item>
              <text:list-item>
                <text:p text:style-name="P6"><text:span text:style-name="T2">Ex. 4 : D’abord / En revanche · de même · Ains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ynthèse comparative (~450 mots) : - une problématique - trois textes/auteurs, organisés par idées - citations du </text:span><text:span text:style-name="T3">domaine public</text:span><text:span text:style-name="T2"> uniquement - thèse personnelle + chu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oblématique posée ?</text:span></text:p>
              </text:list-item>
              <text:list-item>
                <text:p text:style-name="P6"><text:span text:style-name="T2">Comparaison, pas résumé ?</text:span></text:p>
              </text:list-item>
              <text:list-item>
                <text:p text:style-name="P6"><text:span text:style-name="T2">Citations exactes et du domaine public ?</text:span></text:p>
              </text:list-item>
              <text:list-item>
                <text:p text:style-name="P6"><text:span text:style-name="T2">Quatre connecteurs différents ?</text:span></text:p>
              </text:list-item>
              <text:list-item>
                <text:p text:style-name="P6"><text:span text:style-name="T2">Une thèse à moi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2 pts</text:span></text:p>
              </text:list-item>
              <text:list-item>
                <text:p text:style-name="P6"><text:span text:style-name="T2">Tâche 2 — Expression écrite (~450 mots) : 18 pts</text:span></text:p>
              </text:list-item>
            </text:list>
            <text:p text:style-name="P3"><text:span text:style-name="T2">Règle d’or : citer le domaine public ; référencer les auteurs contemporain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Les Fleurs du mal</text:span><text:span text:style-name="T2">, Wikipédia — CC BY-SA</text:span></text:p>
              </text:list-item>
              <text:list-item>
                <text:p text:style-name="P6"><text:span text:style-name="T4">Les Misérables</text:span><text:span text:style-name="T2">, Wikipédia — CC BY-SA</text:span></text:p>
              </text:list-item>
              <text:list-item>
                <text:p text:style-name="P6"><text:span text:style-name="T2">Baudelaire (1857), Hugo (1862), Rimbaud (1871), Zola (1898) — domaine public (Gallica / Wikisourc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36</meta:creation-date>
    <dc:date>2026-07-21T16:30:36</dc:date>
    <meta:document-statistic meta:object-count="189"/>
    <meta:generator>LibreOffice/24.2.7.2$Linux_X86_64 LibreOffice_project/420$Build-2</meta:generator>
  </office:meta>
</office:document-meta>
</file>