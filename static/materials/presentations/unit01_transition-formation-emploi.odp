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ransition formation / emploi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ransition formation / emploi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10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e petite annonce d’apprentissage</text:span></text:p>
              </text:list-item>
              <text:list-item>
                <text:p text:style-name="P6"><text:span text:style-name="T2">Repérer les arguments d’une lettre de candidature</text:span></text:p>
              </text:list-item>
              <text:list-item>
                <text:p text:style-name="P6"><text:span text:style-name="T2">Parler de mes projets (futur proche + verbes d’intention)</text:span></text:p>
              </text:list-item>
              <text:list-item>
                <text:p text:style-name="P6"><text:span text:style-name="T2">Rédiger une candidature spontanée (~180 mots)</text:span></text:p>
              </text:list-item>
              <text:list-item>
                <text:p text:style-name="P6"><text:span text:style-name="T2">Distinguer apprentissage, lycée pro, études, service civiqu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et Karim discutent après les cours :</text:span></text:p>
            <text:p text:style-name="P3"><text:span text:style-name="T2">« Tu sais déjà ce que tu vas faire après la 10e ? »</text:span></text:p>
            <text:p text:style-name="P3"><text:span text:style-name="T2">« Je pense faire un apprentissage. Et toi ? »</text:span></text:p>
            <text:p text:style-name="P3"><text:span text:style-name="T2">« Moi, j’aimerais continuer au lycée professionnel. »</text:span></text:p>
            <text:p text:style-name="P3"><text:span text:style-name="T2">→ </text:span><text:span text:style-name="T2">Et vous, quels sont vos projets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 voulez-vous faire après la classe de 10e ?</text:span></text:p>
              </text:list-item>
              <text:list-item>
                <text:p text:style-name="P6"><text:span text:style-name="T2">Connaissez-vous quelqu’un qui fait un apprentissage ?</text:span></text:p>
              </text:list-item>
              <text:list-item>
                <text:p text:style-name="P6"><text:span text:style-name="T2">Apprentissage ou lycée : quelle différence ?</text:span></text:p>
              </text:list-item>
              <text:list-item>
                <text:p text:style-name="P6"><text:span text:style-name="T2">Quels mots du monde du travail connaissez-vou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apprenti / une apprentie — Auszubildende</text:span></text:p>
              </text:list-item>
              <text:list-item>
                <text:p text:style-name="P6"><text:span text:style-name="T2">l’apprentissage — die Ausbildung</text:span></text:p>
              </text:list-item>
              <text:list-item>
                <text:p text:style-name="P6"><text:span text:style-name="T2">une candidature — eine Bewerbung</text:span></text:p>
              </text:list-item>
              <text:list-item>
                <text:p text:style-name="P6"><text:span text:style-name="T2">une petite annonce — eine Stellenanzeige</text:span></text:p>
              </text:list-item>
              <text:list-item>
                <text:p text:style-name="P6"><text:span text:style-name="T2">un entretien — ein Vorstellungsgespräch</text:span></text:p>
              </text:list-item>
              <text:list-item>
                <text:p text:style-name="P6"><text:span text:style-name="T2">un stage — ein Praktikum</text:span></text:p>
              </text:list-item>
              <text:list-item>
                <text:p text:style-name="P6"><text:span text:style-name="T2">le service civique — der Freiwilligendiens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parler de ses proje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parler de ses proje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Futur proche</text:span><text:span text:style-name="T2"> : </text:span><text:span text:style-name="T4">aller</text:span><text:span text:style-name="T2"> + infinitif → Je </text:span><text:span text:style-name="T3">vais faire</text:span><text:span text:style-name="T2"> un apprentissage.</text:span></text:p>
            <text:p text:style-name="P3"><text:span text:style-name="T3">Verbes d’intention</text:span><text:span text:style-name="T2"> + infinitif : - Je </text:span><text:span text:style-name="T3">voudrais</text:span><text:span text:style-name="T2"> / j’</text:span><text:span text:style-name="T3">aimerais</text:span><text:span text:style-name="T2"> … (souhait) - Je </text:span><text:span text:style-name="T3">compte</text:span><text:span text:style-name="T2"> / j’</text:span><text:span text:style-name="T3">ai l’intention de</text:span><text:span text:style-name="T2"> … (projet ferme) - Je </text:span><text:span text:style-name="T3">pense</text:span><text:span text:style-name="T2"> … (projet possible)</text:span></text:p>
            <text:p text:style-name="P3"><text:span text:style-name="T2">Le 2e verbe reste à l’infinitif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petite anno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petite anno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Boulangerie « Chez Hugo » — Karlsruhe</text:span></text:p>
            <text:p text:style-name="P3"><text:span text:style-name="T2">Recherche un(e) apprenti(e) boulanger(ère), rentrée 2026.</text:span></text:p>
            <text:list text:style-name="L3">
              <text:list-item>
                <text:p text:style-name="P3"><text:span text:style-name="T2">Durée : 3 ans (alternance)</text:span></text:p>
              </text:list-item>
              <text:list-item>
                <text:p text:style-name="P3"><text:span text:style-name="T2">Horaires : lundi–samedi, tôt le matin</text:span></text:p>
              </text:list-item>
              <text:list-item>
                <text:p text:style-name="P3"><text:span text:style-name="T2">Profil : motivé(e), ponctuel(le), esprit d’équipe</text:span></text:p>
              </text:list-item>
              <text:list-item>
                <text:p text:style-name="P3"><text:span text:style-name="T2">Un plus : un stage en boulangeri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lettre de candidatu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lettre de candidatu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Objet : candidature pour un apprentissage de boulangère</text:span></text:p>
            <text:list text:style-name="L3">
              <text:list-item>
                <text:p text:style-name="P3"><text:span text:style-name="T2">Introduction : je me présente, je dis pour quel poste</text:span></text:p>
              </text:list-item>
              <text:list-item>
                <text:p text:style-name="P3"><text:span text:style-name="T2">Corps : ma motivation + deux atouts (stage, qualités)</text:span></text:p>
              </text:list-item>
              <text:list-item>
                <text:p text:style-name="P3"><text:span text:style-name="T2">Conclusion : CV, entretien, formule de politesse, signat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’apprentissage en Fr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’apprentissage en Fr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’adresse surtout aux 16–30 ans</text:span></text:p>
              </text:list-item>
              <text:list-item>
                <text:p text:style-name="P6"><text:span text:style-name="T2">Repose sur l’</text:span><text:span text:style-name="T3">alternance</text:span><text:span text:style-name="T2"> : centre de formation (CFA) + entreprise</text:span></text:p>
              </text:list-item>
              <text:list-item>
                <text:p text:style-name="P6"><text:span text:style-name="T2">Vrai contrat de travail + salaire (% du SMIC)</text:span></text:p>
              </text:list-item>
              <text:list-item>
                <text:p text:style-name="P6"><text:span text:style-name="T2">Mène à des diplômes reconnus : CAP, Bac pro, BTS…</text:span></text:p>
              </text:list-item>
            </text:list>
            <text:p text:style-name="P3"><text:span text:style-name="T4">D’après Wikipédia (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écrite (annonce + lettre)</text:span></text:p>
              </text:list-item>
              <text:list-item>
                <text:p text:style-name="P6"><text:span text:style-name="T2">Ex. 2 — Vocabulaire (relier)</text:span></text:p>
              </text:list-item>
              <text:list-item>
                <text:p text:style-name="P6"><text:span text:style-name="T2">Ex. 3 — Futur proche</text:span></text:p>
              </text:list-item>
              <text:list-item>
                <text:p text:style-name="P6"><text:span text:style-name="T2">Ex. 4 — Mes projets (verbes d’intention)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Candidature spontanée (~180 mots)</text:span></text:p>
            <text:p text:style-name="P3"><text:span text:style-name="T2">En-tête et objet → introduction → corps (motivation + 2 atouts) → conclusion (CV, entretien, politesse, signature)</text:span></text:p>
            <text:p text:style-name="P3"><text:span text:style-name="T2">Critères : structure · arguments · langue · longueu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comprends une petite annonce</text:span></text:p>
              </text:list-item>
              <text:list-item>
                <text:p text:style-name="P6"><text:span text:style-name="T2">☐ </text:span><text:span text:style-name="T2">Je repère les arguments d’une lettre</text:span></text:p>
              </text:list-item>
              <text:list-item>
                <text:p text:style-name="P6"><text:span text:style-name="T2">☐ </text:span><text:span text:style-name="T2">J’emploie le futur proche et les verbes d’intention</text:span></text:p>
              </text:list-item>
              <text:list-item>
                <text:p text:style-name="P6"><text:span text:style-name="T2">☐ </text:span><text:span text:style-name="T2">Je rédige une candidature d’environ 180 mo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oir surveillé — 30 points</text:span></text:p>
            <text:list text:style-name="L3">
              <text:list-item>
                <text:p text:style-name="P3"><text:span text:style-name="T2">Tâche 1 : compréhension écrite — 10 P.</text:span></text:p>
              </text:list-item>
              <text:list-item>
                <text:p text:style-name="P3"><text:span text:style-name="T2">Tâche 2 : vocabulaire — 8 P.</text:span></text:p>
              </text:list-item>
              <text:list-item>
                <text:p text:style-name="P3"><text:span text:style-name="T2">Tâche 3 : expression écrite (~180 mots) — 12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Apprentissage en France » — Wikipédia (2026), CC BY-SA 4.0</text:span></text:p>
              </text:list-item>
              <text:list-item>
                <text:p text:style-name="P6"><text:span text:style-name="T2">« Service civique » — Wikipédia (2026), CC BY-SA 4.0</text:span></text:p>
              </text:list-item>
              <text:list-item>
                <text:p text:style-name="P6"><text:span text:style-name="T2">Textes (annonce, dialogue, lettre) originaux ; noms et adresses fictif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19</meta:creation-date>
    <dc:date>2026-07-21T15:46:19</dc:date>
    <meta:document-statistic meta:object-count="189"/>
    <meta:generator>LibreOffice/24.2.7.2$Linux_X86_64 LibreOffice_project/420$Build-2</meta:generator>
  </office:meta>
</office:document-meta>
</file>