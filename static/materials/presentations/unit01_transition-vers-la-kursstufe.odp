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italic" style:text-underline-style="none" fo:font-weight="bold" fo:background-color="transparent" style:font-size-asian="21pt" style:font-style-asian="italic" style:font-weight-asian="bold" style:font-size-complex="21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 — Transition vers le cycle termina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 — Transition vers le cycle termina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10 · Niveau E</text:span></text:p>
            <text:p text:style-name="P3"><text:span text:style-name="T2">Compréhension écrite · Expression écri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texte sur le cycle terminal (le </text:span><text:span text:style-name="T3">Kursstufe</text:span><text:span text:style-name="T2">)</text:span></text:p>
              </text:list-item>
              <text:list-item>
                <text:p text:style-name="P6"><text:span text:style-name="T2">Repérer l’essentiel d’un plan de travail</text:span></text:p>
              </text:list-item>
              <text:list-item>
                <text:p text:style-name="P6"><text:span text:style-name="T2">Exprimer ses objectifs au futur simple</text:span></text:p>
              </text:list-item>
              <text:list-item>
                <text:p text:style-name="P6"><text:span text:style-name="T2">Rédiger un court plan de travail (≈ 160 mots)</text:span></text:p>
              </text:list-item>
              <text:list-item>
                <text:p text:style-name="P6"><text:span text:style-name="T2">Réfléchir à ses stratégies d’apprentissag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Fin de la 10e. Anouk et Lucas devant le panneau d’affichage.</text:span></text:p>
            <text:list text:style-name="L3">
              <text:list-item>
                <text:p text:style-name="P3"><text:span text:style-name="T4">Lucas :</text:span><text:span text:style-name="T2"> « Je n’ai aucune méthode. Je révise tout la veille du contrôle. »</text:span></text:p>
              </text:list-item>
              <text:list-item>
                <text:p text:style-name="P3"><text:span text:style-name="T4">Anouk :</text:span><text:span text:style-name="T2"> « Je planifierai mes révisions et je me fixerai des objectifs clairs. »</text:span></text:p>
              </text:list-item>
            </text:list>
            <text:p text:style-name="P3"><text:span text:style-name="T2">→ </text:span><text:span text:style-name="T2">Quel changement les attend ? Quels objectifs se fixe Anouk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ment organisez-vous vos révisions aujourd’hui ?</text:span></text:p>
              </text:list-item>
              <text:list-item>
                <text:p text:style-name="P6"><text:span text:style-name="T2">Que veut dire « se fixer un objectif » ?</text:span></text:p>
              </text:list-item>
              <text:list-item>
                <text:p text:style-name="P6"><text:span text:style-name="T2">Qu’est-ce qui change entre la 10e et le cycle terminal ?</text:span></text:p>
              </text:list-item>
              <text:list-item>
                <text:p text:style-name="P6"><text:span text:style-name="T2">Trois mots français du travail scolaire que vous connaissez déjà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e fixer un objectif · planifier · réviser</text:span></text:p>
              </text:list-item>
              <text:list-item>
                <text:p text:style-name="P6"><text:span text:style-name="T2">gérer son temps · l’emploi du temps · l’échéance</text:span></text:p>
              </text:list-item>
              <text:list-item>
                <text:p text:style-name="P6"><text:span text:style-name="T2">prendre des notes · s’organiser · la méthode de travail</text:span></text:p>
              </text:list-item>
              <text:list-item>
                <text:p text:style-name="P6"><text:span text:style-name="T2">approfondir · viser · persévér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futur simple et le bu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futur simple et le bu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Futur simple :</text:span><text:span text:style-name="T2"> infinitif + -ai, -as, -a, -ons, -ez, -ont</text:span></text:p>
              </text:list-item>
              <text:list-item>
                <text:p text:style-name="P6"><text:span text:style-name="T4">Irréguliers :</text:span><text:span text:style-name="T2"> être → </text:span><text:span text:style-name="T3">serai</text:span><text:span text:style-name="T2"> · avoir → </text:span><text:span text:style-name="T3">aurai</text:span><text:span text:style-name="T2"> · aller → </text:span><text:span text:style-name="T3">irai</text:span><text:span text:style-name="T2"> · faire → </text:span><text:span text:style-name="T3">ferai</text:span></text:p>
              </text:list-item>
              <text:list-item>
                <text:p text:style-name="P6"><text:span text:style-name="T4">But :</text:span><text:span text:style-name="T2"> </text:span><text:span text:style-name="T3">pour</text:span><text:span text:style-name="T2"> / </text:span><text:span text:style-name="T3">afin de</text:span><text:span text:style-name="T2"> + infinitif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Je réviserai chaque jour </text:span><text:span text:style-name="T6">pour</text:span><text:span text:style-name="T5"> atteindre le B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carnet d’Anouk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carnet d’Anouk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À partir de septembre, tout changera. Je planifierai ma semaine, je réviserai un peu chaque jour et je prendrai des notes claires afin de gagner du temps. Mon objectif : atteindre le niveau B2. Je persévérerai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cycle terminal = </text:span><text:span text:style-name="T3">Kursstufe</text:span><text:span text:style-name="T2"> (les deux ans avant l’</text:span><text:span text:style-name="T3">Abitur</text:span><text:span text:style-name="T2">)</text:span></text:p>
              </text:list-item>
              <text:list-item>
                <text:p text:style-name="P6"><text:span text:style-name="T4">Cours d’approfondissement</text:span><text:span text:style-name="T2"> (</text:span><text:span text:style-name="T3">Leistungsfächer</text:span><text:span text:style-name="T2">) vs </text:span><text:span text:style-name="T4">cours de base</text:span><text:span text:style-name="T2"> (</text:span><text:span text:style-name="T3">Basisfächer</text:span><text:span text:style-name="T2">)</text:span></text:p>
              </text:list-item>
              <text:list-item>
                <text:p text:style-name="P6"><text:span text:style-name="T2">Plus d’autonomie et de planification → l’importance des méthodes de travail</text:span></text:p>
              </text:list-item>
            </text:list>
            <text:p text:style-name="P3"><text:span text:style-name="T3">(D’après Wikipédia, CC BY-SA — voir Source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Ex. 1 :</text:span><text:span text:style-name="T2"> compréhension du texte (4 questions)</text:span></text:p>
              </text:list-item>
              <text:list-item>
                <text:p text:style-name="P6"><text:span text:style-name="T4">Ex. 2 :</text:span><text:span text:style-name="T2"> vocabulaire à compléter</text:span></text:p>
              </text:list-item>
              <text:list-item>
                <text:p text:style-name="P6"><text:span text:style-name="T4">Ex. 3 :</text:span><text:span text:style-name="T2"> futur simple (planifier, réviser, être, persévérer)</text:span></text:p>
              </text:list-item>
              <text:list-item>
                <text:p text:style-name="P6"><text:span text:style-name="T4">Ex. 4 :</text:span><text:span text:style-name="T2"> exprimer le but (</text:span><text:span text:style-name="T3">pour / afin de</text:span><text:span text:style-name="T2"> + infinitif)</text:span></text:p>
              </text:list-item>
            </text:list>
            <text:p text:style-name="P3"><text:span text:style-name="T2">Différenciation : G (Ex. 1, 3) · M (Ex. 1-3) · E (les 4 + 2 phrases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Mon plan pour le cycle terminal</text:span><text:span text:style-name="T2"> (≈ 160 mots)</text:span></text:p>
            <text:list text:style-name="L3">
              <text:list-item>
                <text:p text:style-name="P3"><text:span text:style-name="T2">3 paragraphes : changements · organisation · objectif + moyens</text:span></text:p>
              </text:list-item>
              <text:list-item>
                <text:p text:style-name="P3"><text:span text:style-name="T2">≥ </text:span><text:span text:style-name="T2">5 mots de vocabulaire · ≥ 4 futurs simples · ≥ 2 tournures de bu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 texte sur le cycle terminal</text:span></text:p>
              </text:list-item>
              <text:list-item>
                <text:p text:style-name="P6"><text:span text:style-name="T2">Je connais ≥ 8 mots des stratégies d’apprentissage</text:span></text:p>
              </text:list-item>
              <text:list-item>
                <text:p text:style-name="P6"><text:span text:style-name="T2">Je forme le futur simple (même irrégulier)</text:span></text:p>
              </text:list-item>
              <text:list-item>
                <text:p text:style-name="P6"><text:span text:style-name="T2">J’exprime un but avec </text:span><text:span text:style-name="T3">pour / afin de</text:span></text:p>
              </text:list-item>
              <text:list-item>
                <text:p text:style-name="P6"><text:span text:style-name="T2">Je rédige un plan de travail personne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Tâche 1 :</text:span><text:span text:style-name="T2"> compréhension écrite — 10 pts</text:span></text:p>
              </text:list-item>
              <text:list-item>
                <text:p text:style-name="P6"><text:span text:style-name="T4">Tâche 2 :</text:span><text:span text:style-name="T2"> langue (futur + but) — 8 pts</text:span></text:p>
              </text:list-item>
              <text:list-item>
                <text:p text:style-name="P6"><text:span text:style-name="T4">Tâche 3 :</text:span><text:span text:style-name="T2"> expression écrite (≈ 160 mots) — 12 p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Gymnasiale Oberstufe</text:span><text:span text:style-name="T2"> — Wikipédia, CC BY-SA 4.0</text:span></text:p>
              </text:list-item>
              <text:list-item>
                <text:p text:style-name="P6"><text:span text:style-name="T3">Métacognition</text:span><text:span text:style-name="T2"> — Wikipédia, CC BY-SA 4.0</text:span></text:p>
              </text:list-item>
              <text:list-item>
                <text:p text:style-name="P6"><text:span text:style-name="T3">Bildungsplan BW — Französisch (Kursstufe)</text:span><text:span text:style-name="T2">, bildungsplaene-bw.d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8:24</meta:creation-date>
    <dc:date>2026-07-21T16:28:24</dc:date>
    <meta:document-statistic meta:object-count="185"/>
    <meta:generator>LibreOffice/24.2.7.2$Linux_X86_64 LibreOffice_project/420$Build-2</meta:generator>
  </office:meta>
</office:document-meta>
</file>