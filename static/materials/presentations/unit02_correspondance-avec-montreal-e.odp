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1.43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Correspondance avec Montréal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orrespondance avec Montréal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ité 2 · Parcours E · Classe 8 · Niveau E</text:span></text:p>
            <text:p text:style-name="P3"><text:span text:style-name="T2">Écrire un courriel amical au Québec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un courriel personnel du Québec</text:span></text:p>
              </text:list-item>
              <text:list-item>
                <text:p text:style-name="P6"><text:span text:style-name="T2">Rédiger un courriel amical (~150 mots)</text:span></text:p>
              </text:list-item>
              <text:list-item>
                <text:p text:style-name="P6"><text:span text:style-name="T2">Raconter au présent et au passé composé</text:span></text:p>
              </text:list-item>
              <text:list-item>
                <text:p text:style-name="P6"><text:span text:style-name="T2">Reconnaître quelques québécism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nouk reçoit un message de sa correspondante Inès, à Montréal :</text:span></text:p>
            <text:p text:style-name="P3"><text:span text:style-name="T3">« J’ai magasiné et j’ai trouvé une tuque super. Aujourd’hui, il fait frette ! »</text:span></text:p>
            <text:list text:style-name="L3">
              <text:list-item>
                <text:p text:style-name="P3"><text:span text:style-name="T2">Qui écrit à qui ?</text:span></text:p>
              </text:list-item>
              <text:list-item>
                <text:p text:style-name="P3"><text:span text:style-name="T2">Quels mots faut-il expliquer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Écrivez-vous des courriels ? À qui ?</text:span></text:p>
              </text:list-item>
              <text:list-item>
                <text:p text:style-name="P6"><text:span text:style-name="T2">Avez-vous déjà écrit en français ?</text:span></text:p>
              </text:list-item>
              <text:list-item>
                <text:p text:style-name="P6"><text:span text:style-name="T2">Quelles formules ouvrent et ferment un courriel ?</text:span></text:p>
              </text:list-item>
              <text:list-item>
                <text:p text:style-name="P6"><text:span text:style-name="T2">Connaissez-vous un mot « québécois »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5" draw:style-name="gr2" draw:layer="layout" svg:width="22.859cm" svg:height="5.009cm" svg:x="1.27cm" svg:y="3.31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4">Formule</text:span></text:p>
              </table:table-cell>
              <table:table-cell>
                <text:p text:style-name="P7"><text:span text:style-name="T4">Fonction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Salut !</text:span></text:p>
              </table:table-cell>
              <table:table-cell>
                <text:p text:style-name="P7"><text:span text:style-name="T5">salutation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5">Comment ça va ?</text:span></text:p>
              </table:table-cell>
              <table:table-cell>
                <text:p text:style-name="P7"><text:span text:style-name="T5">accroch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Devine quoi !</text:span></text:p>
              </table:table-cell>
              <table:table-cell>
                <text:p text:style-name="P7"><text:span text:style-name="T5">annoncer une nouvelle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5">Et toi ?</text:span></text:p>
              </table:table-cell>
              <table:table-cell>
                <text:p text:style-name="P7"><text:span text:style-name="T5">question en retour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Réponds-moi vite !</text:span></text:p>
              </table:table-cell>
              <table:table-cell>
                <text:p text:style-name="P7"><text:span text:style-name="T5">clôtur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ébécism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Québécism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magasiner</text:span><text:span text:style-name="T2"> = faire les magasins</text:span></text:p>
              </text:list-item>
              <text:list-item>
                <text:p text:style-name="P6"><text:span text:style-name="T3">une tuque</text:span><text:span text:style-name="T2"> = un bonnet</text:span></text:p>
              </text:list-item>
              <text:list-item>
                <text:p text:style-name="P6"><text:span text:style-name="T3">un dépanneur</text:span><text:span text:style-name="T2"> = une épicerie de quartier</text:span></text:p>
              </text:list-item>
              <text:list-item>
                <text:p text:style-name="P6"><text:span text:style-name="T3">jaser</text:span><text:span text:style-name="T2"> = bavarder</text:span></text:p>
              </text:list-item>
              <text:list-item>
                <text:p text:style-name="P6"><text:span text:style-name="T3">plate</text:span><text:span text:style-name="T2"> = ennuyeux</text:span></text:p>
              </text:list-item>
              <text:list-item>
                <text:p text:style-name="P6"><text:span text:style-name="T3">écœurant</text:span><text:span text:style-name="T2"> = génial (positif !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6">Présent</text:span><text:span text:style-name="T2"> = situation, habitude </text:span><text:span text:style-name="T3">Il fait froid. J’aime mon école.</text:span></text:p>
            <text:p text:style-name="P3"><text:span text:style-name="T6">Passé composé</text:span><text:span text:style-name="T2"> = fait récent, action terminée avoir / être + participe passé </text:span><text:span text:style-name="T3">J’ai magasiné. Je suis allée à Québec.</text:span></text:p>
            <text:p text:style-name="P3"><text:span text:style-name="T2">Avec </text:span><text:span text:style-name="T6">être</text:span><text:span text:style-name="T2">, le participe s’accorde : </text:span><text:span text:style-name="T3">Inès est allé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courriel d’Inè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e courriel d’Inè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Objet : des nouvelles de Montréal</text:span></text:p>
              </text:list-item>
              <text:list-item>
                <text:p text:style-name="P6"><text:span text:style-name="T2">Automne, il fait </text:span><text:span text:style-name="T3">frette</text:span></text:p>
              </text:list-item>
              <text:list-item>
                <text:p text:style-name="P6"><text:span text:style-name="T2">La semaine dernière : magasiner, tuque, jaser</text:span></text:p>
              </text:list-item>
              <text:list-item>
                <text:p text:style-name="P6"><text:span text:style-name="T2">Demain : visite à la grand-mère, à Québec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u Québec, le français est langue officielle</text:span></text:p>
              </text:list-item>
              <text:list-item>
                <text:p text:style-name="P6"><text:span text:style-name="T2">Charte de la langue française (1977)</text:span></text:p>
              </text:list-item>
              <text:list-item>
                <text:p text:style-name="P6"><text:span text:style-name="T2">Office québécois de la langue française</text:span></text:p>
              </text:list-item>
              <text:list-item>
                <text:p text:style-name="P6"><text:span text:style-name="T2">Vocabulaire propre : les « québécismes »</text:span></text:p>
              </text:list-item>
            </text:list>
            <text:p text:style-name="P3"><text:span text:style-name="T3">(D’après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du courriel</text:span></text:p>
              </text:list-item>
              <text:list-item>
                <text:p text:style-name="P6"><text:span text:style-name="T2">Ex. 2 : québécismes → français de France</text:span></text:p>
              </text:list-item>
              <text:list-item>
                <text:p text:style-name="P6"><text:span text:style-name="T2">Ex. 3 : présent ou passé composé ?</text:span></text:p>
              </text:list-item>
              <text:list-item>
                <text:p text:style-name="P6"><text:span text:style-name="T2">Ex. 4 : compléter au passé composé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Rédigez le courriel-réponse d’Anouk (~150 mots) :</text:span></text:p>
            <text:list text:style-name="L3">
              <text:list-item>
                <text:p text:style-name="P3"><text:span text:style-name="T2">salutation + accroche + clôture</text:span></text:p>
              </text:list-item>
              <text:list-item>
                <text:p text:style-name="P3"><text:span text:style-name="T2">3 nouvelles (2 au passé composé)</text:span></text:p>
              </text:list-item>
              <text:list-item>
                <text:p text:style-name="P3"><text:span text:style-name="T2">1 phrase au présent</text:span></text:p>
              </text:list-item>
              <text:list-item>
                <text:p text:style-name="P3"><text:span text:style-name="T2">1 question</text:span></text:p>
              </text:list-item>
              <text:list-item>
                <text:p text:style-name="P3"><text:span text:style-name="T2">2 québécism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comprends un courriel du Québec</text:span></text:p>
              </text:list-item>
              <text:list-item>
                <text:p text:style-name="P6"><text:span text:style-name="T2">Je rédige un courriel structuré</text:span></text:p>
              </text:list-item>
              <text:list-item>
                <text:p text:style-name="P6"><text:span text:style-name="T2">J’emploie le passé composé</text:span></text:p>
              </text:list-item>
              <text:list-item>
                <text:p text:style-name="P6"><text:span text:style-name="T2">J’utilise deux québécismes</text:span></text:p>
              </text:list-item>
              <text:list-item>
                <text:p text:style-name="P6"><text:span text:style-name="T2">J’explique une différence Québec / Franc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: compréhension écrite — 10 pts</text:span></text:p>
              </text:list-item>
              <text:list-item>
                <text:p text:style-name="P6"><text:span text:style-name="T2">Tâche 2 : vocabulaire et langue — 8 pts</text:span></text:p>
              </text:list-item>
              <text:list-item>
                <text:p text:style-name="P6"><text:span text:style-name="T2">Tâche 3 : expression écrite — 12 pts</text:span></text:p>
              </text:list-item>
            </text:list>
            <text:p text:style-name="P3"><text:span text:style-name="T6">Total : 30 p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Wikipédia, « Français québécois », CC BY-SA</text:span></text:p>
              </text:list-item>
              <text:list-item>
                <text:p text:style-name="P6"><text:span text:style-name="T2">Wikipédia, « Charte de la langue française », CC BY-SA</text:span></text:p>
              </text:list-item>
              <text:list-item>
                <text:p text:style-name="P6"><text:span text:style-name="T2">Vitrine linguistique de l’OQLF (référence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11:02</meta:creation-date>
    <dc:date>2026-07-21T16:11:02</dc:date>
    <meta:document-statistic meta:object-count="189"/>
    <meta:generator>LibreOffice/24.2.7.2$Linux_X86_64 LibreOffice_project/420$Build-2</meta:generator>
  </office:meta>
</office:document-meta>
</file>