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2 — Francophonie postcolonia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2 — Francophonie postcolonia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11 · Niveau E Langue, identité, représent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èle de la séanc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odèle de la séanc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Activer → Apporter → S’entraîner → Produire → Réfléchir Durée : 45 minute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prendre un texte argumentatif sur la langue française comme héritage</text:span></text:p>
              </text:list-item>
              <text:list-item>
                <text:p text:style-name="P6"><text:span text:style-name="T2">Repérer le lexique postcolonial (colonisation, identité, représentation)</text:span></text:p>
              </text:list-item>
              <text:list-item>
                <text:p text:style-name="P6"><text:span text:style-name="T2">Analyser un document et interpréter un chiffre cité</text:span></text:p>
              </text:list-item>
              <text:list-item>
                <text:p text:style-name="P6"><text:span text:style-name="T2">Prendre position de façon nuancée, à l’écri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evant la carte « Le français dans le monde » : - Léa : on parle français au Sénégal, au Maroc, en Haïti, au Québec… - Malik : le français est souvent arrivé avec la colonisation - Léa : alors pourquoi tant d’auteurs le choisissent-ils ? - Malik : héritage imposé ET outil réapproprié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rois pays francophones hors d’Europe ?</text:span></text:p>
              </text:list-item>
              <text:list-item>
                <text:p text:style-name="P6"><text:span text:style-name="T2">Colonial / postcolonial : quelle différence ?</text:span></text:p>
              </text:list-item>
              <text:list-item>
                <text:p text:style-name="P6"><text:span text:style-name="T2">« Une langue appartient à ceux qui la parlent » : d’accord ?</text:span></text:p>
              </text:list-item>
              <text:list-item>
                <text:p text:style-name="P6"><text:span text:style-name="T2">Écrire dans la langue du colonisateur : trahison, nécessité ou liberté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lonisation / décolonisation</text:span></text:p>
              </text:list-item>
              <text:list-item>
                <text:p text:style-name="P6"><text:span text:style-name="T2">héritage · se réapproprier</text:span></text:p>
              </text:list-item>
              <text:list-item>
                <text:p text:style-name="P6"><text:span text:style-name="T2">identité · représentation</text:span></text:p>
              </text:list-item>
              <text:list-item>
                <text:p text:style-name="P6"><text:span text:style-name="T2">francophonie · métissage</text:span></text:p>
              </text:list-item>
              <text:list-item>
                <text:p text:style-name="P6"><text:span text:style-name="T2">ambivalent·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Point de lang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Point de langu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Opposition :</text:span><text:span text:style-name="T2"> mais, alors que, en revanche </text:span><text:span text:style-name="T3">Concession :</text:span><text:span text:style-name="T2"> - bien que / quoique + subjonctif - malgré + nom - pourtant, cependant, néanmoins</text:span></text:p>
            <text:p text:style-name="P3"><text:span text:style-name="T2">Structure la dissertation : thèse → antithèse → synthès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Texte « Une langue, deux visages »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Texte « Une langue, deux visages »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e français : aussi une trace de l’histoire coloniale</text:span></text:p>
              </text:list-item>
              <text:list-item>
                <text:p text:style-name="P6"><text:span text:style-name="T2">Arrivé par l’école coloniale, langue du pouvoir</text:span></text:p>
              </text:list-item>
              <text:list-item>
                <text:p text:style-name="P6"><text:span text:style-name="T2">Et pourtant : gardé par choix après les indépendances</text:span></text:p>
              </text:list-item>
              <text:list-item>
                <text:p text:style-name="P6"><text:span text:style-name="T2">La langue de la domination devient langue de la critique</text:span></text:p>
              </text:list-item>
              <text:list-item>
                <text:p text:style-name="P6"><text:span text:style-name="T2">Héritage ambivalent : imposé ET réapproprié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Note culturelle (source ouverte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Note culturelle (source ouverte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OIF créée en 1970 · ~88 États et gouvernements</text:span></text:p>
              </text:list-item>
              <text:list-item>
                <text:p text:style-name="P6"><text:span text:style-name="T2">Français : plus de 300 millions de locuteurs, part croissante en Afrique</text:span></text:p>
              </text:list-item>
              <text:list-item>
                <text:p text:style-name="P6"><text:span text:style-name="T2">Négritude (années 1930) : valeur des cultures noires</text:span></text:p>
              </text:list-item>
              <text:list-item>
                <text:p text:style-name="P6"><text:span text:style-name="T2">Créolité : métissage et langues créoles</text:span></text:p>
              </text:list-item>
              <text:list-item>
                <text:p text:style-name="P6"><text:span text:style-name="T2">Source : Wikipédia, CC BY-SA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4">
              <text:list-item>
                <text:p text:style-name="P6"><text:span text:style-name="T2">Compréhension écrite (texte)</text:span></text:p>
              </text:list-item>
              <text:list-item>
                <text:p text:style-name="P6"><text:span text:style-name="T2">Vocabulaire à compléter</text:span></text:p>
              </text:list-item>
              <text:list-item>
                <text:p text:style-name="P6"><text:span text:style-name="T2">Opposition / concession</text:span></text:p>
              </text:list-item>
              <text:list-item>
                <text:p text:style-name="P6"><text:span text:style-name="T2">Compétence médiatique : lire un chiffre et sa source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rise de position (~250-300 mots) « Langue française : héritage subi ou choix libre ? » - 4 paragraphes : intro · thèse · antithèse · synthèse - 3 mots du vocabulaire + 2 connecteurs - reformuler une idée du text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’explique l’« héritage ambivalent »</text:span></text:p>
              </text:list-item>
              <text:list-item>
                <text:p text:style-name="P6"><text:span text:style-name="T2">J’utilise cinq mots du champ postcolonial</text:span></text:p>
              </text:list-item>
              <text:list-item>
                <text:p text:style-name="P6"><text:span text:style-name="T2">J’exprime l’opposition et la concession</text:span></text:p>
              </text:list-item>
              <text:list-item>
                <text:p text:style-name="P6"><text:span text:style-name="T2">Je cite mes sources et je paraphras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(30 P.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(30 P.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Compréhension écrite (10 P.)</text:span></text:p>
              </text:list-item>
              <text:list-item>
                <text:p text:style-name="P6"><text:span text:style-name="T2">Tâche 2 — Compétence textuelle et médiatique (10 P.)</text:span></text:p>
              </text:list-item>
              <text:list-item>
                <text:p text:style-name="P6"><text:span text:style-name="T2">Tâche 3 — Prise de position (10 P.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OIF — Wikipédia, CC BY-SA 4.0</text:span></text:p>
              </text:list-item>
              <text:list-item>
                <text:p text:style-name="P6"><text:span text:style-name="T2">Négritude — Wikipédia, CC BY-SA 4.0</text:span></text:p>
              </text:list-item>
              <text:list-item>
                <text:p text:style-name="P6"><text:span text:style-name="T2">Créolité — Wikipédia, CC BY-SA 4.0</text:span></text:p>
              </text:list-item>
              <text:list-item>
                <text:p text:style-name="P6"><text:span text:style-name="T2">Littérature postcoloniale — Wikipédia, CC BY-SA 4.0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29:24</meta:creation-date>
    <dc:date>2026-07-21T16:29:24</dc:date>
    <meta:document-statistic meta:object-count="189"/>
    <meta:generator>LibreOffice/24.2.7.2$Linux_X86_64 LibreOffice_project/420$Build-2</meta:generator>
  </office:meta>
</office:document-meta>
</file>