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2 — Lettre de motiv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2 — Lettre de motiv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9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édiger une lettre de motivation (~180 mots) au format français</text:span></text:p>
              </text:list-item>
              <text:list-item>
                <text:p text:style-name="P6"><text:span text:style-name="T2">Structurer en trois paragraphes « Vous – Moi – Nous »</text:span></text:p>
              </text:list-item>
              <text:list-item>
                <text:p text:style-name="P6"><text:span text:style-name="T2">Employer les formules de politesse</text:span></text:p>
              </text:list-item>
              <text:list-item>
                <text:p text:style-name="P6"><text:span text:style-name="T2">Utiliser le conditionnel de politesse</text:span></text:p>
              </text:list-item>
              <text:list-item>
                <text:p text:style-name="P6"><text:span text:style-name="T2">Relire et corriger avec une gril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nouk : « Salut, je voudrais un stage ! » — est-ce correct ?</text:span></text:p>
            <text:p text:style-name="P3"><text:span text:style-name="T2">M. Klein : Une candidature relève du registre </text:span><text:span text:style-name="T3">formel</text:span><text:span text:style-name="T2">.</text:span></text:p>
            <text:list text:style-name="L3">
              <text:list-item>
                <text:p text:style-name="P3"><text:span text:style-name="T2">On écrit </text:span><text:span text:style-name="T4">Madame, Monsieur,</text:span><text:span text:style-name="T2"> — jamais « Salut »</text:span></text:p>
              </text:list-item>
              <text:list-item>
                <text:p text:style-name="P3"><text:span text:style-name="T2">La clôture française est plus longue qu’en allemand</text:span></text:p>
              </text:list-item>
              <text:list-item>
                <text:p text:style-name="P3"><text:span text:style-name="T2">La forme compte autant que le conten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Avez-vous déjà écrit une lettre formelle ?</text:span></text:p>
              </text:list-item>
              <text:list-item>
                <text:p text:style-name="P6"><text:span text:style-name="T2">Que doit contenir une bonne candidature ?</text:span></text:p>
              </text:list-item>
              <text:list-item>
                <text:p text:style-name="P6"><text:span text:style-name="T2">Vouvoiement ou tutoiement ?</text:span></text:p>
              </text:list-item>
              <text:list-item>
                <text:p text:style-name="P6"><text:span text:style-name="T2">Que met-on en haut d’une lettr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lettre de motivation · das Motivationsschreiben</text:span></text:p>
              </text:list-item>
              <text:list-item>
                <text:p text:style-name="P6"><text:span text:style-name="T2">un stage (d’observation) · das Praktikum</text:span></text:p>
              </text:list-item>
              <text:list-item>
                <text:p text:style-name="P6"><text:span text:style-name="T2">une candidature · die Bewerbung</text:span></text:p>
              </text:list-item>
              <text:list-item>
                <text:p text:style-name="P6"><text:span text:style-name="T2">la formule d’appel / de clôture · Anrede / Grußformel</text:span></text:p>
              </text:list-item>
              <text:list-item>
                <text:p text:style-name="P6"><text:span text:style-name="T2">effectuer un stage · ein Praktikum mache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 conditionnel de politess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 conditionnel de politess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Je </text:span><text:span text:style-name="T5">voudrais</text:span><text:span text:style-name="T4"> effectuer un stage.</text:span></text:p>
              </text:list-item>
              <text:list-item>
                <text:p text:style-name="P6"><text:span text:style-name="T4">J’</text:span><text:span text:style-name="T5">aimerais</text:span><text:span text:style-name="T4"> découvrir votre métier.</text:span></text:p>
              </text:list-item>
              <text:list-item>
                <text:p text:style-name="P6"><text:span text:style-name="T4">Je </text:span><text:span text:style-name="T5">souhaiterais</text:span><text:span text:style-name="T4"> vous rencontrer.</text:span></text:p>
              </text:list-item>
              <text:list-item>
                <text:p text:style-name="P6"><text:span text:style-name="T4">Je </text:span><text:span text:style-name="T5">serais</text:span><text:span text:style-name="T4"> heureuse de contribuer.</text:span></text:p>
              </text:list-item>
            </text:list>
            <text:p text:style-name="P3"><text:span text:style-name="T2">Radical du futur + terminaisons de l’imparfai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structure « Vous – Moi – Nous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a structure « Vous – Moi – Nous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3">Vous</text:span><text:span text:style-name="T2"> — pourquoi cette entreprise ?</text:span></text:p>
              </text:list-item>
              <text:list-item>
                <text:p text:style-name="P6"><text:span text:style-name="T3">Moi</text:span><text:span text:style-name="T2"> — mon parcours, mes atouts</text:span></text:p>
              </text:list-item>
              <text:list-item>
                <text:p text:style-name="P6"><text:span text:style-name="T3">Nous</text:span><text:span text:style-name="T2"> — ce que j’apporte + demande d’entretien</text:span></text:p>
              </text:list-item>
            </text:list>
            <text:p text:style-name="P3"><text:span text:style-name="T2">En-tête · date · objet · formule d’appel · corps · clôture · signatur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lettre de motivation accompagne le CV</text:span></text:p>
              </text:list-item>
              <text:list-item>
                <text:p text:style-name="P6"><text:span text:style-name="T2">Elle expose les raisons de la candidature</text:span></text:p>
              </text:list-item>
              <text:list-item>
                <text:p text:style-name="P6"><text:span text:style-name="T2">Longtemps manuscrite, aujourd’hui souvent dactylographiée</text:span></text:p>
              </text:list-item>
              <text:list-item>
                <text:p text:style-name="P6"><text:span text:style-name="T2">Registre soutenu, mise en page soignée</text:span></text:p>
              </text:list-item>
            </text:list>
            <text:p text:style-name="P3"><text:span text:style-name="T4">(D’après Wikipédia, CC BY-SA 4.0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écrite (lettre d’Anouk)</text:span></text:p>
              </text:list-item>
              <text:list-item>
                <text:p text:style-name="P6"><text:span text:style-name="T2">Registre : approprié ou inapproprié ?</text:span></text:p>
              </text:list-item>
              <text:list-item>
                <text:p text:style-name="P6"><text:span text:style-name="T2">Conditionnel de politesse : reformuler</text:span></text:p>
              </text:list-item>
              <text:list-item>
                <text:p text:style-name="P6"><text:span text:style-name="T2">Remise en ordre des éléments d’une lettre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édigez </text:span><text:span text:style-name="T3">votre lettre de motivation</text:span><text:span text:style-name="T2"> (~180 mots) :</text:span></text:p>
            <text:list text:style-name="L3">
              <text:list-item>
                <text:p text:style-name="P3"><text:span text:style-name="T2">en-tête complet + objet</text:span></text:p>
              </text:list-item>
              <text:list-item>
                <text:p text:style-name="P3"><text:span text:style-name="T2">formule d’appel et de clôture</text:span></text:p>
              </text:list-item>
              <text:list-item>
                <text:p text:style-name="P3"><text:span text:style-name="T2">trois paragraphes « Vous – Moi – Nous »</text:span></text:p>
              </text:list-item>
              <text:list-item>
                <text:p text:style-name="P3"><text:span text:style-name="T2">trois conditionnels de polites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n-tête complet ?</text:span></text:p>
              </text:list-item>
              <text:list-item>
                <text:p text:style-name="P6"><text:span text:style-name="T2">Structure en trois paragraphes ?</text:span></text:p>
              </text:list-item>
              <text:list-item>
                <text:p text:style-name="P6"><text:span text:style-name="T2">Formules d’appel et de clôture ?</text:span></text:p>
              </text:list-item>
              <text:list-item>
                <text:p text:style-name="P6"><text:span text:style-name="T2">Vouvoiement partout ?</text:span></text:p>
              </text:list-item>
              <text:list-item>
                <text:p text:style-name="P6"><text:span text:style-name="T2">Trois conditionnels de politesse ?</text:span></text:p>
              </text:list-item>
              <text:list-item>
                <text:p text:style-name="P6"><text:span text:style-name="T2">Relecture fait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· 30 poi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· 30 poi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écrite : 8 pts</text:span></text:p>
              </text:list-item>
              <text:list-item>
                <text:p text:style-name="P6"><text:span text:style-name="T2">Tâche 2 — Registre et formules : 10 pts</text:span></text:p>
              </text:list-item>
              <text:list-item>
                <text:p text:style-name="P6"><text:span text:style-name="T2">Tâche 3 — Expression écrite (~180 mots) : 12 p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ièges fréque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ièges fréque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Madame, Monsieur,</text:span><text:span text:style-name="T2"> — virgule + majuscule au mot suivant</text:span></text:p>
              </text:list-item>
              <text:list-item>
                <text:p text:style-name="P6"><text:span text:style-name="T4">Veuillez agréer</text:span><text:span text:style-name="T2"> — impératif, pas conditionnel</text:span></text:p>
              </text:list-item>
              <text:list-item>
                <text:p text:style-name="P6"><text:span text:style-name="T2">Date : </text:span><text:span text:style-name="T4">Karlsruhe, le 12 octobre 2026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Lettre de motivation</text:span><text:span text:style-name="T2"> — Wikipédia, CC BY-SA 4.0</text:span></text:p>
              </text:list-item>
              <text:list-item>
                <text:p text:style-name="P6"><text:span text:style-name="T4">Curriculum vitæ</text:span><text:span text:style-name="T2"> — Wikipédia, CC BY-SA 4.0</text:span></text:p>
              </text:list-item>
            </text:list>
            <text:p text:style-name="P3"><text:span text:style-name="T2">Plateforme indépendante, sans affiliatio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6:03</meta:creation-date>
    <dc:date>2026-07-21T16:16:03</dc:date>
    <meta:document-statistic meta:object-count="189"/>
    <meta:generator>LibreOffice/24.2.7.2$Linux_X86_64 LibreOffice_project/420$Build-2</meta:generator>
  </office:meta>
</office:document-meta>
</file>