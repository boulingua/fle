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Lettre de motiv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ttre de motiv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2 · Parcours G+M · Classe 9 · Niveau M</text:span></text:p>
            <text:p text:style-name="P3"><text:span text:style-name="T2">Rédiger une lettre formelle pour un st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édiger une lettre de motivation pour un stage</text:span></text:p>
              </text:list-item>
              <text:list-item>
                <text:p text:style-name="P6"><text:span text:style-name="T2">Respecter la structure formelle</text:span></text:p>
              </text:list-item>
              <text:list-item>
                <text:p text:style-name="P6"><text:span text:style-name="T2">Employer le registre formel et les formules de politesse</text:span></text:p>
              </text:list-item>
              <text:list-item>
                <text:p text:style-name="P6"><text:span text:style-name="T2">Se présenter en trois paragraphes</text:span></text:p>
              </text:list-item>
              <text:list-item>
                <text:p text:style-name="P6"><text:span text:style-name="T2">Relire et corriger sa lett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Léa :</text:span><text:span text:style-name="T2"> </text:span><text:span text:style-name="T4">« Salut, je veux faire un stage chez vous. Répondez vite ! »</text:span></text:p>
            <text:p text:style-name="P3"><text:span text:style-name="T3">Mme Renault :</text:span><text:span text:style-name="T2"> C’est bon pour un ami… mais une lettre de motivation est un document formel !</text:span></text:p>
            <text:list text:style-name="L3">
              <text:list-item>
                <text:p text:style-name="P3"><text:span text:style-name="T2">On écrit </text:span><text:span text:style-name="T4">« Madame, Monsieur, »</text:span><text:span text:style-name="T2">, pas </text:span><text:span text:style-name="T4">« Salut »</text:span></text:p>
              </text:list-item>
              <text:list-item>
                <text:p text:style-name="P3"><text:span text:style-name="T2">On finit par </text:span><text:span text:style-name="T4">« Je vous prie d’agréer… »</text:span><text:span text:style-name="T2">, pas </text:span><text:span text:style-name="T4">« Bisous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ez-vous déjà écrit une lettre formelle ?</text:span></text:p>
              </text:list-item>
              <text:list-item>
                <text:p text:style-name="P6"><text:span text:style-name="T2">Message à un ami vs. lettre à une entreprise : quelles différences ?</text:span></text:p>
              </text:list-item>
              <text:list-item>
                <text:p text:style-name="P6"><text:span text:style-name="T2">Pourquoi </text:span><text:span text:style-name="T4">« Madame, Monsieur »</text:span><text:span text:style-name="T2"> ?</text:span></text:p>
              </text:list-item>
              <text:list-item>
                <text:p text:style-name="P6"><text:span text:style-name="T2">Comment finit-on une lettre formelle en allemand ? en françai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lettre de motivation — das Motivationsschreiben</text:span></text:p>
              </text:list-item>
              <text:list-item>
                <text:p text:style-name="P6"><text:span text:style-name="T2">un stage — das Praktikum</text:span></text:p>
              </text:list-item>
              <text:list-item>
                <text:p text:style-name="P6"><text:span text:style-name="T2">solliciter — beantragen, sich bewerben um</text:span></text:p>
              </text:list-item>
              <text:list-item>
                <text:p text:style-name="P6"><text:span text:style-name="T2">l’objet — der Betreff</text:span></text:p>
              </text:list-item>
              <text:list-item>
                <text:p text:style-name="P6"><text:span text:style-name="T2">la formule de politesse — die Höflichkeitsformel</text:span></text:p>
              </text:list-item>
              <text:list-item>
                <text:p text:style-name="P6"><text:span text:style-name="T2">ci-joint — anbei, beigefüg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registre forme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registre forme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n </text:span><text:span text:style-name="T3">vouvoie</text:span><text:span text:style-name="T2"> toujours : </text:span><text:span text:style-name="T4">vous</text:span><text:span text:style-name="T2">, jamais </text:span><text:span text:style-name="T4">tu</text:span></text:p>
              </text:list-item>
              <text:list-item>
                <text:p text:style-name="P6"><text:span text:style-name="T2">Pas de mots familiers : </text:span><text:span text:style-name="T4">salut → Madame, Monsieur</text:span></text:p>
              </text:list-item>
              <text:list-item>
                <text:p text:style-name="P6"><text:span text:style-name="T2">Verbes soutenus : </text:span><text:span text:style-name="T4">solliciter</text:span><text:span text:style-name="T2">, </text:span><text:span text:style-name="T4">se permettre de</text:span><text:span text:style-name="T2">, </text:span><text:span text:style-name="T4">joindre</text:span></text:p>
              </text:list-item>
              <text:list-item>
                <text:p text:style-name="P6"><text:span text:style-name="T2">Formule finale à mémoriser : </text:span><text:span text:style-name="T4">« Je vous prie d’agréer, Madame, Monsieur, mes salutations distinguées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structure — 8 éléme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structure — 8 éléme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Vos coordonnées (haut gauche)</text:span></text:p>
              </text:list-item>
              <text:list-item>
                <text:p text:style-name="P6"><text:span text:style-name="T2">Lieu et date (haut droite)</text:span></text:p>
              </text:list-item>
              <text:list-item>
                <text:p text:style-name="P6"><text:span text:style-name="T2">Le destinataire</text:span></text:p>
              </text:list-item>
              <text:list-item>
                <text:p text:style-name="P6"><text:span text:style-name="T2">L’objet</text:span></text:p>
              </text:list-item>
              <text:list-item>
                <text:p text:style-name="P6"><text:span text:style-name="T2">La salutation</text:span></text:p>
              </text:list-item>
              <text:list-item>
                <text:p text:style-name="P6"><text:span text:style-name="T2">Le corps (3 paragraphes)</text:span></text:p>
              </text:list-item>
              <text:list-item>
                <text:p text:style-name="P6"><text:span text:style-name="T2">La formule finale</text:span></text:p>
              </text:list-item>
              <text:list-item>
                <text:p text:style-name="P6"><text:span text:style-name="T2">La signatu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tre modè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ttre modè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Objet : demande de stage (une semaine)</text:span></text:p>
            <text:p text:style-name="P3"><text:span text:style-name="T2">Madame, Monsieur,</text:span></text:p>
            <text:p text:style-name="P3"><text:span text:style-name="T2">Je me permets de vous écrire pour solliciter un stage d’une semaine dans votre librairie…</text:span></text:p>
            <text:p text:style-name="P3"><text:span text:style-name="T2">Actuellement en classe de 9e, je suis passionnée par la lecture et les langues…</text:span></text:p>
            <text:p text:style-name="P3"><text:span text:style-name="T2">Je vous prie d’agréer, Madame, Monsieur, mes salutations distinguée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n France, la lettre accompagne le CV</text:span></text:p>
              </text:list-item>
              <text:list-item>
                <text:p text:style-name="P6"><text:span text:style-name="T2">Autrefois souvent manuscrite ; aujourd’hui tapée</text:span></text:p>
              </text:list-item>
              <text:list-item>
                <text:p text:style-name="P6"><text:span text:style-name="T2">La formule de clôture française est plus longue que </text:span><text:span text:style-name="T4">« Mit freundlichen Grüßen »</text:span></text:p>
              </text:list-item>
            </text:list>
            <text:p text:style-name="P3"><text:span text:style-name="T4">(Paraphrase —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Repérer la structure</text:span></text:p>
              </text:list-item>
              <text:list-item>
                <text:p text:style-name="P6"><text:span text:style-name="T2">Ex. 2 — Choisir le registre formel</text:span></text:p>
              </text:list-item>
              <text:list-item>
                <text:p text:style-name="P6"><text:span text:style-name="T2">Ex. 3 — Compléter la lettre</text:span></text:p>
              </text:list-item>
              <text:list-item>
                <text:p text:style-name="P6"><text:span text:style-name="T2">Ex. 4 — Remettre les 8 éléments dans l’ordre</text:span></text:p>
              </text:list-item>
            </text:list>
            <text:p text:style-name="P3"><text:span text:style-name="T3">Différenciation :</text:span><text:span text:style-name="T2"> G → Ex. 1-2 · M → Ex. 1-4 · E → Ex. 3 sans liste + phrase personnell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Votre lettre de motivation (~150 mots)</text:span></text:p>
            <text:list text:style-name="L3">
              <text:list-item>
                <text:p text:style-name="P3"><text:span text:style-name="T2">Stage d’une semaine, entreprise au choix</text:span></text:p>
              </text:list-item>
              <text:list-item>
                <text:p text:style-name="P3"><text:span text:style-name="T2">Respecter les 8 éléments</text:span></text:p>
              </text:list-item>
              <text:list-item>
                <text:p text:style-name="P3"><text:span text:style-name="T2">Employer au moins 3 formules</text:span></text:p>
              </text:list-item>
            </text:list>
            <text:p text:style-name="P3"><text:span text:style-name="T3">Critères :</text:span><text:span text:style-name="T2"> structure · registre formel · formules · contenu · lang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connais les 8 éléments</text:span></text:p>
              </text:list-item>
              <text:list-item>
                <text:p text:style-name="P6"><text:span text:style-name="T2">☐ </text:span><text:span text:style-name="T2">J’utilise le vouvoiement</text:span></text:p>
              </text:list-item>
              <text:list-item>
                <text:p text:style-name="P6"><text:span text:style-name="T2">☐ </text:span><text:span text:style-name="T2">J’emploie 3 formules de politesse</text:span></text:p>
              </text:list-item>
              <text:list-item>
                <text:p text:style-name="P6"><text:span text:style-name="T2">☐ </text:span><text:span text:style-name="T2">Mon corps a 3 paragraphes</text:span></text:p>
              </text:list-item>
              <text:list-item>
                <text:p text:style-name="P6"><text:span text:style-name="T2">☐ </text:span><text:span text:style-name="T2">J’ai corrigé les mots familier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Klassenarbei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Klassenarbei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du modèle (8 P.)</text:span></text:p>
              </text:list-item>
              <text:list-item>
                <text:p text:style-name="P6"><text:span text:style-name="T2">Tâche 2 — Registre et formules (10 P.)</text:span></text:p>
              </text:list-item>
              <text:list-item>
                <text:p text:style-name="P6"><text:span text:style-name="T2">Tâche 3 — Rédaction ~150 mots (12 P.)</text:span></text:p>
              </text:list-item>
            </text:list>
            <text:p text:style-name="P3"><text:span text:style-name="T3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Lettre de motivation</text:span><text:span text:style-name="T2"> — Wikipédia (2026), CC BY-SA 4.0</text:span></text:p>
              </text:list-item>
              <text:list-item>
                <text:p text:style-name="P6"><text:span text:style-name="T4">Correspondance (écriture)</text:span><text:span text:style-name="T2"> — Wikipédia (2026)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16</meta:creation-date>
    <dc:date>2026-07-21T15:34:16</dc:date>
    <meta:document-statistic meta:object-count="189"/>
    <meta:generator>LibreOffice/24.2.7.2$Linux_X86_64 LibreOffice_project/420$Build-2</meta:generator>
  </office:meta>
</office:document-meta>
</file>