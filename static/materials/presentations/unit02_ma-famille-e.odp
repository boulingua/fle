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2 — Ma fami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2 — Ma fami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6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au moins 10 membres de la famille</text:span></text:p>
              </text:list-item>
              <text:list-item>
                <text:p text:style-name="P6"><text:span text:style-name="T2">Utiliser </text:span><text:span text:style-name="T3">mon, ma, mes</text:span><text:span text:style-name="T2"> correctement</text:span></text:p>
              </text:list-item>
              <text:list-item>
                <text:p text:style-name="P6"><text:span text:style-name="T2">Comprendre un court texte sur une famille</text:span></text:p>
              </text:list-item>
              <text:list-item>
                <text:p text:style-name="P6"><text:span text:style-name="T2">Présenter ma famille à l’oral (6 phras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ouk montre une photo :</text:span></text:p>
            <text:p text:style-name="P3"><text:span text:style-name="T2">« Regarde, c’est ma famille ! Voici mon père, Klaus, et ma mère, Sonja. »</text:span></text:p>
            <text:p text:style-name="P3"><text:span text:style-name="T2">Tristan : « Vous êtes combien à la maison ? »</text:span></text:p>
            <text:p text:style-name="P3"><text:span text:style-name="T2">Anouk : « On est quatre, plus le chien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êtes-vous dans votre famille ?</text:span></text:p>
              </text:list-item>
              <text:list-item>
                <text:p text:style-name="P6"><text:span text:style-name="T2">Avez-vous des frères, des sœurs ?</text:span></text:p>
              </text:list-item>
              <text:list-item>
                <text:p text:style-name="P6"><text:span text:style-name="T2">Vos grands-parents habitent-ils près de chez vous ?</text:span></text:p>
              </text:list-item>
              <text:list-item>
                <text:p text:style-name="P6"><text:span text:style-name="T2">Avez-vous un animal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père · la mère · le frère · la sœur</text:span></text:p>
            <text:p text:style-name="P3"><text:span text:style-name="T2">le grand-père · la grand-mère</text:span></text:p>
            <text:p text:style-name="P3"><text:span text:style-name="T2">l’oncle · la tante · le cousin · la cousine</text:span></text:p>
            <text:p text:style-name="P3"><text:span text:style-name="T2">les parents · les grands-pare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mon</text:span><text:span text:style-name="T2"> + masculin : </text:span><text:span text:style-name="T3">mon père</text:span></text:p>
            <text:p text:style-name="P3"><text:span text:style-name="T4">ma</text:span><text:span text:style-name="T2"> + féminin : </text:span><text:span text:style-name="T3">ma mère</text:span></text:p>
            <text:p text:style-name="P3"><text:span text:style-name="T4">mes</text:span><text:span text:style-name="T2"> + pluriel : </text:span><text:span text:style-name="T3">mes parents</text:span></text:p>
            <text:p text:style-name="P3"><text:span text:style-name="T2">Devant une voyelle → </text:span><text:span text:style-name="T4">mon</text:span><text:span text:style-name="T2"> : </text:span><text:span text:style-name="T3">mon ami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a famille d’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a famille d’Anouk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Mon père s’appelle Klaus, il est ingénieur. Ma mère est médecin. Ma petite sœur Lena a 8 ans.</text:span></text:p>
            <text:p text:style-name="P3"><text:span text:style-name="T2">Mes grands-parents habitent à Stuttgart. Notre chien s’appelle Bello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Famille nucléaire :</text:span><text:span text:style-name="T2"> parents + enfants</text:span></text:p>
            <text:p text:style-name="P3"><text:span text:style-name="T4">Famille élargie :</text:span><text:span text:style-name="T2"> + grands-parents, oncles, tantes, cousins</text:span></text:p>
            <text:p text:style-name="P3"><text:span text:style-name="T3">famille</text:span><text:span text:style-name="T2"> vient du latin </text:span><text:span text:style-name="T3">familia</text:span></text:p>
            <text:p text:style-name="P3"><text:span text:style-name="T2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endre le texte</text:span></text:p>
              </text:list-item>
              <text:list-item>
                <text:p text:style-name="P6"><text:span text:style-name="T2">Ex. 2 : </text:span><text:span text:style-name="T3">mon, ma, mes</text:span></text:p>
              </text:list-item>
              <text:list-item>
                <text:p text:style-name="P6"><text:span text:style-name="T2">Ex. 3 : liens de parenté</text:span></text:p>
              </text:list-item>
              <text:list-item>
                <text:p text:style-name="P6"><text:span text:style-name="T2">Ex. 4 : ma famille (court)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Présentez votre famille — 6 phrases</text:span></text:p>
            <text:p text:style-name="P3"><text:span text:style-name="T2">nombre · prénoms · âges · profession · ville · animal</text:span></text:p>
            <text:p text:style-name="P3"><text:span text:style-name="T2">Au moins </text:span><text:span text:style-name="T4">5 possessifs</text:span><text:span text:style-name="T2">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10 membres de la famille</text:span></text:p>
              </text:list-item>
              <text:list-item>
                <text:p text:style-name="P6"><text:span text:style-name="T2">☐ </text:span><text:span text:style-name="T3">mon, ma, mes</text:span><text:span text:style-name="T2"> corrects</text:span></text:p>
              </text:list-item>
              <text:list-item>
                <text:p text:style-name="P6"><text:span text:style-name="T2">☐ </text:span><text:span text:style-name="T3">mon amie</text:span><text:span text:style-name="T2"> devant voyelle</text:span></text:p>
              </text:list-item>
              <text:list-item>
                <text:p text:style-name="P6"><text:span text:style-name="T2">☐ </text:span><text:span text:style-name="T2">comprendre un texte</text:span></text:p>
              </text:list-item>
              <text:list-item>
                <text:p text:style-name="P6"><text:span text:style-name="T2">☐ </text:span><text:span text:style-name="T2">présenter ma famille à l’or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Vocabulaire (10 pts)</text:span></text:p>
              </text:list-item>
              <text:list-item>
                <text:p text:style-name="P6"><text:span text:style-name="T2">Tâche 2 — Compréhension écrite (8 pts)</text:span></text:p>
              </text:list-item>
              <text:list-item>
                <text:p text:style-name="P6"><text:span text:style-name="T2">Tâche 3 — Expression écrite ~70 mots (12 pts)</text:span></text:p>
              </text:list-item>
            </text:list>
            <text:p text:style-name="P3"><text:span text:style-name="T4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— « Famille » (CC BY-SA 4.0)</text:span></text:p>
              </text:list-item>
              <text:list-item>
                <text:p text:style-name="P6"><text:span text:style-name="T2">Wiktionnaire — « famille » (CC BY-SA 4.0)</text:span></text:p>
              </text:list-item>
              <text:list-item>
                <text:p text:style-name="P6"><text:span text:style-name="T2">Wikipédia — « Adjectif possessif » (CC BY-SA 4.0)</text:span></text:p>
              </text:list-item>
            </text:list>
            <text:p text:style-name="P3"><text:span text:style-name="T3">Plateforme indépendante, sans aff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59</meta:creation-date>
    <dc:date>2026-07-21T15:46:59</dc:date>
    <meta:document-statistic meta:object-count="185"/>
    <meta:generator>LibreOffice/24.2.7.2$Linux_X86_64 LibreOffice_project/420$Build-2</meta:generator>
  </office:meta>
</office:document-meta>
</file>