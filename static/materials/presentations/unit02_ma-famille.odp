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2 — Ma fam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2 — Ma fam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8 membres de la famille</text:span></text:p>
              </text:list-item>
              <text:list-item>
                <text:p text:style-name="P6"><text:span text:style-name="T2">Employer </text:span><text:span text:style-name="T3">mon, ma, mes</text:span></text:p>
              </text:list-item>
              <text:list-item>
                <text:p text:style-name="P6"><text:span text:style-name="T2">Comprendre une présentation écrite</text:span></text:p>
              </text:list-item>
              <text:list-item>
                <text:p text:style-name="P6"><text:span text:style-name="T2">Présenter sa famille à l’oral (1 min)</text:span></text:p>
              </text:list-item>
              <text:list-item>
                <text:p text:style-name="P6"><text:span text:style-name="T2">Dire l’âge avec </text:span><text:span text:style-name="T3">avo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présente sa photo de famille :</text:span></text:p>
            <text:p text:style-name="P3"><text:span text:style-name="T3">« Voici mon père, Stefan. Voici ma mère, Anne. Là, c’est mon petit frère, Jonas. Et là, mon chat, Mistigri ! »</text:span></text:p>
            <text:p text:style-name="P3"><text:span text:style-name="T2">Qui sont les personnes sur la photo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personnes dans ta famille ?</text:span></text:p>
              </text:list-item>
              <text:list-item>
                <text:p text:style-name="P6"><text:span text:style-name="T2">As-tu des frères et des sœurs ?</text:span></text:p>
              </text:list-item>
              <text:list-item>
                <text:p text:style-name="P6"><text:span text:style-name="T2">As-tu un animal ? Comment s’appelle-t-il ?</text:span></text:p>
              </text:list-item>
              <text:list-item>
                <text:p text:style-name="P6"><text:span text:style-name="T2">Quels mots français connais-tu déjà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mère · le père · les parents</text:span></text:p>
              </text:list-item>
              <text:list-item>
                <text:p text:style-name="P6"><text:span text:style-name="T2">le frère · la sœur</text:span></text:p>
              </text:list-item>
              <text:list-item>
                <text:p text:style-name="P6"><text:span text:style-name="T2">le grand-père · la grand-mère</text:span></text:p>
              </text:list-item>
              <text:list-item>
                <text:p text:style-name="P6"><text:span text:style-name="T2">le fils · la fille</text:span></text:p>
              </text:list-item>
              <text:list-item>
                <text:p text:style-name="P6"><text:span text:style-name="T2">l’oncle · la tante · le cousin · la cousine</text:span></text:p>
              </text:list-item>
              <text:list-item>
                <text:p text:style-name="P6"><text:span text:style-name="T2">le chien · le cha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Gramm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Gramm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s adjectifs possessifs (1re personne) :</text:span></text:p>
            <text:list text:style-name="L3">
              <text:list-item>
                <text:p text:style-name="P3"><text:span text:style-name="T4">mon</text:span><text:span text:style-name="T2"> père (masc. sing.)</text:span></text:p>
              </text:list-item>
              <text:list-item>
                <text:p text:style-name="P3"><text:span text:style-name="T4">ma</text:span><text:span text:style-name="T2"> mère (fém. sing.)</text:span></text:p>
              </text:list-item>
              <text:list-item>
                <text:p text:style-name="P3"><text:span text:style-name="T4">mes</text:span><text:span text:style-name="T2"> parents (pluriel)</text:span></text:p>
              </text:list-item>
            </text:list>
            <text:p text:style-name="P3"><text:span text:style-name="T2">Astuce : devant une voyelle → </text:span><text:span text:style-name="T4">mon</text:span><text:span text:style-name="T2"> amie, </text:span><text:span text:style-name="T4">ton</text:span><text:span text:style-name="T2"> éco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Mini-tex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Mini-text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Voici ma famille. Mon père s’appelle Stefan ; il est ingénieur. Ma mère s’appelle Anne ; elle est médecin. J’ai un petit frère, Jonas : il a huit ans. Mes grands-parents habitent à Fribourg. Et j’ai aussi un chat, Mistigri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fêtes de fam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fêtes de fam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Fête des Mères</text:span><text:span text:style-name="T2"> : dernier dimanche de mai (loi de 1950)</text:span></text:p>
              </text:list-item>
              <text:list-item>
                <text:p text:style-name="P6"><text:span text:style-name="T4">Fête des Pères</text:span><text:span text:style-name="T2"> : 3e dimanche de juin</text:span></text:p>
              </text:list-item>
              <text:list-item>
                <text:p text:style-name="P6"><text:span text:style-name="T4">Fête des Grands-Mères</text:span><text:span text:style-name="T2"> : 1er dimanche de mars (depuis 1987)</text:span></text:p>
              </text:list-item>
            </text:list>
            <text:p text:style-name="P3"><text:span text:style-name="T3">(D’après Wikipédia FR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x. 1</text:span><text:span text:style-name="T2"> Traduire le vocabulaire</text:span></text:p>
              </text:list-item>
              <text:list-item>
                <text:p text:style-name="P6"><text:span text:style-name="T4">Ex. 2</text:span><text:span text:style-name="T2"> </text:span><text:span text:style-name="T3">mon</text:span><text:span text:style-name="T2"> ou </text:span><text:span text:style-name="T3">ma</text:span><text:span text:style-name="T2"> ?</text:span></text:p>
              </text:list-item>
              <text:list-item>
                <text:p text:style-name="P6"><text:span text:style-name="T4">Ex. 3</text:span><text:span text:style-name="T2"> </text:span><text:span text:style-name="T3">mon, ma</text:span><text:span text:style-name="T2"> ou </text:span><text:span text:style-name="T3">mes</text:span><text:span text:style-name="T2"> ?</text:span></text:p>
              </text:list-item>
              <text:list-item>
                <text:p text:style-name="P6"><text:span text:style-name="T4">Ex. 4</text:span><text:span text:style-name="T2"> Vrai ou faux ? (compréhension écrite)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 ta famille (1 min) avec une photo :</text:span></text:p>
            <text:list text:style-name="L3">
              <text:list-item>
                <text:p text:style-name="P3"><text:span text:style-name="T2">4 membres avec leur nom</text:span></text:p>
              </text:list-item>
              <text:list-item>
                <text:p text:style-name="P3"><text:span text:style-name="T2">2 âges (verbe </text:span><text:span text:style-name="T3">avoir</text:span><text:span text:style-name="T2">)</text:span></text:p>
              </text:list-item>
              <text:list-item>
                <text:p text:style-name="P3"><text:span text:style-name="T2">1 animal</text:span></text:p>
              </text:list-item>
              <text:list-item>
                <text:p text:style-name="P3"><text:span text:style-name="T2">3 possessifs </text:span><text:span text:style-name="T3">mon / ma / m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8 membres de la famille</text:span></text:p>
              </text:list-item>
              <text:list-item>
                <text:p text:style-name="P6"><text:span text:style-name="T2">☐ </text:span><text:span text:style-name="T2">Je distingue </text:span><text:span text:style-name="T3">mon, ma, mes</text:span></text:p>
              </text:list-item>
              <text:list-item>
                <text:p text:style-name="P6"><text:span text:style-name="T2">☐ </text:span><text:span text:style-name="T2">J’emploie </text:span><text:span text:style-name="T3">mon</text:span><text:span text:style-name="T2"> devant une voyelle</text:span></text:p>
              </text:list-item>
              <text:list-item>
                <text:p text:style-name="P6"><text:span text:style-name="T2">☐ </text:span><text:span text:style-name="T2">Je dis l’âge avec </text:span><text:span text:style-name="T3">avoir</text:span></text:p>
              </text:list-item>
              <text:list-item>
                <text:p text:style-name="P6"><text:span text:style-name="T2">☐ </text:span><text:span text:style-name="T2">Je présente ma famille en 1 minu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Vocabulaire (10 pts)</text:span></text:p>
              </text:list-item>
              <text:list-item>
                <text:p text:style-name="P6"><text:span text:style-name="T2">Tâche 2 — Possessifs (10 pts)</text:span></text:p>
              </text:list-item>
              <text:list-item>
                <text:p text:style-name="P6"><text:span text:style-name="T2">Tâche 3 — Expression écrite, ~40 mots (10 pts)</text:span></text:p>
              </text:list-item>
              <text:list-item>
                <text:p text:style-name="P6"><text:span text:style-name="T2">Tâche 4 — Expression orale, 1 min (10 pts)</text:span></text:p>
              </text:list-item>
              <text:list-item>
                <text:p text:style-name="P6"><text:span text:style-name="T4">Total : 40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èges fréque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ièges fréque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mes</text:span><text:span text:style-name="T2"> = pluriel : </text:span><text:span text:style-name="T3">mes parents</text:span></text:p>
              </text:list-item>
              <text:list-item>
                <text:p text:style-name="P6"><text:span text:style-name="T3">mon amie</text:span><text:span text:style-name="T2"> : </text:span><text:span text:style-name="T3">mon</text:span><text:span text:style-name="T2"> devant une voyelle</text:span></text:p>
              </text:list-item>
              <text:list-item>
                <text:p text:style-name="P6"><text:span text:style-name="T2">L’âge : </text:span><text:span text:style-name="T3">Il a 8 ans</text:span><text:span text:style-name="T2"> (avoir), pas </text:span><text:span text:style-name="T3">Il est 8 an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0:37</meta:creation-date>
    <dc:date>2026-07-21T16:10:37</dc:date>
    <meta:document-statistic meta:object-count="185"/>
    <meta:generator>LibreOffice/24.2.7.2$Linux_X86_64 LibreOffice_project/420$Build-2</meta:generator>
  </office:meta>
</office:document-meta>
</file>