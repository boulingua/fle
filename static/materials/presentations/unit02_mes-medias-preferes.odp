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es médias préféré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es médias préféré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2 · Parcours G+M · Classe 8 · Niveau M</text:span></text:p>
            <text:p text:style-name="P3"><text:span text:style-name="T2">Parler de ses habitudes d’écran et donner son av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re quels médias j’utilise et à quelle fréquence</text:span></text:p>
              </text:list-item>
              <text:list-item>
                <text:p text:style-name="P6"><text:span text:style-name="T2">Donner mon opinion et la justifier (</text:span><text:span text:style-name="T3">parce que</text:span><text:span text:style-name="T2">)</text:span></text:p>
              </text:list-item>
              <text:list-item>
                <text:p text:style-name="P6"><text:span text:style-name="T2">Poser et répondre à des questions dans une interview</text:span></text:p>
              </text:list-item>
              <text:list-item>
                <text:p text:style-name="P6"><text:span text:style-name="T2">Comparer deux médias et exprimer une préférence</text:span></text:p>
              </text:list-item>
              <text:list-item>
                <text:p text:style-name="P6"><text:span text:style-name="T2">Distinguer information et divertisse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medi matin. Lucas regarde des vidéos au lit ; Zoé écoute la radio.</text:span></text:p>
            <text:p text:style-name="P7"><text:span text:style-name="T4">Zoé :</text:span><text:span text:style-name="T5"> Tu passes combien de temps sur ton écran le week-end ?</text:span></text:p>
            <text:p text:style-name="P7"><text:span text:style-name="T4">Lucas :</text:span><text:span text:style-name="T5"> Deux, peut-être trois heures. Moi, je préfère les vidéos, c’est plus drôle qu’une émission de radio.</text:span></text:p>
            <text:p text:style-name="P3"><text:span text:style-name="T2">Qui a la meilleure habitude, à votre avi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itez trois médias que vous utilisez chaque semaine</text:span></text:p>
              </text:list-item>
              <text:list-item>
                <text:p text:style-name="P6"><text:span text:style-name="T2">Combien de temps par jour devant un écran ?</text:span></text:p>
              </text:list-item>
              <text:list-item>
                <text:p text:style-name="P6"><text:span text:style-name="T2">« Mon média préféré, c’est… parce que… »</text:span></text:p>
              </text:list-item>
              <text:list-item>
                <text:p text:style-name="P6"><text:span text:style-name="T2">S’informer ou se divertir : quelle différenc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écran · une habitude</text:span></text:p>
              </text:list-item>
              <text:list-item>
                <text:p text:style-name="P6"><text:span text:style-name="T2">passer du temps sur…</text:span></text:p>
              </text:list-item>
              <text:list-item>
                <text:p text:style-name="P6"><text:span text:style-name="T2">s’informer / se divertir</text:span></text:p>
              </text:list-item>
              <text:list-item>
                <text:p text:style-name="P6"><text:span text:style-name="T2">une source · fiable</text:span></text:p>
              </text:list-item>
              <text:list-item>
                <text:p text:style-name="P6"><text:span text:style-name="T2">une chaîne (vidéo / radio)</text:span></text:p>
              </text:list-item>
              <text:list-item>
                <text:p text:style-name="P6"><text:span text:style-name="T2">à mon avis / je trouve q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6">Opinion :</text:span><text:span text:style-name="T2"> À mon avis… · Je pense que… + </text:span><text:span text:style-name="T6">parce que</text:span></text:p>
            <text:p text:style-name="P3"><text:span text:style-name="T6">Fréquence :</text:span><text:span text:style-name="T2"> tous les jours · souvent · de temps en temps · rarement · ne… jamais</text:span></text:p>
            <text:p text:style-name="P3"><text:span text:style-name="T6">Comparer :</text:span><text:span text:style-name="T2"> plus… que · moins… que · aussi… que</text:span></text:p>
            <text:p text:style-name="P3"><text:span text:style-name="T3">La radio est moins fatigante que l’écra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6">TV5Monde</text:span></text:p>
            <text:list text:style-name="L3">
              <text:list-item>
                <text:p text:style-name="P3"><text:span text:style-name="T2">Chaîne internationale de langue française, née en 1984</text:span></text:p>
              </text:list-item>
              <text:list-item>
                <text:p text:style-name="P3"><text:span text:style-name="T2">Coopération : France, Belgique, Suisse, Canada, Québec, Monaco</text:span></text:p>
              </text:list-item>
              <text:list-item>
                <text:p text:style-name="P3"><text:span text:style-name="T2">Diffusée dans plus de 200 pays, avec sous-titres — un outil pour apprendre le français</text:span></text:p>
              </text:list-item>
            </text:list>
            <text:p text:style-name="P3"><text:span text:style-name="T3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6">Ex. 1 (G) :</text:span><text:span text:style-name="T2"> information ou divertissement ?</text:span></text:p>
              </text:list-item>
              <text:list-item>
                <text:p text:style-name="P6"><text:span text:style-name="T6">Ex. 2 (M) :</text:span><text:span text:style-name="T2"> adverbes de fréquence</text:span></text:p>
              </text:list-item>
              <text:list-item>
                <text:p text:style-name="P6"><text:span text:style-name="T6">Ex. 3 (M) :</text:span><text:span text:style-name="T2"> opinion + justification</text:span></text:p>
              </text:list-item>
              <text:list-item>
                <text:p text:style-name="P6"><text:span text:style-name="T6">Ex. 4 (E) :</text:span><text:span text:style-name="T2"> comparaisons (</text:span><text:span text:style-name="T3">plus / moins… que</text:span><text:span text:style-name="T2">)</text:span></text:p>
              </text:list-item>
            </text:list>
            <text:p text:style-name="P3"><text:span text:style-name="T2">Corrigés dans la fich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Interview écra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Interview écra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binôme (~2 min), A interviewe B :</text:span></text:p>
            <text:list text:style-name="L3">
              <text:list-item>
                <text:p text:style-name="P3"><text:span text:style-name="T2">Quel est ton média préféré, et à quelle fréquence ?</text:span></text:p>
              </text:list-item>
              <text:list-item>
                <text:p text:style-name="P3"><text:span text:style-name="T2">Qu’est-ce qui te plaît dans ce média ?</text:span></text:p>
              </text:list-item>
              <text:list-item>
                <text:p text:style-name="P3"><text:span text:style-name="T2">Vérifies-tu qui l’a fait ?</text:span></text:p>
              </text:list-item>
            </text:list>
            <text:p text:style-name="P3"><text:span text:style-name="T2">Réponses : </text:span><text:span text:style-name="T6">opinion + justification</text:span><text:span text:style-name="T2">, puis on échange les rôl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trois médias et leur fréquence</text:span></text:p>
              </text:list-item>
              <text:list-item>
                <text:p text:style-name="P6"><text:span text:style-name="T2">Je donne une opinion justifiée</text:span></text:p>
              </text:list-item>
              <text:list-item>
                <text:p text:style-name="P6"><text:span text:style-name="T2">Je compare deux médias</text:span></text:p>
              </text:list-item>
              <text:list-item>
                <text:p text:style-name="P6"><text:span text:style-name="T2">Je pose et réponds à trois questions</text:span></text:p>
              </text:list-item>
              <text:list-item>
                <text:p text:style-name="P6"><text:span text:style-name="T2">Je distingue information et divertisse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6">Tâche 1 — Compréhension écrite</text:span><text:span text:style-name="T2"> (8 P.)</text:span></text:p>
              </text:list-item>
              <text:list-item>
                <text:p text:style-name="P6"><text:span text:style-name="T6">Tâche 2 — Interview orale enregistrée</text:span><text:span text:style-name="T2"> (12 P.)</text:span></text:p>
              </text:list-item>
              <text:list-item>
                <text:p text:style-name="P6"><text:span text:style-name="T6">Tâche 3 — Texte « Mon média préféré »</text:span><text:span text:style-name="T2">, ~70 mots (10 P.)</text:span></text:p>
              </text:list-item>
            </text:list>
            <text:p text:style-name="P3"><text:span text:style-name="T6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V5Monde</text:span><text:span text:style-name="T2"> — Wikipédia, CC BY-SA 4.0</text:span></text:p>
              </text:list-item>
              <text:list-item>
                <text:p text:style-name="P6"><text:span text:style-name="T3">Éducation aux médias et à l’information</text:span><text:span text:style-name="T2"> — Wikipédia, CC BY-SA 4.0</text:span></text:p>
              </text:list-item>
              <text:list-item>
                <text:p text:style-name="P6"><text:span text:style-name="T2">Textes et dialogues : originau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3:38</meta:creation-date>
    <dc:date>2026-07-21T15:33:38</dc:date>
    <meta:document-statistic meta:object-count="181"/>
    <meta:generator>LibreOffice/24.2.7.2$Linux_X86_64 LibreOffice_project/420$Build-2</meta:generator>
  </office:meta>
</office:document-meta>
</file>