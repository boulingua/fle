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prefix="(" style:num-suffix=")" style:num-format="A" text:start-value="5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 text:start-value="5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a presse françai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presse françai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2 · Parcours E (lycée) · Classe 10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et situer les grands titres de la presse française</text:span></text:p>
              </text:list-item>
              <text:list-item>
                <text:p text:style-name="P6"><text:span text:style-name="T2">Distinguer les genres : brève, article, éditorial, billet</text:span></text:p>
              </text:list-item>
              <text:list-item>
                <text:p text:style-name="P6"><text:span text:style-name="T2">Repérer les 5 W d’un article</text:span></text:p>
              </text:list-item>
              <text:list-item>
                <text:p text:style-name="P6"><text:span text:style-name="T2">Évaluer la fiabilité d’une source et le justifier</text:span></text:p>
              </text:list-item>
              <text:list-item>
                <text:p text:style-name="P6"><text:span text:style-name="T2">Rédiger une brève d’actualité (~12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ix quotidiens, un même événement, six « unes » différentes.</text:span></text:p>
            <text:list text:style-name="L3">
              <text:list-item>
                <text:p text:style-name="P3"><text:span text:style-name="T2">« Réforme adoptée : un pas décisif »</text:span></text:p>
              </text:list-item>
              <text:list-item>
                <text:p text:style-name="P3"><text:span text:style-name="T2">« Réforme imposée malgré la rue »</text:span></text:p>
              </text:list-item>
            </text:list>
            <text:p text:style-name="P3"><text:span text:style-name="T2">→ </text:span><text:span text:style-name="T2">Même fait, regards différents. Pourquoi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s journaux français connaissez-vous ?</text:span></text:p>
              </text:list-item>
              <text:list-item>
                <text:p text:style-name="P6"><text:span text:style-name="T2">Fait ou opinion : savez-vous les distinguer ?</text:span></text:p>
              </text:list-item>
              <text:list-item>
                <text:p text:style-name="P6"><text:span text:style-name="T2">Comment décidez-vous qu’une info est fiable ?</text:span></text:p>
              </text:list-item>
              <text:list-item>
                <text:p text:style-name="P6"><text:span text:style-name="T2">« Une source est fiable quand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quotidien · la une · la ligne éditoriale</text:span></text:p>
              </text:list-item>
              <text:list-item>
                <text:p text:style-name="P6"><text:span text:style-name="T2">une brève · un éditorial · un billet · un reportage</text:span></text:p>
              </text:list-item>
              <text:list-item>
                <text:p text:style-name="P6"><text:span text:style-name="T2">une source · fiable / la fiabilité</text:span></text:p>
              </text:list-item>
              <text:list-item>
                <text:p text:style-name="P6"><text:span text:style-name="T2">recouper · vérifier les faits · une rumeu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Attribuer une inform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Attribuer une inform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Le journal affirme que le projet sera voté.</text:span></text:p>
              </text:list-item>
              <text:list-item>
                <text:p text:style-name="P6"><text:span text:style-name="T2">Discours indirect passé : « Je viens » → </text:span><text:span text:style-name="T3">Il a dit qu’il venait.</text:span></text:p>
              </text:list-item>
              <text:list-item>
                <text:p text:style-name="P6"><text:span text:style-name="T2">Conditionnel = info non confirmée : </text:span><text:span text:style-name="T3">Le projet serait abandonné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x titres, six regard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x titres, six regard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Nationaux</text:span><text:span text:style-name="T2"> : Le Monde (1944), Le Figaro (1826), Libération (1973), La Croix (1880)</text:span></text:p>
              </text:list-item>
              <text:list-item>
                <text:p text:style-name="P6"><text:span text:style-name="T4">Spécialisé</text:span><text:span text:style-name="T2"> : L’Équipe (sport)</text:span></text:p>
              </text:list-item>
              <text:list-item>
                <text:p text:style-name="P6"><text:span text:style-name="T4">Régional</text:span><text:span text:style-name="T2"> : Ouest-France — plus fort tirage</text:span></text:p>
              </text:list-item>
            </text:list>
            <text:p text:style-name="P3"><text:span text:style-name="T2">Chaque titre a sa ligne éditoriale → comparer les sourc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presse régiona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presse régiona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presse régionale (PQR) est très lue en France.</text:span></text:p>
              </text:list-item>
              <text:list-item>
                <text:p text:style-name="P6"><text:span text:style-name="T3">Ouest-France</text:span><text:span text:style-name="T2"> (depuis 1944) : souvent cité comme le journal francophone au plus fort tirage.</text:span></text:p>
              </text:list-item>
              <text:list-item>
                <text:p text:style-name="P6"><text:span text:style-name="T2">L’information de proximité reste centrale.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</text:span></text:p>
              </text:list-item>
              <text:list-item>
                <text:p text:style-name="P6"><text:span text:style-name="T2">Reconnaître le genre : brève / éditorial / billet / reportage</text:span></text:p>
              </text:list-item>
              <text:list-item>
                <text:p text:style-name="P6"><text:span text:style-name="T2">Fait ou opinion ?</text:span></text:p>
              </text:list-item>
            </text:list>
            <text:list text:style-name="L6">
              <text:list-item>
                <text:p text:style-name="P6"><text:span text:style-name="T2">Attribuer une information au discours indirect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Une brève (~120 mo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Une brève (~120 mo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itre clair et informatif</text:span></text:p>
              </text:list-item>
              <text:list-item>
                <text:p text:style-name="P6"><text:span text:style-name="T2">Chapeau = 5 W (qui, quoi, où, quand, pourquoi)</text:span></text:p>
              </text:list-item>
              <text:list-item>
                <text:p text:style-name="P6"><text:span text:style-name="T2">Une citation directe attribuée</text:span></text:p>
              </text:list-item>
              <text:list-item>
                <text:p text:style-name="P6"><text:span text:style-name="T2">Ton neutre</text:span></text:p>
              </text:list-item>
            </text:list>
            <text:p text:style-name="P3"><text:span text:style-name="T2">Barème : contenu 4 · structure 3 · langue 3 · registre 2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itue les grands titres français</text:span></text:p>
              </text:list-item>
              <text:list-item>
                <text:p text:style-name="P6"><text:span text:style-name="T2">Je distingue les genres journalistiques</text:span></text:p>
              </text:list-item>
              <text:list-item>
                <text:p text:style-name="P6"><text:span text:style-name="T2">Je sépare fait et opinion</text:span></text:p>
              </text:list-item>
              <text:list-item>
                <text:p text:style-name="P6"><text:span text:style-name="T2">J’attribue une info et j’emploie le conditionnel</text:span></text:p>
              </text:list-item>
              <text:list-item>
                <text:p text:style-name="P6"><text:span text:style-name="T2">Je rédige une brève de 120 mo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0)</text:span></text:p>
              </text:list-item>
              <text:list-item>
                <text:p text:style-name="P6"><text:span text:style-name="T2">Tâche 2 — Compétence médiatique : genres + fait/opinion (10)</text:span></text:p>
              </text:list-item>
              <text:list-item>
                <text:p text:style-name="P6"><text:span text:style-name="T2">Tâche 3 — Écriture d’une brève ~120 mots (10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: « Ouest-France », « Presse quotidienne régionale », « Le Figaro », « Genre journalistique » — CC BY-SA</text:span></text:p>
              </text:list-item>
              <text:list-item>
                <text:p text:style-name="P6"><text:span text:style-name="T2">BnF — Gallica (presse numérisée) — domaine public / licences ouvert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27</meta:creation-date>
    <dc:date>2026-07-21T16:28:27</dc:date>
    <meta:document-statistic meta:object-count="185"/>
    <meta:generator>LibreOffice/24.2.7.2$Linux_X86_64 LibreOffice_project/420$Build-2</meta:generator>
  </office:meta>
</office:document-meta>
</file>