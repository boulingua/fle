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a presse française au quotidie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presse française au quotidie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Reconnaître cinq grands quotidiens français</text:span></text:p>
              </text:list-item>
              <text:list-item>
                <text:p text:style-name="P6"><text:span text:style-name="T2">Distinguer l’information de l’opinion</text:span></text:p>
              </text:list-item>
              <text:list-item>
                <text:p text:style-name="P6"><text:span text:style-name="T2">Identifier les genres : une, brève, reportage, interview, éditorial</text:span></text:p>
              </text:list-item>
              <text:list-item>
                <text:p text:style-name="P6"><text:span text:style-name="T2">Rapporter un article au discours indirect</text:span></text:p>
              </text:list-item>
              <text:list-item>
                <text:p text:style-name="P6"><text:span text:style-name="T2">Évaluer la fiabilité d’une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e kiosque, Nadia et Théo :</text:span></text:p>
            <text:p text:style-name="P3"><text:span text:style-name="T2">« Le même jour, trois titres racontent la même grève, mais pas de la même façon. » « Et lequel dit la vérité ? » « Les deux donnent des faits. Mais chacun choisit ses mots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ù lisez-vous les actualités ?</text:span></text:p>
              </text:list-item>
              <text:list-item>
                <text:p text:style-name="P6"><text:span text:style-name="T2">Pourquoi deux titres différents pour un même événement ?</text:span></text:p>
              </text:list-item>
              <text:list-item>
                <text:p text:style-name="P6"><text:span text:style-name="T2">Qu’est-ce qu’une « ligne éditoriale » ?</text:span></text:p>
              </text:list-item>
              <text:list-item>
                <text:p text:style-name="P6"><text:span text:style-name="T2">Informer ou commenter : quelle différe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une · le gros titre</text:span></text:p>
              </text:list-item>
              <text:list-item>
                <text:p text:style-name="P6"><text:span text:style-name="T2">la brève · le reportage · l’interview</text:span></text:p>
              </text:list-item>
              <text:list-item>
                <text:p text:style-name="P6"><text:span text:style-name="T2">l’éditorial · la ligne éditoriale</text:span></text:p>
              </text:list-item>
              <text:list-item>
                <text:p text:style-name="P6"><text:span text:style-name="T2">le tirage / la diffusion</text:span></text:p>
              </text:list-item>
              <text:list-item>
                <text:p text:style-name="P6"><text:span text:style-name="T2">la source · vérifier / recoup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iscours rappor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iscours rappor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Verbe introducteur + </text:span><text:span text:style-name="T3">que</text:span><text:span text:style-name="T2"> :</text:span></text:p>
            <text:list text:style-name="L3">
              <text:list-item>
                <text:p text:style-name="P3"><text:span text:style-name="T2">Le journaliste </text:span><text:span text:style-name="T3">affirme que</text:span><text:span text:style-name="T2"> la France est en retard.</text:span></text:p>
              </text:list-item>
              <text:list-item>
                <text:p text:style-name="P3"><text:span text:style-name="T2">L’article </text:span><text:span text:style-name="T3">explique que</text:span><text:span text:style-name="T2"> les transports posent problème.</text:span></text:p>
              </text:list-item>
              <text:list-item>
                <text:p text:style-name="P3"><text:span text:style-name="T2">Selon </text:span><text:span text:style-name="T4">Le Monde</text:span><text:span text:style-name="T2">, le rapport </text:span><text:span text:style-name="T3">serait</text:span><text:span text:style-name="T2"> alarmant.</text:span></text:p>
              </text:list-item>
            </text:list>
            <text:p text:style-name="P3"><text:span text:style-name="T2">Attention aux personnes : « Nous publions nos chiffres » → il publie ses chiffr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nq quotidiens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inq quotidiens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Le Monde</text:span><text:span text:style-name="T2"> — national, généraliste</text:span></text:p>
              </text:list-item>
              <text:list-item>
                <text:p text:style-name="P6"><text:span text:style-name="T4">Le Figaro</text:span><text:span text:style-name="T2"> — national, généraliste</text:span></text:p>
              </text:list-item>
              <text:list-item>
                <text:p text:style-name="P6"><text:span text:style-name="T4">Libération</text:span><text:span text:style-name="T2"> — national, société</text:span></text:p>
              </text:list-item>
              <text:list-item>
                <text:p text:style-name="P6"><text:span text:style-name="T4">L’Équipe</text:span><text:span text:style-name="T2"> — national, sport</text:span></text:p>
              </text:list-item>
              <text:list-item>
                <text:p text:style-name="P6"><text:span text:style-name="T4">Ouest-France</text:span><text:span text:style-name="T2"> — régional (Ouest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 « une » de journa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e « une » de journal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 COURRIER DU MATIN — 21 mai 2026</text:span></text:p>
            <text:p text:style-name="P3"><text:span text:style-name="T3">Transports : les trains de nuit font leur retour</text:span></text:p>
            <text:p text:style-name="P3"><text:span text:style-name="T2">Fréquentation doublée en trois ans. Trois nouvelles lignes dès l’automne. Reportage p. 3, interview p. 6, éditorial p. 11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Ouest-France</text:span><text:span text:style-name="T2"> : quotidien le plus vendu en France (diffusion)</text:span></text:p>
              </text:list-item>
              <text:list-item>
                <text:p text:style-name="P6"><text:span text:style-name="T4">Le Figaro</text:span><text:span text:style-name="T2"> : plus ancien quotidien national (fondé en 1826)</text:span></text:p>
              </text:list-item>
              <text:list-item>
                <text:p text:style-name="P6"><text:span text:style-name="T4">Le Monde</text:span><text:span text:style-name="T2"> : créé en 1944, à la Libération</text:span></text:p>
              </text:list-item>
            </text:list>
            <text:p text:style-name="P3"><text:span text:style-name="T2">Source : Wikipédia, CC 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e la une</text:span></text:p>
              </text:list-item>
              <text:list-item>
                <text:p text:style-name="P6"><text:span text:style-name="T2">Ex. 2 : information ou opinion ?</text:span></text:p>
              </text:list-item>
              <text:list-item>
                <text:p text:style-name="P6"><text:span text:style-name="T2">Ex. 3 : relier les genres journalistiques</text:span></text:p>
              </text:list-item>
              <text:list-item>
                <text:p text:style-name="P6"><text:span text:style-name="T2">Ex. 4 : transformer au discours indirect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evue de presse (~120 mots) :</text:span></text:p>
            <text:list text:style-name="L3">
              <text:list-item>
                <text:p text:style-name="P3"><text:span text:style-name="T2">3 phrases d’information rapportée</text:span></text:p>
              </text:list-item>
              <text:list-item>
                <text:p text:style-name="P3"><text:span text:style-name="T2">2 phrases d’opinion signalées</text:span></text:p>
              </text:list-item>
              <text:list-item>
                <text:p text:style-name="P3"><text:span text:style-name="T2">1 phrase sur la fiabilité de la source</text:span></text:p>
              </text:list-item>
            </text:list>
            <text:p text:style-name="P3"><text:span text:style-name="T2">Critères : info/opinion · discours rapporté · vocabulaire · fiabilité · langu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nomme cinq quotidiens et leur type</text:span></text:p>
              </text:list-item>
              <text:list-item>
                <text:p text:style-name="P6"><text:span text:style-name="T2">Je distingue information et opinion</text:span></text:p>
              </text:list-item>
              <text:list-item>
                <text:p text:style-name="P6"><text:span text:style-name="T2">Je reconnais les genres journalistiques</text:span></text:p>
              </text:list-item>
              <text:list-item>
                <text:p text:style-name="P6"><text:span text:style-name="T2">Je rapporte un article au discours indirect</text:span></text:p>
              </text:list-item>
              <text:list-item>
                <text:p text:style-name="P6"><text:span text:style-name="T2">Je vérifie une source (date, auteur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oir surveillé — 30 P.</text:span></text:p>
            <text:list text:style-name="L3">
              <text:list-item>
                <text:p text:style-name="P3"><text:span text:style-name="T2">Tâche 1 : compréhension écrite (10 P.)</text:span></text:p>
              </text:list-item>
              <text:list-item>
                <text:p text:style-name="P3"><text:span text:style-name="T2">Tâche 2 : genres et fiabilité (8 P.)</text:span></text:p>
              </text:list-item>
              <text:list-item>
                <text:p text:style-name="P3"><text:span text:style-name="T2">Tâche 3 : revue de presse ~120 mots (12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Ouest-France</text:span><text:span text:style-name="T2"> — Wikipédia, CC BY-SA 4.0</text:span></text:p>
              </text:list-item>
              <text:list-item>
                <text:p text:style-name="P6"><text:span text:style-name="T4">Le Figaro</text:span><text:span text:style-name="T2"> — Wikipédia, CC BY-SA 4.0</text:span></text:p>
              </text:list-item>
              <text:list-item>
                <text:p text:style-name="P6"><text:span text:style-name="T4">Le Monde</text:span><text:span text:style-name="T2"> — Wikipédia, CC BY-SA 4.0</text:span></text:p>
              </text:list-item>
            </text:list>
            <text:p text:style-name="P3"><text:span text:style-name="T2">Plateforme indépendante, sans affiliation. Textes de presse : créations original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22</meta:creation-date>
    <dc:date>2026-07-21T15:46:22</dc:date>
    <meta:document-statistic meta:object-count="189"/>
    <meta:generator>LibreOffice/24.2.7.2$Linux_X86_64 LibreOffice_project/420$Build-2</meta:generator>
  </office:meta>
</office:document-meta>
</file>