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italic" style:text-underline-style="none" fo:font-weight="normal" fo:background-color="transparent" style:font-size-asian="33pt" style:font-style-asian="italic" style:font-weight-asian="normal" style:font-size-complex="33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Raconter le week-en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aconter le week-end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ssé composé · Parcours G+M · classe 7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juguer au passé composé avec </text:span><text:span text:style-name="T3">avoir</text:span><text:span text:style-name="T2"> ou </text:span><text:span text:style-name="T3">être</text:span></text:p>
              </text:list-item>
              <text:list-item>
                <text:p text:style-name="P6"><text:span text:style-name="T2">Reconnaître les verbes avec </text:span><text:span text:style-name="T3">être</text:span><text:span text:style-name="T2"> et accorder le participe</text:span></text:p>
              </text:list-item>
              <text:list-item>
                <text:p text:style-name="P6"><text:span text:style-name="T2">Raconter mon week-end à l’oral, en continu</text:span></text:p>
              </text:list-item>
              <text:list-item>
                <text:p text:style-name="P6"><text:span text:style-name="T2">Écrire un court récit au passé composé (~7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undi matin, dans la cour.</text:span></text:p>
            <text:list text:style-name="L3">
              <text:list-item>
                <text:p text:style-name="P3"><text:span text:style-name="T4">Nour :</text:span><text:span text:style-name="T2"> Tu as passé un bon week-end ?</text:span></text:p>
              </text:list-item>
              <text:list-item>
                <text:p text:style-name="P3"><text:span text:style-name="T4">Tom :</text:span><text:span text:style-name="T2"> Oui ! Samedi, j’ai joué au basket.</text:span></text:p>
              </text:list-item>
              <text:list-item>
                <text:p text:style-name="P3"><text:span text:style-name="T4">Nour :</text:span><text:span text:style-name="T2"> Moi, je suis allée à la piscine.</text:span></text:p>
              </text:list-item>
              <text:list-item>
                <text:p text:style-name="P3"><text:span text:style-name="T4">Tom :</text:span><text:span text:style-name="T2"> Dimanche, je suis resté à la maison.</text:span></text:p>
              </text:list-item>
            </text:list>
            <text:p text:style-name="P3"><text:span text:style-name="T2">→ </text:span><text:span text:style-name="T2">Repérez les verbes au passé composé : </text:span><text:span text:style-name="T3">avoir</text:span><text:span text:style-name="T2"> ou </text:span><text:span text:style-name="T3">être</text:span><text:span text:style-name="T2">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’avez-vous fait samedi ? Et dimanche ?</text:span></text:p>
              </text:list-item>
              <text:list-item>
                <text:p text:style-name="P6"><text:span text:style-name="T2">Un verbe d’action que vous connaissez ?</text:span></text:p>
              </text:list-item>
              <text:list-item>
                <text:p text:style-name="P6"><text:span text:style-name="T2">Pourquoi </text:span><text:span text:style-name="T3">j’ai joué</text:span><text:span text:style-name="T2"> mais </text:span><text:span text:style-name="T3">je suis allé</text:span><text:span text:style-name="T2"> ?</text:span></text:p>
              </text:list-item>
            </text:list>
            <text:p text:style-name="P3"><text:span text:style-name="T2">Passé composé = action </text:span><text:span text:style-name="T4">terminée</text:span><text:span text:style-name="T2"> dans le passé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ouer au foot / au basket</text:span></text:p>
              </text:list-item>
              <text:list-item>
                <text:p text:style-name="P6"><text:span text:style-name="T2">regarder un film</text:span></text:p>
              </text:list-item>
              <text:list-item>
                <text:p text:style-name="P6"><text:span text:style-name="T2">aller à la piscine</text:span></text:p>
              </text:list-item>
              <text:list-item>
                <text:p text:style-name="P6"><text:span text:style-name="T2">rester à la maison</text:span></text:p>
              </text:list-item>
              <text:list-item>
                <text:p text:style-name="P6"><text:span text:style-name="T2">faire les devoirs</text:span></text:p>
              </text:list-item>
              <text:list-item>
                <text:p text:style-name="P6"><text:span text:style-name="T2">sortir avec des amis</text:span></text:p>
              </text:list-item>
              <text:list-item>
                <text:p text:style-name="P6"><text:span text:style-name="T2">se promen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a formu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a formu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Auxiliaire (</text:span><text:span text:style-name="T5">avoir</text:span><text:span text:style-name="T4"> / </text:span><text:span text:style-name="T5">être</text:span><text:span text:style-name="T4"> au présent) + participe passé</text:span></text:p>
            <text:list text:style-name="L3">
              <text:list-item>
                <text:p text:style-name="P3"><text:span text:style-name="T3">avoir</text:span><text:span text:style-name="T2"> : j’ai joué · tu as fini · il a fait</text:span></text:p>
              </text:list-item>
              <text:list-item>
                <text:p text:style-name="P3"><text:span text:style-name="T3">être</text:span><text:span text:style-name="T2"> : je suis allé(e) · elle est restée · ils sont partis</text:span></text:p>
              </text:list-item>
            </text:list>
            <text:p text:style-name="P3"><text:span text:style-name="T2">Avec </text:span><text:span text:style-name="T3">être</text:span><text:span text:style-name="T2"> → le participe </text:span><text:span text:style-name="T4">s’accorde</text:span><text:span text:style-name="T2"> avec le suje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erbes avec êt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erbes avec </text:span><text:span text:style-name="T6">êt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ller · venir · arriver · partir · entrer · sortir · monter · descendre · rester · tomber · naître · mourir · retourner · passer</text:span></text:p>
            <text:p text:style-name="P3"><text:span text:style-name="T4">+ tous les verbes pronominaux</text:span><text:span text:style-name="T2"> (se lever, se promener…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week-end de Luc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week-end de Luc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medi, je suis parti au parc avec Maxime. Nous avons joué au foot. J’ai mangé un sandwich.</text:span></text:p>
            <text:p text:style-name="P3"><text:span text:style-name="T2">L’après-midi, je suis rentré et j’ai aidé mon père. Le soir, ma sœur est arrivée de Lyon.</text:span></text:p>
            <text:p text:style-name="P3"><text:span text:style-name="T2">Dimanche, je suis resté tranquille et j’ai fini mes devoir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mot </text:span><text:span text:style-name="T3">week-end</text:span><text:span text:style-name="T2"> est un emprunt à l’anglais : la période de repos de fin de semaine (samedi + dimanche).</text:span></text:p>
            <text:p text:style-name="P3"><text:span text:style-name="T2">Consacré à la famille, aux loisirs, au sport, aux sorties.</text:span></text:p>
            <text:p text:style-name="P3"><text:span text:style-name="T2">Pluriel : </text:span><text:span text:style-name="T3">des week-ends</text:span><text:span text:style-name="T2">.</text:span></text:p>
            <text:p text:style-name="P3"><text:span text:style-name="T3">(D’après Wikipédia, CC BY-SA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x. 1</text:span><text:span text:style-name="T2"> — </text:span><text:span text:style-name="T3">avoir</text:span><text:span text:style-name="T2"> ou </text:span><text:span text:style-name="T3">être</text:span><text:span text:style-name="T2"> ?</text:span></text:p>
              </text:list-item>
              <text:list-item>
                <text:p text:style-name="P6"><text:span text:style-name="T4">Ex. 2</text:span><text:span text:style-name="T2"> — Conjuguer au passé composé</text:span></text:p>
              </text:list-item>
              <text:list-item>
                <text:p text:style-name="P6"><text:span text:style-name="T4">Ex. 3</text:span><text:span text:style-name="T2"> — Accorder le participe (avec </text:span><text:span text:style-name="T3">être</text:span><text:span text:style-name="T2">)</text:span></text:p>
              </text:list-item>
              <text:list-item>
                <text:p text:style-name="P6"><text:span text:style-name="T4">Ex. 4</text:span><text:span text:style-name="T2"> — Compréhension du texte de Lucas</text:span></text:p>
              </text:list-item>
            </text:list>
            <text:p text:style-name="P3"><text:span text:style-name="T2">Différenciation : G (tableau d’aide) · M (tout) · E (question bonu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Racontez votre week-end à l’oral</text:span><text:span text:style-name="T2"> (5–6 phrases, sans lire).</text:span></text:p>
            <text:list text:style-name="L3">
              <text:list-item>
                <text:p text:style-name="P3"><text:span text:style-name="T2">au moins 3 verbes au passé composé</text:span></text:p>
              </text:list-item>
              <text:list-item>
                <text:p text:style-name="P3"><text:span text:style-name="T2">dont 1 avec l’auxiliaire </text:span><text:span text:style-name="T3">être</text:span></text:p>
              </text:list-item>
            </text:list>
            <text:p text:style-name="P3"><text:span text:style-name="T2">Carte mémoire : samedi / dimanche / où / avec qui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hoisis </text:span><text:span text:style-name="T3">avoir</text:span><text:span text:style-name="T2"> ou </text:span><text:span text:style-name="T3">être</text:span></text:p>
              </text:list-item>
              <text:list-item>
                <text:p text:style-name="P6"><text:span text:style-name="T2">Je connais les verbes avec </text:span><text:span text:style-name="T3">être</text:span></text:p>
              </text:list-item>
              <text:list-item>
                <text:p text:style-name="P6"><text:span text:style-name="T2">J’accorde le participe passé</text:span></text:p>
              </text:list-item>
              <text:list-item>
                <text:p text:style-name="P6"><text:span text:style-name="T2">Je raconte mon week-end à l’oral</text:span></text:p>
              </text:list-item>
              <text:list-item>
                <text:p text:style-name="P6"><text:span text:style-name="T2">J’écris un court réc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Grammaire</text:span><text:span text:style-name="T2"> (10 P.) — conjuguer 10 verbes</text:span></text:p>
              </text:list-item>
              <text:list-item>
                <text:p text:style-name="P6"><text:span text:style-name="T4">Compréhension écrite</text:span><text:span text:style-name="T2"> (8 P.) — 4 questions</text:span></text:p>
              </text:list-item>
              <text:list-item>
                <text:p text:style-name="P6"><text:span text:style-name="T4">Expression écrite</text:span><text:span text:style-name="T2"> (12 P.) — mon week-end (~70 mots)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Passé composé » — Wikipédia (CC BY-SA)</text:span></text:p>
              </text:list-item>
              <text:list-item>
                <text:p text:style-name="P6"><text:span text:style-name="T2">« Week-end » — Wikipédia (CC BY-SA)</text:span></text:p>
              </text:list-item>
              <text:list-item>
                <text:p text:style-name="P6"><text:span text:style-name="T2">« Le passé composé » — Wikiversité (CC BY-SA)</text:span></text:p>
              </text:list-item>
            </text:list>
            <text:p text:style-name="P3"><text:span text:style-name="T2">Ressource indépendante, sans affiliation. Textes originaux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3:57</meta:creation-date>
    <dc:date>2026-07-21T15:43:57</dc:date>
    <meta:document-statistic meta:object-count="189"/>
    <meta:generator>LibreOffice/24.2.7.2$Linux_X86_64 LibreOffice_project/420$Build-2</meta:generator>
  </office:meta>
</office:document-meta>
</file>