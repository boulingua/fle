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7" style:family="paragraph">
      <style:paragraph-properties fo:margin-left="3.528cm" fo:margin-right="0cm" fo:margin-top="0.141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2 — Raconter une anecdot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2 — Raconter une anecdot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(lycée) · classe 7 · Niveau E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Distinguer </text:span><text:span text:style-name="T3">passé composé</text:span><text:span text:style-name="T2"> (action) et </text:span><text:span text:style-name="T3">imparfait</text:span><text:span text:style-name="T2"> (décor)</text:span></text:p>
              </text:list-item>
              <text:list-item>
                <text:p text:style-name="P6"><text:span text:style-name="T2">Raconter une anecdote : décor → événement → chute</text:span></text:p>
              </text:list-item>
              <text:list-item>
                <text:p text:style-name="P6"><text:span text:style-name="T2">Utiliser les marqueurs : </text:span><text:span text:style-name="T4">un jour, soudain, alors, finalement</text:span></text:p>
              </text:list-item>
              <text:list-item>
                <text:p text:style-name="P6"><text:span text:style-name="T2">Rédiger ~150 mots en trois paragraphes</text:span></text:p>
              </text:list-item>
              <text:list-item>
                <text:p text:style-name="P6"><text:span text:style-name="T2">Relire et corriger le choix des temp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Au café, après les vacances.</text:span></text:p>
            <text:p text:style-name="P3"><text:span text:style-name="T2">— </text:span><text:span text:style-name="T2">Alors, ces vacances chez ta grand-mère ?</text:span></text:p>
            <text:p text:style-name="P3"><text:span text:style-name="T2">— </text:span><text:span text:style-name="T2">Un matin, je </text:span><text:span text:style-name="T3">prenais</text:span><text:span text:style-name="T2"> mon petit-déjeuner… il </text:span><text:span text:style-name="T3">faisait</text:span><text:span text:style-name="T2"> chaud, les oiseaux </text:span><text:span text:style-name="T3">chantaient</text:span><text:span text:style-name="T2">. Et là, </text:span><text:span text:style-name="T3">tout à coup</text:span><text:span text:style-name="T2">, une chèvre </text:span><text:span text:style-name="T3">a sauté</text:span><text:span text:style-name="T2"> la clôture et </text:span><text:span text:style-name="T3">a mangé</text:span><text:span text:style-name="T2"> ma tartine !</text:span></text:p>
            <text:p text:style-name="P3"><text:span text:style-name="T2">— </text:span><text:span text:style-name="T4">(elle rit)</text:span><text:span text:style-name="T2"> Non ! Et tu </text:span><text:span text:style-name="T3">as fait</text:span><text:span text:style-name="T2"> quoi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e anecdote drôle de vos vacances ?</text:span></text:p>
              </text:list-item>
              <text:list-item>
                <text:p text:style-name="P6"><text:span text:style-name="T2">Vacances ratées, quiproquo, rencontre inattendue ?</text:span></text:p>
              </text:list-item>
              <text:list-item>
                <text:p text:style-name="P6"><text:span text:style-name="T4">Soudain</text:span><text:span text:style-name="T2"> / </text:span><text:span text:style-name="T4">tout à coup</text:span><text:span text:style-name="T2"> → en allemand ?</text:span></text:p>
              </text:list-item>
              <text:list-item>
                <text:p text:style-name="P6"><text:span text:style-name="T2">Pourquoi a-t-on besoin d’un </text:span><text:span text:style-name="T3">décor</text:span><text:span text:style-name="T2"> avant l’</text:span><text:span text:style-name="T3">événement</text:span><text:span text:style-name="T2">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 point de langu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 point de langu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Imparfait = le décor</text:span><text:span text:style-name="T2"> </text:span><text:span text:style-name="T4">Il faisait beau, je portais un short, les gens se promenaient.</text:span></text:p>
            <text:p text:style-name="P3"><text:span text:style-name="T3">Passé composé = les actions</text:span><text:span text:style-name="T2"> </text:span><text:span text:style-name="T4">Soudain, un chien est arrivé et a attrapé mon ballon.</text:span></text:p>
            <text:p text:style-name="P3"><text:span text:style-name="T2">Image : imparfait = </text:span><text:span text:style-name="T3">film au ralenti</text:span><text:span text:style-name="T2"> · passé composé = </text:span><text:span text:style-name="T3">flash photo</text:span><text:span text:style-name="T2">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e anecdote · un souvenir</text:span></text:p>
              </text:list-item>
              <text:list-item>
                <text:p text:style-name="P6"><text:span text:style-name="T2">un jour · soudain / tout à coup · alors · finalement</text:span></text:p>
              </text:list-item>
              <text:list-item>
                <text:p text:style-name="P6"><text:span text:style-name="T2">il m’est arrivé… · par hasard · heureusement</text:span></text:p>
              </text:list-item>
              <text:list-item>
                <text:p text:style-name="P6"><text:span text:style-name="T2">c’était incroyable !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anecdote de Trista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anecdote de Trista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7"><text:span text:style-name="T5">L’été dernier, je </text:span><text:span text:style-name="T6">passais</text:span><text:span text:style-name="T5"> une semaine chez ma grand-mère. Il </text:span><text:span text:style-name="T6">faisait</text:span><text:span text:style-name="T5"> chaud.</text:span></text:p>
            <text:p text:style-name="P7"><text:span text:style-name="T5">Ce jour-là, je </text:span><text:span text:style-name="T6">prenais</text:span><text:span text:style-name="T5"> mon petit-déjeuner ; une chèvre </text:span><text:span text:style-name="T6">broutait</text:span><text:span text:style-name="T5"> derrière la clôture.</text:span></text:p>
            <text:p text:style-name="P7"><text:span text:style-name="T6">Soudain</text:span><text:span text:style-name="T5">, la chèvre </text:span><text:span text:style-name="T6">a sauté</text:span><text:span text:style-name="T5">, </text:span><text:span text:style-name="T6">a traversé</text:span><text:span text:style-name="T5"> le jardin et </text:span><text:span text:style-name="T6">a mangé</text:span><text:span text:style-name="T5"> ma tartine !</text:span></text:p>
            <text:p text:style-name="P7"><text:span text:style-name="T6">Finalement</text:span><text:span text:style-name="T5">, ma grand-mère </text:span><text:span text:style-name="T6">est arrivée</text:span><text:span text:style-name="T5"> et </text:span><text:span text:style-name="T6">a ri</text:span><text:span text:style-name="T5">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la nouvelle en Franc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la nouvelle en Franc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Guy de Maupassant</text:span><text:span text:style-name="T2"> (1850–1893) : des centaines de </text:span><text:span text:style-name="T4">nouvelles</text:span><text:span text:style-name="T2"> et </text:span><text:span text:style-name="T4">contes</text:span><text:span text:style-name="T2">, souvent parus dans les journaux.</text:span></text:p>
            <text:p text:style-name="P3"><text:span text:style-name="T2">Une situation ordinaire + une fin surprenante.</text:span></text:p>
            <text:p text:style-name="P3"><text:span text:style-name="T2">Œuvres dans le </text:span><text:span text:style-name="T3">domaine public</text:span><text:span text:style-name="T2"> (auteur mort il y a plus de 70 ans).</text:span></text:p>
            <text:p text:style-name="P3"><text:span text:style-name="T4">Source : Wikipédia, CC BY-SA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Ex. 1</text:span><text:span text:style-name="T2"> — Compréhension du texte</text:span></text:p>
              </text:list-item>
              <text:list-item>
                <text:p text:style-name="P6"><text:span text:style-name="T3">Ex. 2</text:span><text:span text:style-name="T2"> — Passé composé ou imparfait ?</text:span></text:p>
              </text:list-item>
              <text:list-item>
                <text:p text:style-name="P6"><text:span text:style-name="T3">Ex. 3</text:span><text:span text:style-name="T2"> — Décor (D) ou action (A) ?</text:span></text:p>
              </text:list-item>
              <text:list-item>
                <text:p text:style-name="P6"><text:span text:style-name="T3">Ex. 4</text:span><text:span text:style-name="T2"> — Remettre l’anecdote dans l’ordre</text:span></text:p>
              </text:list-item>
            </text:list>
            <text:p text:style-name="P3"><text:span text:style-name="T3">Différenciation :</text:span><text:span text:style-name="T2"> G (ex. 1 + 3, aide) · M (ex. 1–3) · E (les 4 + réécriture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Racontez </text:span><text:span text:style-name="T3">une anecdote</text:span><text:span text:style-name="T2"> (réelle ou inventée) en 3 paragraphes :</text:span></text:p>
            <text:list text:style-name="L5">
              <text:list-item>
                <text:p text:style-name="P3"><text:span text:style-name="T3">décor</text:span><text:span text:style-name="T2"> (imparfait)</text:span></text:p>
              </text:list-item>
              <text:list-item>
                <text:p text:style-name="P3"><text:span text:style-name="T3">événement</text:span><text:span text:style-name="T2"> (passé composé)</text:span></text:p>
              </text:list-item>
              <text:list-item>
                <text:p text:style-name="P3"><text:span text:style-name="T3">chute</text:span><text:span text:style-name="T2"> (réaction + conclusion)</text:span></text:p>
              </text:list-item>
            </text:list>
            <text:p text:style-name="P3"><text:span text:style-name="T2">Écrit ~150 mots </text:span><text:span text:style-name="T3">ou</text:span><text:span text:style-name="T2"> oral 1–2 min · 3 marqueurs · 5 PC · 5 imparfait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Je distingue PC / imparfait</text:span></text:p>
              </text:list-item>
              <text:list-item>
                <text:p text:style-name="P6"><text:span text:style-name="T2">☐ </text:span><text:span text:style-name="T2">J’utilise les marqueurs temporels</text:span></text:p>
              </text:list-item>
              <text:list-item>
                <text:p text:style-name="P6"><text:span text:style-name="T2">☐ </text:span><text:span text:style-name="T2">Je conjugue correctement les deux temps</text:span></text:p>
              </text:list-item>
              <text:list-item>
                <text:p text:style-name="P6"><text:span text:style-name="T2">☐ </text:span><text:span text:style-name="T2">Je raconte : décor → événement → chute</text:span></text:p>
              </text:list-item>
              <text:list-item>
                <text:p text:style-name="P6"><text:span text:style-name="T2">☐ </text:span><text:span text:style-name="T2">Je relis et je corrige les temp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Tâche 1</text:span><text:span text:style-name="T2"> — Compréhension écrite (8 P.)</text:span></text:p>
              </text:list-item>
              <text:list-item>
                <text:p text:style-name="P6"><text:span text:style-name="T3">Tâche 2</text:span><text:span text:style-name="T2"> — Grammaire PC / imparfait (10 P.)</text:span></text:p>
              </text:list-item>
              <text:list-item>
                <text:p text:style-name="P6"><text:span text:style-name="T3">Tâche 3</text:span><text:span text:style-name="T2"> — Expression écrite ~150 mots (12 P.)</text:span></text:p>
              </text:list-item>
            </text:list>
            <text:p text:style-name="P3"><text:span text:style-name="T3">Total : 30 point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Imparfait en français</text:span><text:span text:style-name="T2"> — Wikipédia, CC BY-SA 4.0</text:span></text:p>
              </text:list-item>
              <text:list-item>
                <text:p text:style-name="P6"><text:span text:style-name="T4">Passé composé</text:span><text:span text:style-name="T2"> — Wikipédia, CC BY-SA 4.0</text:span></text:p>
              </text:list-item>
              <text:list-item>
                <text:p text:style-name="P6"><text:span text:style-name="T4">Guy de Maupassant</text:span><text:span text:style-name="T2"> — Wikipédia, CC BY-SA 4.0</text:span></text:p>
              </text:list-item>
            </text:list>
            <text:p text:style-name="P3"><text:span text:style-name="T2">Plateforme indépendante, sans affiliation. Textes de récit originaux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09:21</meta:creation-date>
    <dc:date>2026-07-21T16:09:21</dc:date>
    <meta:document-statistic meta:object-count="185"/>
    <meta:generator>LibreOffice/24.2.7.2$Linux_X86_64 LibreOffice_project/420$Build-2</meta:generator>
  </office:meta>
</office:document-meta>
</file>