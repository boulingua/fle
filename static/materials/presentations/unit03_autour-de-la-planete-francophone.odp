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utour de la planète francopho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utour de la planète francopho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3 · Parcours G+M · classe 8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cinq pays francophones et leur capitale</text:span></text:p>
              </text:list-item>
              <text:list-item>
                <text:p text:style-name="P6"><text:span text:style-name="T2">Comprendre un court texte sur un pays francophone</text:span></text:p>
              </text:list-item>
              <text:list-item>
                <text:p text:style-name="P6"><text:span text:style-name="T2">Distinguer langue officielle / maternelle / d’enseignement</text:span></text:p>
              </text:list-item>
              <text:list-item>
                <text:p text:style-name="P6"><text:span text:style-name="T2">Présenter un pays francophone en ~90 s</text:span></text:p>
              </text:list-item>
              <text:list-item>
                <text:p text:style-name="P6"><text:span text:style-name="T2">Employer </text:span><text:span text:style-name="T3">au</text:span><text:span text:style-name="T2">, </text:span><text:span text:style-name="T3">en</text:span><text:span text:style-name="T2">, </text:span><text:span text:style-name="T3">aux</text:span><text:span text:style-name="T2"> devant un nom de pay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cours, une carte du monde au tableau.</text:span></text:p>
            <text:p text:style-name="P3"><text:span text:style-name="T2">— </text:span><text:span text:style-name="T2">Citez-moi des pays où on parle français. — La France, la Belgique, le Canada… — Et sur le continent africain ? — Le Sénégal ? — Savez-vous que le pays le plus francophone du monde est en Afriqu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ur combien de continents parle-t-on français ?</text:span></text:p>
              </text:list-item>
              <text:list-item>
                <text:p text:style-name="P6"><text:span text:style-name="T2">30, 100 ou plus de 300 millions de locuteur·rice·s ?</text:span></text:p>
              </text:list-item>
              <text:list-item>
                <text:p text:style-name="P6"><text:span text:style-name="T2">Un pays francophone jamais vu dans un manuel ?</text:span></text:p>
              </text:list-item>
              <text:list-item>
                <text:p text:style-name="P6"><text:span text:style-name="T3">franco-</text:span><text:span text:style-name="T2"> + </text:span><text:span text:style-name="T3">-phone</text:span><text:span text:style-name="T2"> (grec </text:span><text:span text:style-name="T3">phônê</text:span><text:span text:style-name="T2"> = la parol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francophonie = l’ensemble des pays où l’on parle français</text:span></text:p>
              </text:list-item>
              <text:list-item>
                <text:p text:style-name="P6"><text:span text:style-name="T2">un·e locuteur·rice = une personne qui parle une langue</text:span></text:p>
              </text:list-item>
              <text:list-item>
                <text:p text:style-name="P6"><text:span text:style-name="T2">la langue officielle = reconnue par l’État</text:span></text:p>
              </text:list-item>
              <text:list-item>
                <text:p text:style-name="P6"><text:span text:style-name="T2">la langue maternelle = apprise à la maison</text:span></text:p>
              </text:list-item>
              <text:list-item>
                <text:p text:style-name="P6"><text:span text:style-name="T2">la langue d’enseignement = celle de l’école</text:span></text:p>
              </text:list-item>
              <text:list-item>
                <text:p text:style-name="P6"><text:span text:style-name="T2">bilingue = qui parle deux lang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répositions de lie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répositions de lie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sculin → </text:span><text:span text:style-name="T4">au</text:span><text:span text:style-name="T2"> : au Sénégal, au Maroc, au Canada</text:span></text:p>
              </text:list-item>
              <text:list-item>
                <text:p text:style-name="P6"><text:span text:style-name="T2">Féminin → </text:span><text:span text:style-name="T4">en</text:span><text:span text:style-name="T2"> : en Suisse, en Belgique, en Côte d’Ivoire</text:span></text:p>
              </text:list-item>
              <text:list-item>
                <text:p text:style-name="P6"><text:span text:style-name="T2">Pluriel → </text:span><text:span text:style-name="T4">aux</text:span><text:span text:style-name="T2"> : aux États-Unis, aux Seychelles</text:span></text:p>
              </text:list-item>
            </text:list>
            <text:p text:style-name="P3"><text:span text:style-name="T2">Astuce : beaucoup de pays en </text:span><text:span text:style-name="T4">-e</text:span><text:span text:style-name="T2"> sont féminin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nq portrai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nq portrai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Sénégal (Dakar)</text:span><text:span text:style-name="T2"> — français officiel, wolof à la maison</text:span></text:p>
              </text:list-item>
              <text:list-item>
                <text:p text:style-name="P6"><text:span text:style-name="T4">Suisse (Berne)</text:span><text:span text:style-name="T2"> — 4 langues ; </text:span><text:span text:style-name="T3">septante</text:span><text:span text:style-name="T2">, </text:span><text:span text:style-name="T3">nonante</text:span></text:p>
              </text:list-item>
              <text:list-item>
                <text:p text:style-name="P6"><text:span text:style-name="T4">Belgique (Bruxelles)</text:span><text:span text:style-name="T2"> — 3 langues ; bilingue FR/NL</text:span></text:p>
              </text:list-item>
              <text:list-item>
                <text:p text:style-name="P6"><text:span text:style-name="T4">Maroc (Rabat)</text:span><text:span text:style-name="T2"> — arabe et amazigh officiels, français présent</text:span></text:p>
              </text:list-item>
              <text:list-item>
                <text:p text:style-name="P6"><text:span text:style-name="T4">Côte d’Ivoire (Yamoussoukro)</text:span><text:span text:style-name="T2"> — français seule langue officie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monde qui parle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 monde qui parle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viron </text:span><text:span text:style-name="T4">300 millions</text:span><text:span text:style-name="T2"> de locuteur·rice·s</text:span></text:p>
              </text:list-item>
              <text:list-item>
                <text:p text:style-name="P6"><text:span text:style-name="T2">Présent sur </text:span><text:span text:style-name="T4">tous les continents</text:span><text:span text:style-name="T2"> habités</text:span></text:p>
              </text:list-item>
              <text:list-item>
                <text:p text:style-name="P6"><text:span text:style-name="T2">Le pays le plus francophone : </text:span><text:span text:style-name="T4">RD Congo</text:span></text:p>
              </text:list-item>
              <text:list-item>
                <text:p text:style-name="P6"><text:span text:style-name="T2">La plus grande ville francophone : </text:span><text:span text:style-name="T4">Kinshasa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Quel pays ? (relier A–E)</text:span></text:p>
              </text:list-item>
              <text:list-item>
                <text:p text:style-name="P6"><text:span text:style-name="T2">La bonne préposition (au / en / aux)</text:span></text:p>
              </text:list-item>
              <text:list-item>
                <text:p text:style-name="P6"><text:span text:style-name="T2">Officielle, maternelle ou d’enseignement ?</text:span></text:p>
              </text:list-item>
              <text:list-item>
                <text:p text:style-name="P6"><text:span text:style-name="T2">Compréhension écrite (la note culturelle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 — monologue ~90 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 — monologue ~90 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un pays francophone :</text:span></text:p>
            <text:list text:style-name="L5">
              <text:list-item>
                <text:p text:style-name="P3"><text:span text:style-name="T2">Continent et capitale</text:span></text:p>
              </text:list-item>
              <text:list-item>
                <text:p text:style-name="P3"><text:span text:style-name="T2">Statut du français</text:span></text:p>
              </text:list-item>
              <text:list-item>
                <text:p text:style-name="P3"><text:span text:style-name="T2">Une langue ou un mot local</text:span></text:p>
              </text:list-item>
              <text:list-item>
                <text:p text:style-name="P3"><text:span text:style-name="T2">Une raison de le visiter</text:span></text:p>
              </text:list-item>
            </text:list>
            <text:p text:style-name="P3"><text:span text:style-name="T2">Critères : Contenu 6 · Langue 5 · Prononciation 4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ter 5 pays et leur capitale</text:span></text:p>
              </text:list-item>
              <text:list-item>
                <text:p text:style-name="P6"><text:span text:style-name="T2">Distinguer officielle / maternelle / d’enseignement</text:span></text:p>
              </text:list-item>
              <text:list-item>
                <text:p text:style-name="P6"><text:span text:style-name="T2">Employer au / en / aux</text:span></text:p>
              </text:list-item>
              <text:list-item>
                <text:p text:style-name="P6"><text:span text:style-name="T2">Savoir : pays le plus francophone = RD Congo</text:span></text:p>
              </text:list-item>
              <text:list-item>
                <text:p text:style-name="P6"><text:span text:style-name="T2">Tenir un monologue de 90 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.)</text:span></text:p>
              </text:list-item>
              <text:list-item>
                <text:p text:style-name="P6"><text:span text:style-name="T2">Tâche 2 — Monologue, production en continu (15 P.)</text:span></text:p>
              </text:list-item>
              <text:list-item>
                <text:p text:style-name="P6"><text:span text:style-name="T2">Tâche 3 — Prépositions (5 P.)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rancophonie — Wikipedia, CC BY-SA 4.0</text:span></text:p>
              </text:list-item>
              <text:list-item>
                <text:p text:style-name="P6"><text:span text:style-name="T2">Organisation internationale de la Francophonie — Wikipedia, CC BY-SA 4.0</text:span></text:p>
              </text:list-item>
              <text:list-item>
                <text:p text:style-name="P6"><text:span text:style-name="T2">RD Congo — Wikipedia, CC BY-SA 4.0</text:span></text:p>
              </text:list-item>
              <text:list-item>
                <text:p text:style-name="P6"><text:span text:style-name="T2">francophonie.org (lien documentair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41</meta:creation-date>
    <dc:date>2026-07-21T15:33:41</dc:date>
    <meta:document-statistic meta:object-count="185"/>
    <meta:generator>LibreOffice/24.2.7.2$Linux_X86_64 LibreOffice_project/420$Build-2</meta:generator>
  </office:meta>
</office:document-meta>
</file>