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écolonisation littér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écolonisation littér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3 · Parcours E · Classe 12 · Niveau E Introduction par Maryse Condé (paraphrase — autrice non tombée dans le domaine publi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sur la décolonisation littéraire</text:span></text:p>
              </text:list-item>
              <text:list-item>
                <text:p text:style-name="P6"><text:span text:style-name="T2">Expliquer le projet : rendre la parole aux voix effacées</text:span></text:p>
              </text:list-item>
              <text:list-item>
                <text:p text:style-name="P6"><text:span text:style-name="T2">Situer Maryse Condé et son œuvre (avec mes mots)</text:span></text:p>
              </text:list-item>
              <text:list-item>
                <text:p text:style-name="P6"><text:span text:style-name="T2">Présenter oralement (~6 min) une œuvre décoloniale</text:span></text:p>
              </text:list-item>
              <text:list-item>
                <text:p text:style-name="P6"><text:span text:style-name="T2">Employer la mise en relie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Nora : « On décolonise un pays, pas un livre… » Samuel : « Pendant des siècles, ce sont les colonisateurs qui ont écrit l’histoire des colonies. » Nora : « Donc décoloniser la littérature, c’est rendre la parole ? »</text:span></text:p>
            <text:p text:style-name="P3"><text:span text:style-name="T2">→ </text:span><text:span text:style-name="T2">Qui a longtemps écrit l’histoire des colonie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associations pour « décolonisation »</text:span></text:p>
              </text:list-item>
              <text:list-item>
                <text:p text:style-name="P6"><text:span text:style-name="T2">Dans les récits classiques : qui parle, qui reste muet ?</text:span></text:p>
              </text:list-item>
              <text:list-item>
                <text:p text:style-name="P6"><text:span text:style-name="T2">Maryse Condé · créolité · créolisation : ça vous parle ?</text:span></text:p>
              </text:list-item>
              <text:list-item>
                <text:p text:style-name="P6"><text:span text:style-name="T2">Pourquoi réécrire une histoire connu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ffacer / l’effacement · réécrire / la réécriture</text:span></text:p>
              </text:list-item>
              <text:list-item>
                <text:p text:style-name="P6"><text:span text:style-name="T2">rendre la parole · invisibiliser</text:span></text:p>
              </text:list-item>
              <text:list-item>
                <text:p text:style-name="P6"><text:span text:style-name="T2">la créolité · la créolisation · le métissage</text:span></text:p>
              </text:list-item>
              <text:list-item>
                <text:p text:style-name="P6"><text:span text:style-name="T2">la diaspora · un récit · une figure oubli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orter — La mise en relie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pporter — La mise en relie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c’est … qui / que</text:span><text:span text:style-name="T2"> : </text:span><text:span text:style-name="T4">C’est son nom que l’on veut sauver.</text:span></text:p>
              </text:list-item>
              <text:list-item>
                <text:p text:style-name="P6"><text:span text:style-name="T3">ce qui / ce que … c’est</text:span><text:span text:style-name="T2"> : </text:span><text:span text:style-name="T4">Ce qui compte, c’est la mémoire.</text:span></text:p>
              </text:list-item>
              <text:list-item>
                <text:p text:style-name="P6"><text:span text:style-name="T3">reprise par pronom</text:span><text:span text:style-name="T2"> : </text:span><text:span text:style-name="T4">Ces vies, on ne les raconte jamais.</text:span></text:p>
              </text:list-item>
              <text:list-item>
                <text:p text:style-name="P6"><text:span text:style-name="T3">anaphore</text:span><text:span text:style-name="T2"> : </text:span><text:span text:style-name="T4">Écrire, c’est nommer. Écrire, c’est résister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Rendre la parole aux silen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Rendre la parole aux silen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littérature décoloniale demande : qui a le droit de raconter ?</text:span></text:p>
              </text:list-item>
              <text:list-item>
                <text:p text:style-name="P6"><text:span text:style-name="T2">Colonisé·es longtemps réduits à des « figures muettes »</text:span></text:p>
              </text:list-item>
              <text:list-item>
                <text:p text:style-name="P6"><text:span text:style-name="T2">Décoloniser = renverser le rapport, inventer une voix</text:span></text:p>
              </text:list-item>
              <text:list-item>
                <text:p text:style-name="P6"><text:span text:style-name="T2">Scène : la vieille femme qui veut sauver le nom de sa grand-mè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créoli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créoli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ouvement littéraire antillais, manifeste de 1989</text:span></text:p>
              </text:list-item>
              <text:list-item>
                <text:p text:style-name="P6"><text:span text:style-name="T2">Bernabé, Chamoiseau, Confiant : une identité plurielle et métissée</text:span></text:p>
              </text:list-item>
              <text:list-item>
                <text:p text:style-name="P6"><text:span text:style-name="T2">Prolonge la réflexion de Glissant sur la créolisation</text:span></text:p>
              </text:list-item>
              <text:list-item>
                <text:p text:style-name="P6"><text:span text:style-name="T2">Source : Wikipédia (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(vrai/faux justifié)</text:span></text:p>
              </text:list-item>
              <text:list-item>
                <text:p text:style-name="P6"><text:span text:style-name="T2">Ex. 2 : vocabulaire (associations)</text:span></text:p>
              </text:list-item>
              <text:list-item>
                <text:p text:style-name="P6"><text:span text:style-name="T2">Ex. 3 : mise en relief (transformations)</text:span></text:p>
              </text:list-item>
              <text:list-item>
                <text:p text:style-name="P6"><text:span text:style-name="T2">Ex. 4 : plan pour le monologue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onologue (~6 min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onologue (~6 min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Introduction (qui, quand, où)</text:span></text:p>
              </text:list-item>
              <text:list-item>
                <text:p text:style-name="P6"><text:span text:style-name="T2">Projet de l’œuvre (quelle voix rendue ?)</text:span></text:p>
              </text:list-item>
              <text:list-item>
                <text:p text:style-name="P6"><text:span text:style-name="T2">Un concept (créolité / créolisation)</text:span></text:p>
              </text:list-item>
              <text:list-item>
                <text:p text:style-name="P6"><text:span text:style-name="T2">Lien avec aujourd’hui</text:span></text:p>
              </text:list-item>
              <text:list-item>
                <text:p text:style-name="P6"><text:span text:style-name="T2">Conclusion personnelle → au moins deux tournures de mise en relie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explique « décoloniser la littérature »</text:span></text:p>
              </text:list-item>
              <text:list-item>
                <text:p text:style-name="P6"><text:span text:style-name="T2">Je comprends l’idée principale d’un texte</text:span></text:p>
              </text:list-item>
              <text:list-item>
                <text:p text:style-name="P6"><text:span text:style-name="T2">Je situe Condé et son projet</text:span></text:p>
              </text:list-item>
              <text:list-item>
                <text:p text:style-name="P6"><text:span text:style-name="T2">Je parle en continu ~6 min, structuré</text:span></text:p>
              </text:list-item>
              <text:list-item>
                <text:p text:style-name="P6"><text:span text:style-name="T2">J’emploie la mise en relie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12 P.</text:span></text:p>
              </text:list-item>
              <text:list-item>
                <text:p text:style-name="P6"><text:span text:style-name="T2">Tâche 2 — Monologue (Sprechen) : 18 P.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aryse Condé — Wikipédia, CC BY-SA 4.0</text:span></text:p>
              </text:list-item>
              <text:list-item>
                <text:p text:style-name="P6"><text:span text:style-name="T2">Créolité — Wikipédia, CC BY-SA 4.0</text:span></text:p>
              </text:list-item>
              <text:list-item>
                <text:p text:style-name="P6"><text:span text:style-name="T2">Édouard Glissant — Wikipédia, CC BY-SA 4.0</text:span></text:p>
              </text:list-item>
              <text:list-item>
                <text:p text:style-name="P6"><text:span text:style-name="T2">Auteurs contemporains : paraphrase uniquem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05</meta:creation-date>
    <dc:date>2026-07-21T16:30:05</dc:date>
    <meta:document-statistic meta:object-count="185"/>
    <meta:generator>LibreOffice/24.2.7.2$Linux_X86_64 LibreOffice_project/420$Build-2</meta:generator>
  </office:meta>
</office:document-meta>
</file>