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1.05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Écologie au quotidie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cologie au quotidien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3"><text:span text:style-name="T2">Unité 3 · Parcours E · Classe 9 · Niveau E</text:span></text:p>
            <text:p text:style-name="P4"><text:span text:style-name="T3">Habitudes durables · donner des consei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Comprendre un article sur les éco-gestes</text:span></text:p>
              </text:list-item>
              <text:list-item>
                <text:p text:style-name="P7"><text:span text:style-name="T3">Décrire mes habitudes écologiques</text:span></text:p>
              </text:list-item>
              <text:list-item>
                <text:p text:style-name="P7"><text:span text:style-name="T3">Donner des conseils (impératif, conditionnel, </text:span><text:span text:style-name="T4">il faut que</text:span><text:span text:style-name="T3">)</text:span></text:p>
              </text:list-item>
              <text:list-item>
                <text:p text:style-name="P7"><text:span text:style-name="T3">Dialoguer et réagir à mon/ma partenaire</text:span></text:p>
              </text:list-item>
              <text:list-item>
                <text:p text:style-name="P7"><text:span text:style-name="T3">Justifier un choix (</text:span><text:span text:style-name="T4">parce que…, pour…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3">Devant le lycée, un lundi matin.</text:span></text:p>
            <text:list text:style-name="L3">
              <text:list-item>
                <text:p text:style-name="P4"><text:span text:style-name="T2">Léa</text:span><text:span text:style-name="T3"> vient en bus et culpabilise un peu.</text:span></text:p>
              </text:list-item>
              <text:list-item>
                <text:p text:style-name="P4"><text:span text:style-name="T3">Son frère prend la voiture pour 300 mètres.</text:span></text:p>
              </text:list-item>
              <text:list-item>
                <text:p text:style-name="P4"><text:span text:style-name="T2">Karim</text:span><text:span text:style-name="T3"> vient à vélo : « Tu devrais lui dire de marcher. »</text:span></text:p>
              </text:list-item>
              <text:list-item>
                <text:p text:style-name="P4"><text:span text:style-name="T3">« Le plus important, c’est de commencer petit et de continuer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Quels éco-gestes faites-vous chaque jour ?</text:span></text:p>
              </text:list-item>
              <text:list-item>
                <text:p text:style-name="P7"><text:span text:style-name="T3">Combien de poubelles chez vous ?</text:span></text:p>
              </text:list-item>
              <text:list-item>
                <text:p text:style-name="P7"><text:span text:style-name="T3">Du plus facile au plus difficile : éteindre la lumière · manger moins de viande · venir à vélo · acheter d’occasion</text:span></text:p>
              </text:list-item>
              <text:list-item>
                <text:p text:style-name="P7"><text:span text:style-name="T3">« Pour la planète, je pourrais commencer par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trier ses déchets · le tri sélectif</text:span></text:p>
              </text:list-item>
              <text:list-item>
                <text:p text:style-name="P7"><text:span text:style-name="T3">recycler · le recyclage</text:span></text:p>
              </text:list-item>
              <text:list-item>
                <text:p text:style-name="P7"><text:span text:style-name="T3">gaspiller ≠ économiser · réduire</text:span></text:p>
              </text:list-item>
              <text:list-item>
                <text:p text:style-name="P7"><text:span text:style-name="T3">l’empreinte carbone</text:span></text:p>
              </text:list-item>
              <text:list-item>
                <text:p text:style-name="P7"><text:span text:style-name="T3">l’énergie renouvelable</text:span></text:p>
              </text:list-item>
              <text:list-item>
                <text:p text:style-name="P7"><text:span text:style-name="T3">le covoiturage · les transports en commun</text:span></text:p>
              </text:list-item>
              <text:list-item>
                <text:p text:style-name="P7"><text:span text:style-name="T3">d’occasion · jetable ≠ réutilisable · durab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donner un conse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donner un conseil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2">Impératif :</text:span><text:span text:style-name="T3"> </text:span><text:span text:style-name="T4">Trie tes déchets !</text:span></text:p>
              </text:list-item>
              <text:list-item>
                <text:p text:style-name="P7"><text:span text:style-name="T2">Conditionnel :</text:span><text:span text:style-name="T3"> </text:span><text:span text:style-name="T4">Tu devrais marcher. On pourrait covoiturer.</text:span></text:p>
              </text:list-item>
              <text:list-item>
                <text:p text:style-name="P7"><text:span text:style-name="T2">Il faut que + subjonctif :</text:span><text:span text:style-name="T3"> </text:span><text:span text:style-name="T4">Il faut que tu prennes le vélo.</text:span></text:p>
              </text:list-item>
              <text:list-item>
                <text:p text:style-name="P7"><text:span text:style-name="T2">Si + imparfait, … conditionnel :</text:span><text:span text:style-name="T3"> </text:span><text:span text:style-name="T4">Si tu triais, tu jetterais moins.</text:span></text:p>
              </text:list-item>
            </text:list>
            <text:p text:style-name="P4"><text:span text:style-name="T3">Attention : après </text:span><text:span text:style-name="T4">si</text:span><text:span text:style-name="T3">, jamais de conditionnel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Commencer petit, mais commenc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Commencer petit, mais commenc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Être écolo ≠ tout changer d’un coup</text:span></text:p>
              </text:list-item>
              <text:list-item>
                <text:p text:style-name="P7"><text:span text:style-name="T3">Trier · économiser l’eau · éteindre les appareils</text:span></text:p>
              </text:list-item>
              <text:list-item>
                <text:p text:style-name="P7"><text:span text:style-name="T3">Vélo / transports en commun pour les petits trajets</text:span></text:p>
              </text:list-item>
              <text:list-item>
                <text:p text:style-name="P7"><text:span text:style-name="T3">Acheter d’occasion plutôt que du neuf</text:span></text:p>
              </text:list-item>
              <text:list-item>
                <text:p text:style-name="P7"><text:span text:style-name="T3">Ni argent, ni temps : commencer et continu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2">La Semaine européenne de la mobilité</text:span></text:p>
            <text:list text:style-name="L3">
              <text:list-item>
                <text:p text:style-name="P4"><text:span text:style-name="T3">Chaque année, du 16 au 22 septembre</text:span></text:p>
              </text:list-item>
              <text:list-item>
                <text:p text:style-name="P4"><text:span text:style-name="T3">Se termine par une « journée sans voiture »</text:span></text:p>
              </text:list-item>
              <text:list-item>
                <text:p text:style-name="P4"><text:span text:style-name="T3">Rues réservées aux piétons, vélos, transports en commun</text:span></text:p>
              </text:list-item>
              <text:list-item>
                <text:p text:style-name="P4"><text:span text:style-name="T3">Portée par l’Union européenne depuis 2002</text:span></text:p>
              </text:list-item>
            </text:list>
            <text:p text:style-name="P4"><text:span text:style-name="T4">(Source :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7"><text:span text:style-name="T3">Compréhension écrite (texte)</text:span></text:p>
              </text:list-item>
              <text:list-item>
                <text:p text:style-name="P7"><text:span text:style-name="T3">Vocabulaire à compléter</text:span></text:p>
              </text:list-item>
              <text:list-item>
                <text:p text:style-name="P7"><text:span text:style-name="T3">Conseils au conditionnel</text:span></text:p>
              </text:list-item>
              <text:list-item>
                <text:p text:style-name="P7"><text:span text:style-name="T3">Hypothèses (si + imparfait)</text:span></text:p>
              </text:list-item>
            </text:list>
            <text:p text:style-name="P4"><text:span text:style-name="T3">→ </text:span><text:span text:style-name="T3">Corrigé sous « Solutions » → 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dialogue (~12 réplique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dialogue (~12 répliques)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3">En binôme : - 3 éco-gestes chacun·e - au moins 2 conseils à l’autre - 1 hypothèse (</text:span><text:span text:style-name="T4">Si nous…, nous …rions</text:span><text:span text:style-name="T3">) - 1 défi pour la semaine</text:span></text:p>
            <text:p text:style-name="P4"><text:span text:style-name="T3">Critères : tâche · langue · interaction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☐ </text:span><text:span text:style-name="T3">10 mots de l’écologie</text:span></text:p>
              </text:list-item>
              <text:list-item>
                <text:p text:style-name="P7"><text:span text:style-name="T3">☐ </text:span><text:span text:style-name="T3">Conseiller de 3 façons</text:span></text:p>
              </text:list-item>
              <text:list-item>
                <text:p text:style-name="P7"><text:span text:style-name="T3">☐ </text:span><text:span text:style-name="T3">Hypothèse </text:span><text:span text:style-name="T4">si + imparfait</text:span></text:p>
              </text:list-item>
              <text:list-item>
                <text:p text:style-name="P7"><text:span text:style-name="T3">☐ </text:span><text:span text:style-name="T3">Comprendre un court article</text:span></text:p>
              </text:list-item>
              <text:list-item>
                <text:p text:style-name="P7"><text:span text:style-name="T3">☐ </text:span><text:span text:style-name="T3">Dialoguer et réag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2">Tâche 1 :</text:span><text:span text:style-name="T3"> compréhension écrite (10)</text:span></text:p>
              </text:list-item>
              <text:list-item>
                <text:p text:style-name="P7"><text:span text:style-name="T2">Tâche 2 :</text:span><text:span text:style-name="T3"> conseil + hypothèse (8)</text:span></text:p>
              </text:list-item>
              <text:list-item>
                <text:p text:style-name="P7"><text:span text:style-name="T2">Tâche 3 :</text:span><text:span text:style-name="T3"> dialogue écrit ~140 mots (12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4">Semaine européenne de la mobilité</text:span><text:span text:style-name="T3"> — Wikipédia, CC BY-SA 4.0</text:span></text:p>
              </text:list-item>
              <text:list-item>
                <text:p text:style-name="P7"><text:span text:style-name="T4">Collecte sélective</text:span><text:span text:style-name="T3"> — Wikipédia, CC BY-SA 4.0</text:span></text:p>
              </text:list-item>
              <text:list-item>
                <text:p text:style-name="P7"><text:span text:style-name="T3">ADEME — agirpourlatransition.ademe.fr (site officiel, non affili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07</meta:creation-date>
    <dc:date>2026-07-21T16:16:07</dc:date>
    <meta:document-statistic meta:object-count="185"/>
    <meta:generator>LibreOffice/24.2.7.2$Linux_X86_64 LibreOffice_project/420$Build-2</meta:generator>
  </office:meta>
</office:document-meta>
</file>