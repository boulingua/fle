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3 — Écologie au quotidie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3 — Écologie au quotidie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9 · </text:span><text:span text:style-name="T3">Niveau M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</text:span><text:span text:style-name="T3">huit gestes écologiques</text:span><text:span text:style-name="T2"> du quotidien</text:span></text:p>
              </text:list-item>
              <text:list-item>
                <text:p text:style-name="P6"><text:span text:style-name="T2">Comprendre un </text:span><text:span text:style-name="T3">court article</text:span><text:span text:style-name="T2"> sur le climat</text:span></text:p>
              </text:list-item>
              <text:list-item>
                <text:p text:style-name="P6"><text:span text:style-name="T2">Donner un conseil : </text:span><text:span text:style-name="T4">il faut / on devrait</text:span><text:span text:style-name="T2"> + infinitif</text:span></text:p>
              </text:list-item>
              <text:list-item>
                <text:p text:style-name="P6"><text:span text:style-name="T2">Prendre position : deux arguments </text:span><text:span text:style-name="T3">pour</text:span><text:span text:style-name="T2"> et </text:span><text:span text:style-name="T3">contre</text:span></text:p>
              </text:list-item>
              <text:list-item>
                <text:p text:style-name="P6"><text:span text:style-name="T2">Réagir poliment à une opin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À la cantine :</text:span></text:p>
            <text:list text:style-name="L3">
              <text:list-item>
                <text:p text:style-name="P3"><text:span text:style-name="T3">Léa :</text:span><text:span text:style-name="T2"> Il y a trois poubelles maintenant : verre, plastique, déchets.</text:span></text:p>
              </text:list-item>
              <text:list-item>
                <text:p text:style-name="P3"><text:span text:style-name="T3">Théo :</text:span><text:span text:style-name="T2"> Je trie mal, moi…</text:span></text:p>
              </text:list-item>
              <text:list-item>
                <text:p text:style-name="P3"><text:span text:style-name="T3">Léa :</text:span><text:span text:style-name="T2"> On apprend ! Moi, je suis flexitarienne.</text:span></text:p>
              </text:list-item>
              <text:list-item>
                <text:p text:style-name="P3"><text:span text:style-name="T3">Mehdi :</text:span><text:span text:style-name="T2"> Chez moi, on cuisine beaucoup de légumes.</text:span></text:p>
              </text:list-item>
              <text:list-item>
                <text:p text:style-name="P3"><text:span text:style-name="T3">Théo :</text:span><text:span text:style-name="T2"> Il faut manger moins de viande et mieux trier. On devrait commencer aujourd’hui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faites-vous déjà pour la planète ?</text:span></text:p>
              </text:list-item>
              <text:list-item>
                <text:p text:style-name="P6"><text:span text:style-name="T2">Triez-vous vos déchets à la maison ?</text:span></text:p>
              </text:list-item>
              <text:list-item>
                <text:p text:style-name="P6"><text:span text:style-name="T2">Mangez-vous de la viande tous les jours ?</text:span></text:p>
              </text:list-item>
              <text:list-item>
                <text:p text:style-name="P6"><text:span text:style-name="T2">Comment venez-vous au collèg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 — 8 gest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 — 8 gest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ier les déchets · prendre une douche courte</text:span></text:p>
              </text:list-item>
              <text:list-item>
                <text:p text:style-name="P6"><text:span text:style-name="T2">éteindre la lumière · acheter local et de saison</text:span></text:p>
              </text:list-item>
              <text:list-item>
                <text:p text:style-name="P6"><text:span text:style-name="T2">manger moins de viande · se déplacer à vélo</text:span></text:p>
              </text:list-item>
              <text:list-item>
                <text:p text:style-name="P6"><text:span text:style-name="T2">réparer au lieu de jeter · acheter d’occas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conseill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conseill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il faut</text:span><text:span text:style-name="T2"> + inf. → conseil fort : </text:span><text:span text:style-name="T4">Il faut trier.</text:span></text:p>
              </text:list-item>
              <text:list-item>
                <text:p text:style-name="P6"><text:span text:style-name="T3">on devrait</text:span><text:span text:style-name="T2"> + inf. → conseil doux : </text:span><text:span text:style-name="T4">On devrait pédaler.</text:span></text:p>
              </text:list-item>
              <text:list-item>
                <text:p text:style-name="P6"><text:span text:style-name="T3">il est important de</text:span><text:span text:style-name="T2"> + inf. : </text:span><text:span text:style-name="T4">… de réparer.</text:span></text:p>
              </text:list-item>
              <text:list-item>
                <text:p text:style-name="P6"><text:span text:style-name="T3">il vaut mieux</text:span><text:span text:style-name="T2"> + inf. : </text:span><text:span text:style-name="T4">… acheter d’occasion.</text:span></text:p>
              </text:list-item>
            </text:list>
            <text:p text:style-name="P3"><text:span text:style-name="T4">Il faut</text:span><text:span text:style-name="T2"> est </text:span><text:span text:style-name="T3">impersonnel</text:span><text:span text:style-name="T2"> et </text:span><text:span text:style-name="T3">invariable</text:span><text:span text:style-name="T2"> → toujours + infinitif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« Le climat change, et nous ?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« Le climat change, et nous ?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 France : </text:span><text:span text:style-name="T3">~8 tonnes</text:span><text:span text:style-name="T2"> de gaz à effet de serre / personne / an</text:span></text:p>
              </text:list-item>
              <text:list-item>
                <text:p text:style-name="P6"><text:span text:style-name="T2">Objectif : </text:span><text:span text:style-name="T3">réduire de moitié</text:span></text:p>
              </text:list-item>
              <text:list-item>
                <text:p text:style-name="P6"><text:span text:style-name="T2">Trois postes lourds : </text:span><text:span text:style-name="T3">alimentation · logement · transports</text:span></text:p>
              </text:list-item>
              <text:list-item>
                <text:p text:style-name="P6"><text:span text:style-name="T2">« Il n’est pas nécessaire d’être parfait : il est important de commencer.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s chiffres de l’empreinte carbone en France sont publiés </text:span><text:span text:style-name="T3">en accès libre</text:span><text:span text:style-name="T2"> par les services publics (Insee, ministère de l’Environnement).</text:span></text:p>
            <text:p text:style-name="P3"><text:span text:style-name="T2">Trois postes dominent : </text:span><text:span text:style-name="T3">alimentation, logement, transports</text:span><text:span text:style-name="T2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 (4 questions)</text:span></text:p>
              </text:list-item>
              <text:list-item>
                <text:p text:style-name="P6"><text:span text:style-name="T2">Transformer un ordre en conseil (</text:span><text:span text:style-name="T4">il faut / on devrait</text:span><text:span text:style-name="T2">)</text:span></text:p>
              </text:list-item>
              <text:list-item>
                <text:p text:style-name="P6"><text:span text:style-name="T2">Associer geste ↔ effet</text:span></text:p>
              </text:list-item>
              <text:list-item>
                <text:p text:style-name="P6"><text:span text:style-name="T2">Pour ou contre : repas végétarien à la cantin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fférenci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fférenci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G :</text:span><text:span text:style-name="T2"> un seul camp + banque de mots</text:span></text:p>
              </text:list-item>
              <text:list-item>
                <text:p text:style-name="P6"><text:span text:style-name="T3">M :</text:span><text:span text:style-name="T2"> deux arguments par camp</text:span></text:p>
              </text:list-item>
              <text:list-item>
                <text:p text:style-name="P6"><text:span text:style-name="T3">E :</text:span><text:span text:style-name="T2"> objection nuancée </text:span><text:span text:style-name="T4">« Certes…, mais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dialo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dialo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« Faut-il arrêter de manger de la viande ? »</text:span></text:p>
            <text:list text:style-name="L3">
              <text:list-item>
                <text:p text:style-name="P3"><text:span text:style-name="T3">A</text:span><text:span text:style-name="T2"> pour · </text:span><text:span text:style-name="T3">B</text:span><text:span text:style-name="T2"> contre</text:span></text:p>
              </text:list-item>
              <text:list-item>
                <text:p text:style-name="P3"><text:span text:style-name="T2">2 arguments + 1 question chacun·e</text:span></text:p>
              </text:list-item>
              <text:list-item>
                <text:p text:style-name="P3"><text:span text:style-name="T3">3 fois</text:span><text:span text:style-name="T2"> </text:span><text:span text:style-name="T4">il faut / on devrait</text:span></text:p>
              </text:list-item>
              <text:list-item>
                <text:p text:style-name="P3"><text:span text:style-name="T2">terminer par un </text:span><text:span text:style-name="T3">comprom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8 gestes écologiques</text:span></text:p>
              </text:list-item>
              <text:list-item>
                <text:p text:style-name="P6"><text:span text:style-name="T2">☐ </text:span><text:span text:style-name="T2">Je comprends un court article</text:span></text:p>
              </text:list-item>
              <text:list-item>
                <text:p text:style-name="P6"><text:span text:style-name="T2">☐ </text:span><text:span text:style-name="T2">J’emploie </text:span><text:span text:style-name="T4">il faut / on devrait</text:span><text:span text:style-name="T2"> + inf.</text:span></text:p>
              </text:list-item>
              <text:list-item>
                <text:p text:style-name="P6"><text:span text:style-name="T2">☐ </text:span><text:span text:style-name="T2">Je donne 2 arguments pour / contre</text:span></text:p>
              </text:list-item>
              <text:list-item>
                <text:p text:style-name="P6"><text:span text:style-name="T2">☐ </text:span><text:span text:style-name="T2">Je réagis poli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âche 1</text:span><text:span text:style-name="T2"> — Compréhension écrite · 10 P.</text:span></text:p>
              </text:list-item>
              <text:list-item>
                <text:p text:style-name="P6"><text:span text:style-name="T3">Tâche 2</text:span><text:span text:style-name="T2"> — Grammaire (conseils) · 8 P.</text:span></text:p>
              </text:list-item>
              <text:list-item>
                <text:p text:style-name="P6"><text:span text:style-name="T3">Tâche 3</text:span><text:span text:style-name="T2"> — Expression écrite (~120 mots) ·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nsee — </text:span><text:span text:style-name="T4">Empreinte carbone de la France 2024</text:span><text:span text:style-name="T2"> (Licence Ouverte / Etalab 2.0)</text:span></text:p>
              </text:list-item>
              <text:list-item>
                <text:p text:style-name="P6"><text:span text:style-name="T2">SDES / ministère de la Transition écologique (Licence Ouverte / Etalab 2.0)</text:span></text:p>
              </text:list-item>
              <text:list-item>
                <text:p text:style-name="P6"><text:span text:style-name="T2">ADEME — </text:span><text:span text:style-name="T4">Répartition de l’empreinte carbone des Françai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19</meta:creation-date>
    <dc:date>2026-07-21T15:34:19</dc:date>
    <meta:document-statistic meta:object-count="189"/>
    <meta:generator>LibreOffice/24.2.7.2$Linux_X86_64 LibreOffice_project/420$Build-2</meta:generator>
  </office:meta>
</office:document-meta>
</file>