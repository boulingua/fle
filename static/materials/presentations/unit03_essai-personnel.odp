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Essai personnel : struct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Essai personnel : struct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3 · Niveau E Compétence : expression écrit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essai / dissertation / commentaire</text:span></text:p>
              </text:list-item>
              <text:list-item>
                <text:p text:style-name="P6"><text:span text:style-name="T2">Construire un plan : thèse, développement, chute</text:span></text:p>
              </text:list-item>
              <text:list-item>
                <text:p text:style-name="P6"><text:span text:style-name="T2">Écrire à la première personne, avec rigueur</text:span></text:p>
              </text:list-item>
              <text:list-item>
                <text:p text:style-name="P6"><text:span text:style-name="T2">Intégrer des connecteurs logiques</text:span></text:p>
              </text:list-item>
              <text:list-item>
                <text:p text:style-name="P6"><text:span text:style-name="T2">Rédiger un essai personnel (~50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éa :</text:span><text:span text:style-name="T2"> On nous a toujours dit qu’en dissertation il ne faut jamais écrire « je ».</text:span></text:p>
            <text:p text:style-name="P3"><text:span text:style-name="T3">L’enseignant :</text:span><text:span text:style-name="T2"> Dans un essai, tu penses à voix haute : ta voix fait partie du texte.</text:span></text:p>
            <text:p text:style-name="P3"><text:span text:style-name="T3">Léa :</text:span><text:span text:style-name="T2"> Donc j’écris ce que je veux ?</text:span></text:p>
            <text:p text:style-name="P3"><text:span text:style-name="T3">L’enseignant :</text:span><text:span text:style-name="T2"> Ce que tu </text:span><text:span text:style-name="T3">penses</text:span><text:span text:style-name="T2">. La liberté de l’essai n’est pas l’absence de rigueu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texte où l’auteur défend une idée par son expérience ?</text:span></text:p>
              </text:list-item>
              <text:list-item>
                <text:p text:style-name="P6"><text:span text:style-name="T2">Quels genres acceptent le « je » ?</text:span></text:p>
              </text:list-item>
              <text:list-item>
                <text:p text:style-name="P6"><text:span text:style-name="T2">Que signifie « avoir une voix » dans un texte ?</text:span></text:p>
              </text:list-item>
              <text:list-item>
                <text:p text:style-name="P6"><text:span text:style-name="T4">« Écrire, pour moi, c’est 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thèse : l’idée directrice</text:span></text:p>
              </text:list-item>
              <text:list-item>
                <text:p text:style-name="P6"><text:span text:style-name="T2">un argument : une raison</text:span></text:p>
              </text:list-item>
              <text:list-item>
                <text:p text:style-name="P6"><text:span text:style-name="T2">un exemple : un fait concret</text:span></text:p>
              </text:list-item>
              <text:list-item>
                <text:p text:style-name="P6"><text:span text:style-name="T2">une chute : la phrase finale marquante</text:span></text:p>
              </text:list-item>
              <text:list-item>
                <text:p text:style-name="P6"><text:span text:style-name="T2">un connecteur logique : un mot qui relie</text:span></text:p>
              </text:list-item>
              <text:list-item>
                <text:p text:style-name="P6"><text:span text:style-name="T2">étayer / nuancer un propo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Ajouter :</text:span><text:span text:style-name="T2"> de plus, en outre, par ailleurs</text:span></text:p>
              </text:list-item>
              <text:list-item>
                <text:p text:style-name="P6"><text:span text:style-name="T3">Opposer :</text:span><text:span text:style-name="T2"> cependant, pourtant, en revanche</text:span></text:p>
              </text:list-item>
              <text:list-item>
                <text:p text:style-name="P6"><text:span text:style-name="T3">Expliquer :</text:span><text:span text:style-name="T2"> car, en effet, puisque</text:span></text:p>
              </text:list-item>
              <text:list-item>
                <text:p text:style-name="P6"><text:span text:style-name="T3">Conclure :</text:span><text:span text:style-name="T2"> ainsi, donc, en somme</text:span></text:p>
              </text:list-item>
            </text:list>
            <text:p text:style-name="P3"><text:span text:style-name="T2">Astuce : souvent placé en </text:span><text:span text:style-name="T3">début de phrase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-modèle — « Pourquoi j’écris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-modèle — « Pourquoi j’écris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7"><text:span text:style-name="T5">J’écris pour comprendre ce que je pense.</text:span></text:p>
            <text:p text:style-name="P7"><text:span text:style-name="T5">La phrase précède souvent la pensée.</text:span></text:p>
            <text:p text:style-name="P7"><text:span text:style-name="T5">Écrire, c’est aussi se trahir.</text:span></text:p>
            <text:p text:style-name="P7"><text:span text:style-name="T5">J’écris pour me rencontr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« essai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« essai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1580 : Montaigne publie </text:span><text:span text:style-name="T4">Les Essais</text:span></text:p>
              </text:list-item>
              <text:list-item>
                <text:p text:style-name="P6"><text:span text:style-name="T2">« essayer » = tenter, éprouver</text:span></text:p>
              </text:list-item>
              <text:list-item>
                <text:p text:style-name="P6"><text:span text:style-name="T2">Devise : </text:span><text:span text:style-name="T4">« Que sais-je ? »</text:span></text:p>
              </text:list-item>
              <text:list-item>
                <text:p text:style-name="P6"><text:span text:style-name="T2">Un genre : réflexion personnelle et subjective assumée</text:span></text:p>
              </text:list-item>
            </text:list>
            <text:p text:style-name="P3"><text:span text:style-name="T2">(paraphrasé de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-modèle</text:span></text:p>
              </text:list-item>
              <text:list-item>
                <text:p text:style-name="P6"><text:span text:style-name="T2">Distinguer les trois genres</text:span></text:p>
              </text:list-item>
              <text:list-item>
                <text:p text:style-name="P6"><text:span text:style-name="T2">Compléter avec les connecteurs</text:span></text:p>
              </text:list-item>
              <text:list-item>
                <text:p text:style-name="P6"><text:span text:style-name="T2">Plan-éclair : « Pourquoi lire ? »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otre </text:span><text:span text:style-name="T3">essai personnel</text:span><text:span text:style-name="T2"> (~500 mots) </text:span><text:span text:style-name="T4">Pourquoi apprendre une langue ? / voyager ? / écrire ?</text:span></text:p>
            <text:list text:style-name="L3">
              <text:list-item>
                <text:p text:style-name="P3"><text:span text:style-name="T2">thèse claire · 4 connecteurs · voix « je » · chute</text:span></text:p>
              </text:list-item>
            </text:list>
            <text:p text:style-name="P3"><text:span text:style-name="T2">Critères : structure · voix · cohérence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les trois genres</text:span></text:p>
              </text:list-item>
              <text:list-item>
                <text:p text:style-name="P6"><text:span text:style-name="T2">Je formule une thèse</text:span></text:p>
              </text:list-item>
              <text:list-item>
                <text:p text:style-name="P6"><text:span text:style-name="T2">J’utilise des connecteurs</text:span></text:p>
              </text:list-item>
              <text:list-item>
                <text:p text:style-name="P6"><text:span text:style-name="T2">J’écris « je » avec rigueur</text:span></text:p>
              </text:list-item>
              <text:list-item>
                <text:p text:style-name="P6"><text:span text:style-name="T2">Je termine par une chu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: 8 pts</text:span></text:p>
              </text:list-item>
              <text:list-item>
                <text:p text:style-name="P6"><text:span text:style-name="T2">Tâche 2 — Genres et connecteurs : 6 pts</text:span></text:p>
              </text:list-item>
              <text:list-item>
                <text:p text:style-name="P6"><text:span text:style-name="T2">Tâche 3 — Expression écrite (~500 mots) : 16 p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ssais (Montaigne)</text:span><text:span text:style-name="T2"> — Wikipédia, CC BY-SA</text:span></text:p>
              </text:list-item>
              <text:list-item>
                <text:p text:style-name="P6"><text:span text:style-name="T4">Essai</text:span><text:span text:style-name="T2"> —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42</meta:creation-date>
    <dc:date>2026-07-21T16:30:42</dc:date>
    <meta:document-statistic meta:object-count="185"/>
    <meta:generator>LibreOffice/24.2.7.2$Linux_X86_64 LibreOffice_project/420$Build-2</meta:generator>
  </office:meta>
</office:document-meta>
</file>