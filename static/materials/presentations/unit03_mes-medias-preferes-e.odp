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es médias préféré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es médias préféré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3 · Parcours E · Classe 8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mes médias préférés et mes habitudes</text:span></text:p>
              </text:list-item>
              <text:list-item>
                <text:p text:style-name="P6"><text:span text:style-name="T2">Donner et </text:span><text:span text:style-name="T3">justifier</text:span><text:span text:style-name="T2"> mon opinion (</text:span><text:span text:style-name="T4">parce que</text:span><text:span text:style-name="T2">)</text:span></text:p>
              </text:list-item>
              <text:list-item>
                <text:p text:style-name="P6"><text:span text:style-name="T2">Dialoguer sur mes goûts médiatiques</text:span></text:p>
              </text:list-item>
              <text:list-item>
                <text:p text:style-name="P6"><text:span text:style-name="T2">Comprendre un court texte sur les médias</text:span></text:p>
              </text:list-item>
              <text:list-item>
                <text:p text:style-name="P6"><text:span text:style-name="T2">Utiliser un vocabulaire précis des média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Karim : « Qu’est-ce que tu écoutes ? »</text:span></text:p>
              </text:list-item>
              <text:list-item>
                <text:p text:style-name="P6"><text:span text:style-name="T2">Anouk : un podcast d’histoire, le matin, dans le bus</text:span></text:p>
              </text:list-item>
              <text:list-item>
                <text:p text:style-name="P6"><text:span text:style-name="T2">Karim : une série le soir, un épisode par jour</text:span></text:p>
              </text:list-item>
              <text:list-item>
                <text:p text:style-name="P6"><text:span text:style-name="T2">Et vous : écouter ou regarder ? À quel moment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le série / vidéo en ce moment ?</text:span></text:p>
              </text:list-item>
              <text:list-item>
                <text:p text:style-name="P6"><text:span text:style-name="T2">Quel podcast / quelle musique ?</text:span></text:p>
              </text:list-item>
              <text:list-item>
                <text:p text:style-name="P6"><text:span text:style-name="T2">YouTube, télé ou streaming ? Pourquoi ?</text:span></text:p>
              </text:list-item>
              <text:list-item>
                <text:p text:style-name="P6"><text:span text:style-name="T2">Combien de temps par jour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série · un épisode · une saison</text:span></text:p>
              </text:list-item>
              <text:list-item>
                <text:p text:style-name="P6"><text:span text:style-name="T2">une plateforme de streaming</text:span></text:p>
              </text:list-item>
              <text:list-item>
                <text:p text:style-name="P6"><text:span text:style-name="T2">un podcast (une baladodiffusion)</text:span></text:p>
              </text:list-item>
              <text:list-item>
                <text:p text:style-name="P6"><text:span text:style-name="T2">une chaîne · un·e youtubeur·euse</text:span></text:p>
              </text:list-item>
              <text:list-item>
                <text:p text:style-name="P6"><text:span text:style-name="T2">s’abonner · le replay · l’actualité</text:span></text:p>
              </text:list-item>
              <text:list-item>
                <text:p text:style-name="P6"><text:span text:style-name="T2">télécharger · en direct · les écouteur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Verbes : trouver, penser, préférer, adorer, recommander…</text:span></text:p>
              </text:list-item>
              <text:list-item>
                <text:p text:style-name="P6"><text:span text:style-name="T4">Je trouve que c’est génial.</text:span><text:span text:style-name="T2"> → </text:span><text:span text:style-name="T3">indicatif</text:span></text:p>
              </text:list-item>
              <text:list-item>
                <text:p text:style-name="P6"><text:span text:style-name="T4">Je préfère les podcasts </text:span><text:span text:style-name="T5">aux</text:span><text:span text:style-name="T4"> vidéos.</text:span><text:span text:style-name="T2"> (X </text:span><text:span text:style-name="T3">à</text:span><text:span text:style-name="T2"> Y)</text:span></text:p>
              </text:list-item>
              <text:list-item>
                <text:p text:style-name="P6"><text:span text:style-name="T2">Justifier : </text:span><text:span text:style-name="T4">…parce que…</text:span></text:p>
              </text:list-item>
              <text:list-item>
                <text:p text:style-name="P6"><text:span text:style-name="T2">Réagir : </text:span><text:span text:style-name="T4">Moi aussi ! / Pas moi, je préfère…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Podcast</text:span><text:span text:style-name="T2"> → en français : </text:span><text:span text:style-name="T3">« baladodiffusion »</text:span><text:span text:style-name="T2"> (« balado » au Canada)</text:span></text:p>
              </text:list-item>
              <text:list-item>
                <text:p text:style-name="P6"><text:span text:style-name="T2">Formé de </text:span><text:span text:style-name="T4">balade</text:span><text:span text:style-name="T2"> + </text:span><text:span text:style-name="T4">diffusion</text:span></text:p>
              </text:list-item>
              <text:list-item>
                <text:p text:style-name="P6"><text:span text:style-name="T2">Écouter ou regarder au moment de son choix</text:span></text:p>
              </text:list-item>
              <text:list-item>
                <text:p text:style-name="P6"><text:span text:style-name="T2">Source :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Compréhension du texte</text:span></text:p>
              </text:list-item>
              <text:list-item>
                <text:p text:style-name="P6"><text:span text:style-name="T2">Ex. 2 Verbes d’opinion (conjugaison)</text:span></text:p>
              </text:list-item>
              <text:list-item>
                <text:p text:style-name="P6"><text:span text:style-name="T2">Ex. 3 Justifier avec </text:span><text:span text:style-name="T4">parce que</text:span></text:p>
              </text:list-item>
              <text:list-item>
                <text:p text:style-name="P6"><text:span text:style-name="T2">Ex. 4 Réagir à un avis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alogue en binôme (~10 répliques) - 1 série + 1 podcast + 1 chaîne - 3 verbes d’opinion · 2 justifications - 1 réaction · 1 recommanda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8 mots des médias</text:span></text:p>
              </text:list-item>
              <text:list-item>
                <text:p text:style-name="P6"><text:span text:style-name="T2">☐ </text:span><text:span text:style-name="T2">4 verbes d’opinion</text:span></text:p>
              </text:list-item>
              <text:list-item>
                <text:p text:style-name="P6"><text:span text:style-name="T2">☐ </text:span><text:span text:style-name="T2">justifier avec </text:span><text:span text:style-name="T4">parce que</text:span></text:p>
              </text:list-item>
              <text:list-item>
                <text:p text:style-name="P6"><text:span text:style-name="T2">☐ </text:span><text:span text:style-name="T2">réagir à l’autre</text:span></text:p>
              </text:list-item>
              <text:list-item>
                <text:p text:style-name="P6"><text:span text:style-name="T2">☐ </text:span><text:span text:style-name="T2">dialogue de ~10 répliqu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1 Compréhension écrite (8 P.)</text:span></text:p>
              </text:list-item>
              <text:list-item>
                <text:p text:style-name="P6"><text:span text:style-name="T2">T2 Vocabulaire + opinion (10 P.)</text:span></text:p>
              </text:list-item>
              <text:list-item>
                <text:p text:style-name="P6"><text:span text:style-name="T2">T3 Dialogue écrit ~120 mots (12 P.)</text:span></text:p>
              </text:list-item>
              <text:list-item>
                <text:p text:style-name="P6"><text:span text:style-name="T3">Total : 30 po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1:05</meta:creation-date>
    <dc:date>2026-07-21T16:11:05</dc:date>
    <meta:document-statistic meta:object-count="177"/>
    <meta:generator>LibreOffice/24.2.7.2$Linux_X86_64 LibreOffice_project/420$Build-2</meta:generator>
  </office:meta>
</office:document-meta>
</file>