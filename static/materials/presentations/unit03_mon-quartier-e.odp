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Mon quarti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Mon quarti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 Places, directions, prépositions de lie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la sé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odèle de la sé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ctiver → Apporter → S’entraîner → Produire → Réfléchir Durée : 45 minut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dix lieux du quartier</text:span></text:p>
              </text:list-item>
              <text:list-item>
                <text:p text:style-name="P6"><text:span text:style-name="T2">Situer un lieu avec les prépositions</text:span></text:p>
              </text:list-item>
              <text:list-item>
                <text:p text:style-name="P6"><text:span text:style-name="T2">Comprendre une lettre de quartier</text:span></text:p>
              </text:list-item>
              <text:list-item>
                <text:p text:style-name="P6"><text:span text:style-name="T2">Écrire une lettre à un·e correspondant·e</text:span></text:p>
              </text:list-item>
              <text:list-item>
                <text:p text:style-name="P6"><text:span text:style-name="T2">Maîtriser les articles contractés (du, de la, d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fait visiter sa rue à Karim.</text:span></text:p>
            <text:list text:style-name="L3">
              <text:list-item>
                <text:p text:style-name="P3"><text:span text:style-name="T2">« En face de nous, c’est la pâtisserie. »</text:span></text:p>
              </text:list-item>
              <text:list-item>
                <text:p text:style-name="P3"><text:span text:style-name="T2">« La librairie de Camille, à côté. »</text:span></text:p>
              </text:list-item>
              <text:list-item>
                <text:p text:style-name="P3"><text:span text:style-name="T2">« La boulangerie est au coin de la rue, à gauch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Y a-t-il une boulangerie près de chez vous ?</text:span></text:p>
              </text:list-item>
              <text:list-item>
                <text:p text:style-name="P6"><text:span text:style-name="T2">Où faites-vous vos courses ?</text:span></text:p>
              </text:list-item>
              <text:list-item>
                <text:p text:style-name="P6"><text:span text:style-name="T2">Quel est votre lieu préféré du quarti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x lieux du quarti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x lieux du quarti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boulangerie · la pâtisserie · la librairie · la poste · la mairie le parc · la gare · la pharmacie · le supermarché · la médiathèq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prépositions de lieu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prépositions de lieu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face de · à côté de · près de · loin de au coin de · entre … et … · devant · derriè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articles contract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articles contract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e + le → </text:span><text:span text:style-name="T3">du</text:span><text:span text:style-name="T2"> : en face </text:span><text:span text:style-name="T3">du</text:span><text:span text:style-name="T2"> parc</text:span></text:p>
              </text:list-item>
              <text:list-item>
                <text:p text:style-name="P6"><text:span text:style-name="T2">de + les → </text:span><text:span text:style-name="T3">des</text:span><text:span text:style-name="T2"> : près </text:span><text:span text:style-name="T3">des</text:span><text:span text:style-name="T2"> commerces</text:span></text:p>
              </text:list-item>
              <text:list-item>
                <text:p text:style-name="P6"><text:span text:style-name="T2">de + la → </text:span><text:span text:style-name="T3">de la</text:span><text:span text:style-name="T2"> : à côté </text:span><text:span text:style-name="T3">de la</text:span><text:span text:style-name="T2"> poste</text:span></text:p>
              </text:list-item>
              <text:list-item>
                <text:p text:style-name="P6"><text:span text:style-name="T2">de + l’ → </text:span><text:span text:style-name="T3">de l’</text:span><text:span text:style-name="T2"> : au coin </text:span><text:span text:style-name="T3">de l’</text:span><text:span text:style-name="T2">aven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lettre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lettre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ue calme, beaucoup d’arbres</text:span></text:p>
              </text:list-item>
              <text:list-item>
                <text:p text:style-name="P6"><text:span text:style-name="T2">À côté : la pâtisserie d’Hugo</text:span></text:p>
              </text:list-item>
              <text:list-item>
                <text:p text:style-name="P6"><text:span text:style-name="T2">En face : la pharmacie de Mme Klein</text:span></text:p>
              </text:list-item>
              <text:list-item>
                <text:p text:style-name="P6"><text:span text:style-name="T2">Au coin : la librairie de Camille</text:span></text:p>
              </text:list-item>
              <text:list-item>
                <text:p text:style-name="P6"><text:span text:style-name="T2">Derrière : le parc · La gare : lo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France, le mot « boulangerie » est protégé par la loi. Le pain doit être pétri, façonné et cuit sur place. La boulangerie reste un lieu de quartier. (Source : Wikipédia, CC-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prépositions + contractions</text:span></text:p>
              </text:list-item>
              <text:list-item>
                <text:p text:style-name="P6"><text:span text:style-name="T2">Ex. 3 : vocabulaire des commerces</text:span></text:p>
              </text:list-item>
              <text:list-item>
                <text:p text:style-name="P6"><text:span text:style-name="T2">Ex. 4 : production guidée (pla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ttre à un·e correspondant·e (~120 mots)</text:span></text:p>
            <text:list text:style-name="L3">
              <text:list-item>
                <text:p text:style-name="P3"><text:span text:style-name="T2">5 lieux · 4 prépositions</text:span></text:p>
              </text:list-item>
              <text:list-item>
                <text:p text:style-name="P3"><text:span text:style-name="T2">appel + clôture</text:span></text:p>
              </text:list-item>
              <text:list-item>
                <text:p text:style-name="P3"><text:span text:style-name="T2">ce que j’aime dans mon quarti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dix lieux</text:span></text:p>
              </text:list-item>
              <text:list-item>
                <text:p text:style-name="P6"><text:span text:style-name="T2">Je situe avec les prépositions</text:span></text:p>
              </text:list-item>
              <text:list-item>
                <text:p text:style-name="P6"><text:span text:style-name="T2">Je fais les contractions du / des</text:span></text:p>
              </text:list-item>
              <text:list-item>
                <text:p text:style-name="P6"><text:span text:style-name="T2">Je comprends et j’écris une lettre de quarti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·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·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éhension écrite : 10 P.</text:span></text:p>
              </text:list-item>
              <text:list-item>
                <text:p text:style-name="P6"><text:span text:style-name="T2">Vocabulaire et langue : 8 P.</text:span></text:p>
              </text:list-item>
              <text:list-item>
                <text:p text:style-name="P6"><text:span text:style-name="T2">Expression écrite :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« Boulangerie » — CC-BY-SA 4.0</text:span></text:p>
              </text:list-item>
              <text:list-item>
                <text:p text:style-name="P6"><text:span text:style-name="T2">Wikipédia « Commerce de proximité » — CC-BY-SA 4.0</text:span></text:p>
              </text:list-item>
              <text:list-item>
                <text:p text:style-name="P6"><text:span text:style-name="T2">Géoportail (IGN) — geoportail.gouv.f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24</meta:creation-date>
    <dc:date>2026-07-21T16:09:24</dc:date>
    <meta:document-statistic meta:object-count="193"/>
    <meta:generator>LibreOffice/24.2.7.2$Linux_X86_64 LibreOffice_project/420$Build-2</meta:generator>
  </office:meta>
</office:document-meta>
</file>