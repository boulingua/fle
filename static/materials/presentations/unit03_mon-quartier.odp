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11.43cm" style:use-optimal-column-width="false"/>
    </style:style>
    <style:style style:name="ro1" style:family="table-row">
      <style:table-row-properties style:row-height="0cm" style:use-optimal-row-height="true"/>
    </style:style>
    <style:style style:name="ce1" style:family="table-cell">
      <loext:graphic-properties draw:fill="solid" draw:fill-color="#4f81bd" draw:textarea-vertical-align="top" fo:padding-top="0.127cm" fo:padding-bottom="0.127cm" fo:padding-left="0.254cm" fo:padding-right="0.254cm"/>
      <style:paragraph-properties fo:border="0.48pt solid #ffffff"/>
    </style:style>
    <style:style style:name="ce2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9ecf3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style:paragraph-properties fo:margin-left="3.528cm" fo:margin-right="0cm" fo:margin-top="0.141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bold" fo:background-color="transparent" style:font-size-asian="24pt" style:font-style-asian="italic" style:font-weight-asian="bold" style:font-size-complex="24pt" style:font-style-complex="italic" style:font-weight-complex="bold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3 — Mon quarti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3 — Mon quarti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G+M · Classe 7 · Niveau M</text:span></text:p>
            <text:p text:style-name="P3"><text:span text:style-name="T2">Places en ville · directions · prépositions de lieu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Nommer 10 lieux du quartier</text:span></text:p>
              </text:list-item>
              <text:list-item>
                <text:p text:style-name="P6"><text:span text:style-name="T2">Situer avec </text:span><text:span text:style-name="T3">à côté de, en face de, près de…</text:span></text:p>
              </text:list-item>
              <text:list-item>
                <text:p text:style-name="P6"><text:span text:style-name="T2">Comprendre un texte qui décrit un quartier</text:span></text:p>
              </text:list-item>
              <text:list-item>
                <text:p text:style-name="P6"><text:span text:style-name="T2">Écrire une description de son quartier (6–8 phrases)</text:span></text:p>
              </text:list-item>
              <text:list-item>
                <text:p text:style-name="P6"><text:span text:style-name="T2">Indiquer un chemin simpl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Léa fait visiter son quartier à Inès (de Lyon).</text:span></text:p>
            <text:list text:style-name="L3">
              <text:list-item>
                <text:p text:style-name="P3"><text:span text:style-name="T2">« À gauche, c’est la boulangerie. »</text:span></text:p>
              </text:list-item>
              <text:list-item>
                <text:p text:style-name="P3"><text:span text:style-name="T2">« En face, c’est la mairie ; à côté, la poste. »</text:span></text:p>
              </text:list-item>
              <text:list-item>
                <text:p text:style-name="P3"><text:span text:style-name="T2">« L’arrêt de bus est au coin de la rue, devant la pharmacie. »</text:span></text:p>
              </text:list-item>
            </text:list>
            <text:p text:style-name="P3"><text:span text:style-name="T4">Et vous ? Quel lieu montreriez-vous en premier ?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Qu’y a-t-il près de chez vous ?</text:span></text:p>
              </text:list-item>
              <text:list-item>
                <text:p text:style-name="P6"><text:span text:style-name="T2">Où achetez-vous le pain ?</text:span></text:p>
              </text:list-item>
              <text:list-item>
                <text:p text:style-name="P6"><text:span text:style-name="T2">Où empruntez-vous des livres ?</text:span></text:p>
              </text:list-item>
              <text:list-item>
                <text:p text:style-name="P6"><text:span text:style-name="T2">Où est l’arrêt de bus le plus proche ?</text:span></text:p>
              </text:list-item>
            </text:list>
            <text:p text:style-name="P3"><text:span text:style-name="T2">→ </text:span><text:span text:style-name="T2">On note tous les lieux connus au tableau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5" draw:style-name="gr2" draw:layer="layout" svg:width="22.859cm" svg:height="6.679cm" svg:x="1.27cm" svg:y="3.316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7"><text:span text:style-name="T5">Français</text:span></text:p>
              </table:table-cell>
              <table:table-cell>
                <text:p text:style-name="P7"><text:span text:style-name="T5">Allemand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6">la boulangerie</text:span></text:p>
              </table:table-cell>
              <table:table-cell>
                <text:p text:style-name="P7"><text:span text:style-name="T6">die Bäckerei</text:span></text:p>
              </table:table-cell>
            </table:table-row>
            <table:table-row table:style-name="ro1" table:default-cell-style-name="ce3">
              <table:table-cell>
                <text:p text:style-name="P7"><text:span text:style-name="T6">la pharmacie</text:span></text:p>
              </table:table-cell>
              <table:table-cell>
                <text:p text:style-name="P7"><text:span text:style-name="T6">die Apotheke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6">le supermarché</text:span></text:p>
              </table:table-cell>
              <table:table-cell>
                <text:p text:style-name="P7"><text:span text:style-name="T6">der Supermarkt</text:span></text:p>
              </table:table-cell>
            </table:table-row>
            <table:table-row table:style-name="ro1" table:default-cell-style-name="ce3">
              <table:table-cell>
                <text:p text:style-name="P7"><text:span text:style-name="T6">la poste</text:span></text:p>
              </table:table-cell>
              <table:table-cell>
                <text:p text:style-name="P7"><text:span text:style-name="T6">die Post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6">la bibliothèque</text:span></text:p>
              </table:table-cell>
              <table:table-cell>
                <text:p text:style-name="P7"><text:span text:style-name="T6">die Bibliothek</text:span></text:p>
              </table:table-cell>
            </table:table-row>
            <table:table-row table:style-name="ro1" table:default-cell-style-name="ce3">
              <table:table-cell>
                <text:p text:style-name="P7"><text:span text:style-name="T6">l’arrêt de bus</text:span></text:p>
              </table:table-cell>
              <table:table-cell>
                <text:p text:style-name="P7"><text:span text:style-name="T6">die Bushaltestelle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6">la mairie</text:span></text:p>
              </table:table-cell>
              <table:table-cell>
                <text:p text:style-name="P7"><text:span text:style-name="T6">das Rathau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épositions de lieu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répositions de lieu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4">à côté de</text:span><text:span text:style-name="T2"> (neben) · </text:span><text:span text:style-name="T4">en face de</text:span><text:span text:style-name="T2"> (gegenüber)</text:span></text:p>
              </text:list-item>
              <text:list-item>
                <text:p text:style-name="P6"><text:span text:style-name="T4">près de</text:span><text:span text:style-name="T2"> (in der Nähe) · </text:span><text:span text:style-name="T4">loin de</text:span><text:span text:style-name="T2"> (weit von)</text:span></text:p>
              </text:list-item>
              <text:list-item>
                <text:p text:style-name="P6"><text:span text:style-name="T4">au coin de</text:span><text:span text:style-name="T2"> (an der Ecke) · </text:span><text:span text:style-name="T4">devant / derrière</text:span></text:p>
              </text:list-item>
            </text:list>
            <text:p text:style-name="P3"><text:span text:style-name="T4">Contraction :</text:span><text:span text:style-name="T2"> de + le → </text:span><text:span text:style-name="T4">du</text:span><text:span text:style-name="T2"> </text:span><text:span text:style-name="T3">en face </text:span><text:span text:style-name="T7">du</text:span><text:span text:style-name="T3"> café</text:span><text:span text:style-name="T2"> · </text:span><text:span text:style-name="T3">à côté </text:span><text:span text:style-name="T7">de la</text:span><text:span text:style-name="T3"> post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 quartier de Léa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Le quartier de Léa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8"><text:span text:style-name="T8">À côté de chez moi, il y a la boulangerie d’Hugo. En face, la pharmacie. Au coin de la rue, un café. Le parc est derrière la bibliothèque. L’arrêt de bus n°3 est devant la mairie. J’aime mon quartier : tout est près !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e culturelle — la boulangeri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Note culturelle — la boulangeri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Lieu central de la vie du quartier en France</text:span></text:p>
              </text:list-item>
              <text:list-item>
                <text:p text:style-name="P6"><text:span text:style-name="T2">Le nom « boulangerie » est protégé par la loi (décret de 1993) : pain pétri et cuit sur place</text:span></text:p>
              </text:list-item>
              <text:list-item>
                <text:p text:style-name="P6"><text:span text:style-name="T2">2022 : savoir-faire de la baguette inscrits au patrimoine immatériel de l’UNESCO</text:span></text:p>
              </text:list-item>
            </text:list>
            <text:p text:style-name="P3"><text:span text:style-name="T3">(D’après Wikipédia, CC BY-SA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7">
              <text:list-item>
                <text:p text:style-name="P6"><text:span text:style-name="T2">Compréhension du texte (5 questions)</text:span></text:p>
              </text:list-item>
              <text:list-item>
                <text:p text:style-name="P6"><text:span text:style-name="T2">Prépositions à compléter (attention </text:span><text:span text:style-name="T3">du / de la</text:span><text:span text:style-name="T2">)</text:span></text:p>
              </text:list-item>
              <text:list-item>
                <text:p text:style-name="P6"><text:span text:style-name="T2">Relier lieu ↔ définition</text:span></text:p>
              </text:list-item>
              <text:list-item>
                <text:p text:style-name="P6"><text:span text:style-name="T2">Indiquer le chemin (tout droit / à droite / à gauche)</text:span></text:p>
              </text:list-item>
            </text:list>
            <text:p text:style-name="P3"><text:span text:style-name="T4">Différenciation G / M / 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4">Décris ton quartier</text:span><text:span text:style-name="T2"> (~70–80 mots)</text:span></text:p>
            <text:list text:style-name="L3">
              <text:list-item>
                <text:p text:style-name="P3"><text:span text:style-name="T2">Au moins 5 lieux</text:span></text:p>
              </text:list-item>
              <text:list-item>
                <text:p text:style-name="P3"><text:span text:style-name="T2">Au moins 3 prépositions différentes</text:span></text:p>
              </text:list-item>
              <text:list-item>
                <text:p text:style-name="P3"><text:span text:style-name="T2">Une phrase : ce que tu aimes</text:span></text:p>
              </text:list-item>
            </text:list>
            <text:p text:style-name="P3"><text:span text:style-name="T2">Critères : contenu 4 · langue 4 · cohérence 2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☐ </text:span><text:span text:style-name="T2">Je nomme 10 lieux</text:span></text:p>
              </text:list-item>
              <text:list-item>
                <text:p text:style-name="P6"><text:span text:style-name="T2">☐ </text:span><text:span text:style-name="T2">J’utilise les prépositions de lieu</text:span></text:p>
              </text:list-item>
              <text:list-item>
                <text:p text:style-name="P6"><text:span text:style-name="T2">☐ </text:span><text:span text:style-name="T2">Je fais la contraction </text:span><text:span text:style-name="T3">de + le → du</text:span></text:p>
              </text:list-item>
              <text:list-item>
                <text:p text:style-name="P6"><text:span text:style-name="T2">☐ </text:span><text:span text:style-name="T2">Je comprends un texte de quartier</text:span></text:p>
              </text:list-item>
              <text:list-item>
                <text:p text:style-name="P6"><text:span text:style-name="T2">☐ </text:span><text:span text:style-name="T2">J’écris une description de 6–8 phrase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4">Klassenarbeit (30 P.)</text:span></text:p>
            <text:list text:style-name="L3">
              <text:list-item>
                <text:p text:style-name="P3"><text:span text:style-name="T2">Vocabulaire : 10 P.</text:span></text:p>
              </text:list-item>
              <text:list-item>
                <text:p text:style-name="P3"><text:span text:style-name="T2">Compréhension écrite : 10 P.</text:span></text:p>
              </text:list-item>
              <text:list-item>
                <text:p text:style-name="P3"><text:span text:style-name="T2">Expression écrite (~70 mots) : 10 P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Wikipédia — « Boulangerie », CC BY-SA 4.0</text:span></text:p>
              </text:list-item>
              <text:list-item>
                <text:p text:style-name="P6"><text:span text:style-name="T2">Wikipédia — « Baguette de pain », CC BY-SA 4.0</text:span></text:p>
              </text:list-item>
              <text:list-item>
                <text:p text:style-name="P6"><text:span text:style-name="T2">Géoportail (IGN) — cartes des ville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5:44:00</meta:creation-date>
    <dc:date>2026-07-21T15:44:00</dc:date>
    <meta:document-statistic meta:object-count="185"/>
    <meta:generator>LibreOffice/24.2.7.2$Linux_X86_64 LibreOffice_project/420$Build-2</meta:generator>
  </office:meta>
</office:document-meta>
</file>