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number text:level="2" style:num-suffix="." style:num-format="1">
        <style:list-level-properties text:space-before="0.952cm" text:min-label-width="0.95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3 — Presse d’opin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3 — Presse d’opin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11 · Niveau E</text:span></text:p>
            <text:p text:style-name="P3"><text:span text:style-name="T2">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ire un éditorial : thèse, arguments, ton</text:span></text:p>
              </text:list-item>
              <text:list-item>
                <text:p text:style-name="P6"><text:span text:style-name="T2">Distinguer fait / opinion / insinuation</text:span></text:p>
              </text:list-item>
              <text:list-item>
                <text:p text:style-name="P6"><text:span text:style-name="T2">Repérer les procédés rhétoriques</text:span></text:p>
              </text:list-item>
              <text:list-item>
                <text:p text:style-name="P6"><text:span text:style-name="T2">Présenter une analyse à l’oral</text:span></text:p>
              </text:list-item>
              <text:list-item>
                <text:p text:style-name="P6"><text:span text:style-name="T2">Prendre position en argumentan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ans la rédaction du journal du lycée :</text:span></text:p>
            <text:p text:style-name="P3"><text:span text:style-name="T2">« La cantine sert une nourriture immangeable. » → Fait ou opinion ?</text:span></text:p>
            <text:p text:style-name="P3"><text:span text:style-name="T2">Un bon éditorial : défendre un point de vue avec des arguments — et l’assumer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rois sujets qui divisent l’opinion ?</text:span></text:p>
              </text:list-item>
              <text:list-item>
                <text:p text:style-name="P6"><text:span text:style-name="T2">Fait ou opinion ?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Il a plu mardi.</text:span></text:p>
                  </text:list-item>
                  <text:list-item>
                    <text:p text:style-name="P7"><text:span text:style-name="T3">Ce film est le meilleur de l’année.</text:span></text:p>
                  </text:list-item>
                  <text:list-item>
                    <text:p text:style-name="P7"><text:span text:style-name="T3">Le prix du pain a augmenté.</text:span></text:p>
                  </text:list-item>
                </text:list>
              </text:list-item>
              <text:list-item>
                <text:p text:style-name="P6"><text:span text:style-name="T2">Quel ton pour un éditorial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éditorial / la presse d’opinion</text:span></text:p>
              </text:list-item>
              <text:list-item>
                <text:p text:style-name="P6"><text:span text:style-name="T2">une thèse · un argument · un contre-argument</text:span></text:p>
              </text:list-item>
              <text:list-item>
                <text:p text:style-name="P6"><text:span text:style-name="T2">un fait · une opinion · une insinuation</text:span></text:p>
              </text:list-item>
              <text:list-item>
                <text:p text:style-name="P6"><text:span text:style-name="T2">un connecteur logique · le parti pri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Connecteur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Connecteur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jouter : d’abord, ensuite, de plus, enfin</text:span></text:p>
              </text:list-item>
              <text:list-item>
                <text:p text:style-name="P6"><text:span text:style-name="T2">Illustrer : par exemple, ainsi, notamment</text:span></text:p>
              </text:list-item>
              <text:list-item>
                <text:p text:style-name="P6"><text:span text:style-name="T2">Opposer / concéder : mais, cependant, certes… néanmoins</text:span></text:p>
              </text:list-item>
              <text:list-item>
                <text:p text:style-name="P6"><text:span text:style-name="T2">Conclure : donc, par conséquent, en somme</text:span></text:p>
              </text:list-item>
            </text:list>
            <text:p text:style-name="P3"><text:span text:style-name="T2">Concéder avant de réfuter : « Certes… ; néanmoins…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ditorial-modè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ditorial-modè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4">Le vélo n’est pas un caprice</text:span></text:p>
            <text:list text:style-name="L3">
              <text:list-item>
                <text:p text:style-name="P3"><text:span text:style-name="T2">Constat : la ville étouffe</text:span></text:p>
              </text:list-item>
              <text:list-item>
                <text:p text:style-name="P3"><text:span text:style-name="T2">Thèse : les pistes cyclables, une question de bon sens</text:span></text:p>
              </text:list-item>
              <text:list-item>
                <text:p text:style-name="P3"><text:span text:style-name="T2">Arguments : sécurité · espace · coût</text:span></text:p>
              </text:list-item>
              <text:list-item>
                <text:p text:style-name="P3"><text:span text:style-name="T2">Contre-argument : les commerçants → réfuté</text:span></text:p>
              </text:list-item>
              <text:list-item>
                <text:p text:style-name="P3"><text:span text:style-name="T2">Chute : rendre la ville respirab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oi du 29 juillet 1881 : liberté de la presse en France</text:span></text:p>
              </text:list-item>
              <text:list-item>
                <text:p text:style-name="P6"><text:span text:style-name="T2">Presse d’information vs presse d’opinion</text:span></text:p>
              </text:list-item>
              <text:list-item>
                <text:p text:style-name="P6"><text:span text:style-name="T2">L’éditorial : la position assumée de la rédaction, séparée de l’information</text:span></text:p>
              </text:list-item>
            </text:list>
            <text:p text:style-name="P3"><text:span text:style-name="T2">(Source :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6">
              <text:list-item>
                <text:p text:style-name="P6"><text:span text:style-name="T2">Analyser l’éditorial-modèle</text:span></text:p>
              </text:list-item>
              <text:list-item>
                <text:p text:style-name="P6"><text:span text:style-name="T2">Fait / opinion / insinuation</text:span></text:p>
              </text:list-item>
              <text:list-item>
                <text:p text:style-name="P6"><text:span text:style-name="T2">Repérer cinq connecteurs</text:span></text:p>
              </text:list-item>
              <text:list-item>
                <text:p text:style-name="P6"><text:span text:style-name="T2">Reformuler pour assumer l’opinion</text:span></text:p>
              </text:list-item>
            </text:list>
            <text:p text:style-name="P3"><text:span text:style-name="T2">Différenciation : G (ex. 1-2) · M (ex. 1-3) · E (ex. 1-4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Exposé oral (~3 min) :</text:span></text:p>
            <text:list text:style-name="L6">
              <text:list-item>
                <text:p text:style-name="P3"><text:span text:style-name="T2">Sujet et thèse</text:span></text:p>
              </text:list-item>
              <text:list-item>
                <text:p text:style-name="P3"><text:span text:style-name="T2">Arguments + contre-argument</text:span></text:p>
              </text:list-item>
              <text:list-item>
                <text:p text:style-name="P3"><text:span text:style-name="T2">Un procédé rhétorique + fait/opinion</text:span></text:p>
              </text:list-item>
              <text:list-item>
                <text:p text:style-name="P3"><text:span text:style-name="T2">Position personnelle justifié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repère thèse et arguments</text:span></text:p>
              </text:list-item>
              <text:list-item>
                <text:p text:style-name="P6"><text:span text:style-name="T2">Je distingue fait / opinion / insinuation</text:span></text:p>
              </text:list-item>
              <text:list-item>
                <text:p text:style-name="P6"><text:span text:style-name="T2">J’identifie les connecteurs</text:span></text:p>
              </text:list-item>
              <text:list-item>
                <text:p text:style-name="P6"><text:span text:style-name="T2">Je présente une analyse structurée</text:span></text:p>
              </text:list-item>
              <text:list-item>
                <text:p text:style-name="P6"><text:span text:style-name="T2">Je prends posi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. Compréhension écrite (12 pts) : thèse, arguments, contre-argument, fait/opinion, connecteurs</text:span></text:p>
              </text:list-item>
              <text:list-item>
                <text:p text:style-name="P6"><text:span text:style-name="T2">B. Expression orale (8 pts) : thèse, 2 arguments, 1 contre-argument, connecteurs</text:span></text:p>
              </text:list-item>
            </text:list>
            <text:p text:style-name="P3"><text:span text:style-name="T2">Total : 20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9:27</meta:creation-date>
    <dc:date>2026-07-21T16:29:27</dc:date>
    <meta:document-statistic meta:object-count="181"/>
    <meta:generator>LibreOffice/24.2.7.2$Linux_X86_64 LibreOffice_project/420$Build-2</meta:generator>
  </office:meta>
</office:document-meta>
</file>