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4 — Argumenter pour / cont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4 — Argumenter pour / cont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9 · Niveau E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tructurer un texte argumentatif en 4 paragraphes</text:span></text:p>
              </text:list-item>
              <text:list-item>
                <text:p text:style-name="P6"><text:span text:style-name="T2">Employer 8 connecteurs logiques</text:span></text:p>
              </text:list-item>
              <text:list-item>
                <text:p text:style-name="P6"><text:span text:style-name="T2">Présenter oralement une position nuancée</text:span></text:p>
              </text:list-item>
              <text:list-item>
                <text:p text:style-name="P6"><text:span text:style-name="T2">Rédiger un billet d’opinion (~180 mots)</text:span></text:p>
              </text:list-item>
              <text:list-item>
                <text:p text:style-name="P6"><text:span text:style-name="T2">Distinguer opinion et argumen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Cours d’éducation civique — Mme Devos ouvre le débat : « Faut-il interdire les écrans en classe ? »</text:span></text:p>
            <text:list text:style-name="L3">
              <text:list-item>
                <text:p text:style-name="P3"><text:span text:style-name="T2">Anouk : d’un côté, les écrans sont utiles…</text:span></text:p>
              </text:list-item>
              <text:list-item>
                <text:p text:style-name="P3"><text:span text:style-name="T2">Karim : d’un autre côté, ça distrait…</text:span></text:p>
              </text:list-item>
              <text:list-item>
                <text:p text:style-name="P3"><text:span text:style-name="T2">Anouk : néanmoins, un usage encadré serait mieux.</text:span></text:p>
              </text:list-item>
            </text:list>
            <text:p text:style-name="P3"><text:span text:style-name="T2">→ </text:span><text:span text:style-name="T2">une position </text:span><text:span text:style-name="T3">nuancé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Pour ou contre les écrans en classe ?</text:span></text:p>
              </text:list-item>
              <text:list-item>
                <text:p text:style-name="P6"><text:span text:style-name="T2">Votre meilleur argument — pourquoi est-il fort ?</text:span></text:p>
              </text:list-item>
              <text:list-item>
                <text:p text:style-name="P6"><text:span text:style-name="T2">Opinion (« je trouve que ») vs argument (« parce que »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 argument · une prise de position · un exemple</text:span></text:p>
              </text:list-item>
              <text:list-item>
                <text:p text:style-name="P6"><text:span text:style-name="T2">être pour / contre · nuancé·e</text:span></text:p>
              </text:list-item>
              <text:list-item>
                <text:p text:style-name="P6"><text:span text:style-name="T2">un avantage · un inconvénient · convaincr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Structu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Structu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5">
              <text:list-item>
                <text:p text:style-name="P6"><text:span text:style-name="T2">Introduction : sujet + question</text:span></text:p>
              </text:list-item>
              <text:list-item>
                <text:p text:style-name="P6"><text:span text:style-name="T2">Pour : 2 arguments + exemples</text:span></text:p>
              </text:list-item>
              <text:list-item>
                <text:p text:style-name="P6"><text:span text:style-name="T2">Contre : 2 arguments + exemples</text:span></text:p>
              </text:list-item>
              <text:list-item>
                <text:p text:style-name="P6"><text:span text:style-name="T2">Conclusion : prise de posi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8 connecteur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8 connecteur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jouter : d’une part… d’autre part, de plus, par ailleurs</text:span></text:p>
              </text:list-item>
              <text:list-item>
                <text:p text:style-name="P6"><text:span text:style-name="T2">Expliquer : en effet</text:span></text:p>
              </text:list-item>
              <text:list-item>
                <text:p text:style-name="P6"><text:span text:style-name="T2">Opposer : cependant, néanmoins, pourtant</text:span></text:p>
              </text:list-item>
              <text:list-item>
                <text:p text:style-name="P6"><text:span text:style-name="T2">Conclure : enfin, en conclus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France : loi du 3 août 2018 → téléphone en principe interdit dans les écoles et collèges → sauf usages pédagogiques prévus par le règlement (source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5">
              <text:list-item>
                <text:p text:style-name="P6"><text:span text:style-name="T2">Compréhension du billet</text:span></text:p>
              </text:list-item>
              <text:list-item>
                <text:p text:style-name="P6"><text:span text:style-name="T2">Relier 3 phrases avec 3 connecteurs</text:span></text:p>
              </text:list-item>
              <text:list-item>
                <text:p text:style-name="P6"><text:span text:style-name="T2">Pour / contre : uniforme, voyage, smartphone</text:span></text:p>
              </text:list-item>
              <text:list-item>
                <text:p text:style-name="P6"><text:span text:style-name="T2">Classer les connecteurs (ajouter / opposer / conclure)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Billet d’opinion (~180 mots) - 4 paragraphes - 6 connecteurs - 1 conditionnel - position nuancée Critères : structure · arguments · connecteurs · langu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structure 4 paragraphes</text:span></text:p>
              </text:list-item>
              <text:list-item>
                <text:p text:style-name="P6"><text:span text:style-name="T2">J’emploie 6 connecteurs</text:span></text:p>
              </text:list-item>
              <text:list-item>
                <text:p text:style-name="P6"><text:span text:style-name="T2">Je distingue argument et opinion</text:span></text:p>
              </text:list-item>
              <text:list-item>
                <text:p text:style-name="P6"><text:span text:style-name="T2">J’exprime une position nuancée</text:span></text:p>
              </text:list-item>
              <text:list-item>
                <text:p text:style-name="P6"><text:span text:style-name="T2">Je peux argumenter 1 min à l’oral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.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.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Oral / monologue (12 P.)</text:span></text:p>
              </text:list-item>
              <text:list-item>
                <text:p text:style-name="P6"><text:span text:style-name="T2">Tâche 2 — Billet écrit ~180 mots (14 P.)</text:span></text:p>
              </text:list-item>
              <text:list-item>
                <text:p text:style-name="P6"><text:span text:style-name="T2">Tâche 3 — Connecteurs à insérer (4 P.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Interdiction du téléphone portable à l’école — Wikipédia, CC BY-SA 4.0</text:span></text:p>
              </text:list-item>
              <text:list-item>
                <text:p text:style-name="P6"><text:span text:style-name="T2">Connecteur logique — Wikipédia, CC BY-SA 4.0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16:10</meta:creation-date>
    <dc:date>2026-07-21T16:16:10</dc:date>
    <meta:document-statistic meta:object-count="185"/>
    <meta:generator>LibreOffice/24.2.7.2$Linux_X86_64 LibreOffice_project/420$Build-2</meta:generator>
  </office:meta>
</office:document-meta>
</file>