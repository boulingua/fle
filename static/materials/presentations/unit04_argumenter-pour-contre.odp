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1.43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4 — Argumenter pour / cont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4 — Argumenter pour / cont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9 · Niveau M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rendre position et annoncer sa thèse</text:span></text:p>
              </text:list-item>
              <text:list-item>
                <text:p text:style-name="P6"><text:span text:style-name="T2">Structurer : thèse → arguments → conclusion</text:span></text:p>
              </text:list-item>
              <text:list-item>
                <text:p text:style-name="P6"><text:span text:style-name="T2">Utiliser 5 connecteurs logiques</text:span></text:p>
              </text:list-item>
              <text:list-item>
                <text:p text:style-name="P6"><text:span text:style-name="T2">Donner 2 arguments pour et 2 contre</text:span></text:p>
              </text:list-item>
              <text:list-item>
                <text:p text:style-name="P6"><text:span text:style-name="T2">Rédiger et exposer une prise de posi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ans la cour, Nora et Malik parlent d’un débat sur les uniformes.</text:span></text:p>
            <text:list text:style-name="L3">
              <text:list-item>
                <text:p text:style-name="P3"><text:span text:style-name="T2">Nora est </text:span><text:span text:style-name="T3">pour</text:span><text:span text:style-name="T2"> : moqueries évitées, temps gagné</text:span></text:p>
              </text:list-item>
              <text:list-item>
                <text:p text:style-name="P3"><text:span text:style-name="T2">Malik est </text:span><text:span text:style-name="T3">contre</text:span><text:span text:style-name="T2"> : perte de liberté… « mais ton argument est intéressant »</text:span></text:p>
              </text:list-item>
            </text:list>
            <text:p text:style-name="P3"><text:span text:style-name="T4">Malik sait déjà argumenter — sans le savoir 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imez-vous débattre ?</text:span></text:p>
              </text:list-item>
              <text:list-item>
                <text:p text:style-name="P6"><text:span text:style-name="T2">Qu’est-ce qu’un </text:span><text:span text:style-name="T4">bon</text:span><text:span text:style-name="T2"> argument ?</text:span></text:p>
              </text:list-item>
              <text:list-item>
                <text:p text:style-name="P6"><text:span text:style-name="T2">Un sujet qui vous tient à cœur ?</text:span></text:p>
              </text:list-item>
              <text:list-item>
                <text:p text:style-name="P6"><text:span text:style-name="T2">« à mon avis » / « cependant » — et en allemand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5" draw:style-name="gr2" draw:layer="layout" svg:width="22.859cm" svg:height="5.009cm" svg:x="1.27cm" svg:y="3.31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5">Français</text:span></text:p>
              </table:table-cell>
              <table:table-cell>
                <text:p text:style-name="P7"><text:span text:style-name="T5">Fonction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à mon avis</text:span></text:p>
              </table:table-cell>
              <table:table-cell>
                <text:p text:style-name="P7"><text:span text:style-name="T6">annoncer la thèse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6">je suis pour / contre</text:span></text:p>
              </table:table-cell>
              <table:table-cell>
                <text:p text:style-name="P7"><text:span text:style-name="T6">prendre position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d’abord · ensuite · de plus</text:span></text:p>
              </table:table-cell>
              <table:table-cell>
                <text:p text:style-name="P7"><text:span text:style-name="T6">ajouter un argument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6">cependant · en revanche</text:span></text:p>
              </table:table-cell>
              <table:table-cell>
                <text:p text:style-name="P7"><text:span text:style-name="T6">objection / contrast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en conclusion</text:span></text:p>
              </table:table-cell>
              <table:table-cell>
                <text:p text:style-name="P7"><text:span text:style-name="T6">faire le bila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structure d’une argument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a structure d’une argument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7">
              <text:list-item>
                <text:p text:style-name="P6"><text:span text:style-name="T3">Thèse</text:span><text:span text:style-name="T2"> — À mon avis / Selon moi…</text:span></text:p>
              </text:list-item>
              <text:list-item>
                <text:p text:style-name="P6"><text:span text:style-name="T3">Arguments pour</text:span><text:span text:style-name="T2"> — D’abord… Ensuite… De plus…</text:span></text:p>
              </text:list-item>
              <text:list-item>
                <text:p text:style-name="P6"><text:span text:style-name="T3">Objection</text:span><text:span text:style-name="T2"> — Cependant… En revanche…</text:span></text:p>
              </text:list-item>
              <text:list-item>
                <text:p text:style-name="P6"><text:span text:style-name="T3">Conclusion</text:span><text:span text:style-name="T2"> — En conclusion / Donc…</text:span></text:p>
              </text:list-item>
            </text:list>
            <text:p text:style-name="P3"><text:span text:style-name="T4">Le connecteur d’objection se place en début de phrase, avec une virgul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e modè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xte modè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Faut-il interdire les portables au collège ?</text:span></text:p>
            <text:list text:style-name="L3">
              <text:list-item>
                <text:p text:style-name="P3"><text:span text:style-name="T3">Pour</text:span><text:span text:style-name="T2"> : distraction · conflits · concentration</text:span></text:p>
              </text:list-item>
              <text:list-item>
                <text:p text:style-name="P3"><text:span text:style-name="T3">Contre</text:span><text:span text:style-name="T2"> : urgence, prévenir les parents</text:span></text:p>
              </text:list-item>
              <text:list-item>
                <text:p text:style-name="P3"><text:span text:style-name="T3">En conclusion</text:span><text:span text:style-name="T2"> : interdiction pendant les cours, pas partou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oi française du </text:span><text:span text:style-name="T3">3 août 2018</text:span></text:p>
              </text:list-item>
              <text:list-item>
                <text:p text:style-name="P6"><text:span text:style-name="T2">Interdit le portable à l’école et au collège (cours et récréations)</text:span></text:p>
              </text:list-item>
              <text:list-item>
                <text:p text:style-name="P6"><text:span text:style-name="T2">Exceptions : usage pédagogique, élèves en situation de handicap</text:span></text:p>
              </text:list-item>
              <text:list-item>
                <text:p text:style-name="P6"><text:span text:style-name="T2">Un sujet toujours débattu : concentration vs. urgenc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Ex. 1</text:span><text:span text:style-name="T2"> — Repérer la structure du texte</text:span></text:p>
              </text:list-item>
              <text:list-item>
                <text:p text:style-name="P6"><text:span text:style-name="T3">Ex. 2</text:span><text:span text:style-name="T2"> — Compléter avec les connecteurs</text:span></text:p>
              </text:list-item>
              <text:list-item>
                <text:p text:style-name="P6"><text:span text:style-name="T3">Ex. 3</text:span><text:span text:style-name="T2"> — 1 argument pour / 1 contre (service civique)</text:span></text:p>
              </text:list-item>
              <text:list-item>
                <text:p text:style-name="P6"><text:span text:style-name="T3">Ex. 4</text:span><text:span text:style-name="T2"> — Rédiger un mini-paragraphe (4–5 phrases)</text:span></text:p>
              </text:list-item>
            </text:list>
            <text:p text:style-name="P3"><text:span text:style-name="T4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Exposé argumenté oral (~2 min)</text:span></text:p>
            <text:p text:style-name="P3"><text:span text:style-name="T2">Sujet au choix : portables · école sans notes · cours en plein air</text:span></text:p>
            <text:p text:style-name="P3"><text:span text:style-name="T2">Plan : thèse · 2 pour · 1 contre · conclusion — </text:span><text:span text:style-name="T3">5 connecteurs minimum</text:span></text:p>
            <text:p text:style-name="P3"><text:span text:style-name="T2">Critères : structure /4 · connecteurs /4 · contenu /4 · langue /3 = </text:span><text:span text:style-name="T3">/15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’annonce ma thèse</text:span></text:p>
              </text:list-item>
              <text:list-item>
                <text:p text:style-name="P6"><text:span text:style-name="T2">☐ </text:span><text:span text:style-name="T2">Je structure thèse → arguments → conclusion</text:span></text:p>
              </text:list-item>
              <text:list-item>
                <text:p text:style-name="P6"><text:span text:style-name="T2">☐ </text:span><text:span text:style-name="T2">J’utilise 5 connecteurs</text:span></text:p>
              </text:list-item>
              <text:list-item>
                <text:p text:style-name="P6"><text:span text:style-name="T2">☐ </text:span><text:span text:style-name="T2">2 arguments pour + 1 contre</text:span></text:p>
              </text:list-item>
              <text:list-item>
                <text:p text:style-name="P6"><text:span text:style-name="T2">☐ </text:span><text:span text:style-name="T2">J’expose ~2 min à l’oral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.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.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T1</text:span><text:span text:style-name="T2"> Compréhension écrite — 8 P.</text:span></text:p>
              </text:list-item>
              <text:list-item>
                <text:p text:style-name="P6"><text:span text:style-name="T3">T2</text:span><text:span text:style-name="T2"> Connecteurs — 10 P.</text:span></text:p>
              </text:list-item>
              <text:list-item>
                <text:p text:style-name="P6"><text:span text:style-name="T3">T3</text:span><text:span text:style-name="T2"> Prise de position écrite (~150 mots) — 12 P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oi du 3 août 2018 — Légifrance (données publiques)</text:span></text:p>
              </text:list-item>
              <text:list-item>
                <text:p text:style-name="P6"><text:span text:style-name="T2">« Téléphone portable » — Wikipédia, CC BY-SA 4.0</text:span></text:p>
              </text:list-item>
              <text:list-item>
                <text:p text:style-name="P6"><text:span text:style-name="T2">« Connecteur logique » — Wikipédia, CC BY-SA 4.0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34:23</meta:creation-date>
    <dc:date>2026-07-21T15:34:23</dc:date>
    <meta:document-statistic meta:object-count="185"/>
    <meta:generator>LibreOffice/24.2.7.2$Linux_X86_64 LibreOffice_project/420$Build-2</meta:generator>
  </office:meta>
</office:document-meta>
</file>