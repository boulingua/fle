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utour de la planète francophon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utour de la planète francophon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4 · Parcours E · Classe 8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ituer six pays francophones (continent, capitale)</text:span></text:p>
              </text:list-item>
              <text:list-item>
                <text:p text:style-name="P6"><text:span text:style-name="T2">Comprendre un texte simple sur la francophonie</text:span></text:p>
              </text:list-item>
              <text:list-item>
                <text:p text:style-name="P6"><text:span text:style-name="T2">Utiliser </text:span><text:span text:style-name="T3">en / au / aux / à</text:span></text:p>
              </text:list-item>
              <text:list-item>
                <text:p text:style-name="P6"><text:span text:style-name="T2">Présenter un pays francophone à l’oral (~90 s)</text:span></text:p>
              </text:list-item>
              <text:list-item>
                <text:p text:style-name="P6"><text:span text:style-name="T2">Reformuler un fait culturel avec mes mo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ours de géographie, salle 214. Mme Devos : « Le français se parle sur cinq continents. » Karim : « Ma cousine habite à Tunis, en Tunisie. » Anouk : « On peut se débrouiller en français très loin ?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ois pays francophones hors d’Europe ?</text:span></text:p>
              </text:list-item>
              <text:list-item>
                <text:p text:style-name="P6"><text:span text:style-name="T2">Quel continent compte le plus de locuteurs ?</text:span></text:p>
              </text:list-item>
              <text:list-item>
                <text:p text:style-name="P6"><text:span text:style-name="T2">Une personne francophone célèbre ?</text:span></text:p>
              </text:list-item>
              <text:list-item>
                <text:p text:style-name="P6"><text:span text:style-name="T3">nach Frankreich</text:span><text:span text:style-name="T2"> → aller </text:span><text:span text:style-name="T4">en</text:span><text:span text:style-name="T2"> France / </text:span><text:span text:style-name="T4">au</text:span><text:span text:style-name="T2"> Sénégal : qu’est-ce qui chang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·e locuteur·rice · un continent · une capitale</text:span></text:p>
              </text:list-item>
              <text:list-item>
                <text:p text:style-name="P6"><text:span text:style-name="T2">la francophonie · un pays francophone</text:span></text:p>
              </text:list-item>
              <text:list-item>
                <text:p text:style-name="P6"><text:span text:style-name="T2">un·e correspondant·e · se débrouiller · découvri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réposition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réposition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en</text:span><text:span text:style-name="T2"> + pays féminin : en France, en Tunisie</text:span></text:p>
              </text:list-item>
              <text:list-item>
                <text:p text:style-name="P6"><text:span text:style-name="T4">au</text:span><text:span text:style-name="T2"> + pays masculin : au Sénégal, au Canada</text:span></text:p>
              </text:list-item>
              <text:list-item>
                <text:p text:style-name="P6"><text:span text:style-name="T4">aux</text:span><text:span text:style-name="T2"> + pays pluriel : aux Comores</text:span></text:p>
              </text:list-item>
              <text:list-item>
                <text:p text:style-name="P6"><text:span text:style-name="T4">à</text:span><text:span text:style-name="T2"> + ville : à Dakar, à Montréa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Text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Text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Une famille sur cinq continents » Europe : France, Belgique · Afrique : Sénégal, Tunisie Amérique : Canada / Québec · Océanie : Polynésie française « Cinq continents, une même langue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nviron </text:span><text:span text:style-name="T4">321 millions de locuteurs</text:span><text:span text:style-name="T2"> de français (OIF, début des années 2020)</text:span></text:p>
              </text:list-item>
              <text:list-item>
                <text:p text:style-name="P6"><text:span text:style-name="T2">Francophonie présente sur </text:span><text:span text:style-name="T4">cinq continents</text:span></text:p>
              </text:list-item>
              <text:list-item>
                <text:p text:style-name="P6"><text:span text:style-name="T4">Journée internationale de la Francophonie : 20 mars</text:span></text:p>
              </text:list-item>
              <text:list-item>
                <text:p text:style-name="P6"><text:span text:style-name="T3">(paraphrasé d’après Wikipédia, CC BY-SA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écrite (texte C)</text:span></text:p>
              </text:list-item>
              <text:list-item>
                <text:p text:style-name="P6"><text:span text:style-name="T2">Ex. 2 : prépositions </text:span><text:span text:style-name="T3">en / au / aux / à</text:span></text:p>
              </text:list-item>
              <text:list-item>
                <text:p text:style-name="P6"><text:span text:style-name="T2">Ex. 3 : pays → capitales</text:span></text:p>
              </text:list-item>
              <text:list-item>
                <text:p text:style-name="P6"><text:span text:style-name="T2">Ex. 4 : mini-portrait guidé</text:span></text:p>
              </text:list-item>
              <text:list-item>
                <text:p text:style-name="P6"><text:span text:style-name="T2">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résenter un pays francophone (~90 s) : - situation (continent + capitale) - un fait culturel reformulé - « J’aimerais y aller parce que… » - au moins 5 prépositions correct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situe six pays francophones</text:span></text:p>
              </text:list-item>
              <text:list-item>
                <text:p text:style-name="P6"><text:span text:style-name="T2">Je comprends un texte sur la francophonie</text:span></text:p>
              </text:list-item>
              <text:list-item>
                <text:p text:style-name="P6"><text:span text:style-name="T2">J’utilise </text:span><text:span text:style-name="T3">en / au / aux / à</text:span></text:p>
              </text:list-item>
              <text:list-item>
                <text:p text:style-name="P6"><text:span text:style-name="T2">Je présente un pays à l’oral (~90 s)</text:span></text:p>
              </text:list-item>
              <text:list-item>
                <text:p text:style-name="P6"><text:span text:style-name="T2">Je reformule un fait culture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, « Francophonie » — CC BY-SA 4.0</text:span></text:p>
              </text:list-item>
              <text:list-item>
                <text:p text:style-name="P6"><text:span text:style-name="T2">Wikipédia, « Organisation internationale de la Francophonie » — CC BY-SA 4.0</text:span></text:p>
              </text:list-item>
              <text:list-item>
                <text:p text:style-name="P6"><text:span text:style-name="T2">OIF, francophonie.org (référence, non affilié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1:08</meta:creation-date>
    <dc:date>2026-07-21T16:11:08</dc:date>
    <meta:document-statistic meta:object-count="181"/>
    <meta:generator>LibreOffice/24.2.7.2$Linux_X86_64 LibreOffice_project/420$Build-2</meta:generator>
  </office:meta>
</office:document-meta>
</file>