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Court-métrage francopho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Court-métrage francopho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 (Oberstufe)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t-métrage francophone et en dégager le sens</text:span></text:p>
              </text:list-item>
              <text:list-item>
                <text:p text:style-name="P6"><text:span text:style-name="T2">Nommer et employer 8 termes du langage filmique</text:span></text:p>
              </text:list-item>
              <text:list-item>
                <text:p text:style-name="P6"><text:span text:style-name="T2">Décrire un plan et expliquer son effet</text:span></text:p>
              </text:list-item>
              <text:list-item>
                <text:p text:style-name="P6"><text:span text:style-name="T2">Rédiger une fiche d’analyse (~250 mots)</text:span></text:p>
              </text:list-item>
              <text:list-item>
                <text:p text:style-name="P6"><text:span text:style-name="T2">Réagir de façon argumentée au message d’un fil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la sortie de la salle de projection :</text:span></text:p>
            <text:list text:style-name="L3">
              <text:list-item>
                <text:p text:style-name="P3"><text:span text:style-name="T2">Léa : « La fin m’a bluffée. »</text:span></text:p>
              </text:list-item>
              <text:list-item>
                <text:p text:style-name="P3"><text:span text:style-name="T2">Sofiane : « Tu as vu ? La caméra reste sur les mains, jamais sur le visage. »</text:span></text:p>
              </text:list-item>
              <text:list-item>
                <text:p text:style-name="P3"><text:span text:style-name="T2">Léa : « On devine l’émotion sans la voir. Plus fort que si tout était montré. »</text:span></text:p>
              </text:list-item>
              <text:list-item>
                <text:p text:style-name="P3"><text:span text:style-name="T2">Léa : « Un court ne dit pas moins. Il dit autrement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court-métrage avez-vous déjà vu ?</text:span></text:p>
              </text:list-item>
              <text:list-item>
                <text:p text:style-name="P6"><text:span text:style-name="T2">Plan / scène / séquence : quelle différence ?</text:span></text:p>
              </text:list-item>
              <text:list-item>
                <text:p text:style-name="P6"><text:span text:style-name="T2">Pourquoi le format court (3–15 min) ?</text:span></text:p>
              </text:list-item>
              <text:list-item>
                <text:p text:style-name="P6"><text:span text:style-name="T2">« Dans un court, chaque plan compte parce que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langage film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langage filmique</text:span></text:p>
          </draw:text-box>
        </draw:frame>
        <draw:frame draw:name="Content Placeholder 5" draw:style-name="gr2" draw:layer="layout" svg:width="22.859cm" svg:height="5.84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Terme</text:span></text:p>
              </table:table-cell>
              <table:table-cell>
                <text:p text:style-name="P7"><text:span text:style-name="T3">Défini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gros plan</text:span></text:p>
              </table:table-cell>
              <table:table-cell>
                <text:p text:style-name="P7"><text:span text:style-name="T4">visage / objet de très prè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plan d’ensemble</text:span></text:p>
              </table:table-cell>
              <table:table-cell>
                <text:p text:style-name="P7"><text:span text:style-name="T4">vue large, situe l’ac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plan-séquence</text:span></text:p>
              </table:table-cell>
              <table:table-cell>
                <text:p text:style-name="P7"><text:span text:style-name="T4">scène entière sans coup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champ / contrechamp</text:span></text:p>
              </table:table-cell>
              <table:table-cell>
                <text:p text:style-name="P7"><text:span text:style-name="T4">deux plans alternés (dialogue)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ellipse</text:span></text:p>
              </table:table-cell>
              <table:table-cell>
                <text:p text:style-name="P7"><text:span text:style-name="T4">saut dans le temps non montré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voix off</text:span></text:p>
              </table:table-cell>
              <table:table-cell>
                <text:p text:style-name="P7"><text:span text:style-name="T4">voix entendue, personne invis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rocédé → effe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rocédé → effe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rocédé : </text:span><text:span text:style-name="T5">le réalisateur utilise…</text:span><text:span text:style-name="T2"> · </text:span><text:span text:style-name="T5">le film s’ouvre sur…</text:span><text:span text:style-name="T2"> · </text:span><text:span text:style-name="T5">la caméra suit…</text:span></text:p>
              </text:list-item>
              <text:list-item>
                <text:p text:style-name="P6"><text:span text:style-name="T2">L’effet : </text:span><text:span text:style-name="T5">ce plan crée…</text:span><text:span text:style-name="T2"> · </text:span><text:span text:style-name="T5">ce cadrage suggère que…</text:span><text:span text:style-name="T2"> · </text:span><text:span text:style-name="T5">grâce à…, on comprend que…</text:span><text:span text:style-name="T2"> · </text:span><text:span text:style-name="T5">cela a pour effet de…</text:span></text:p>
              </text:list-item>
              <text:list-item>
                <text:p text:style-name="P6"><text:span text:style-name="T2">Orthographe : </text:span><text:span text:style-name="T6">plan-séquence</text:span><text:span text:style-name="T2"> (trait d’union) · </text:span><text:span text:style-name="T6">des voix off</text:span><text:span text:style-name="T2"> (invariabl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hode — analyser en 4 étap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thode — analyser en 4 étap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6">
              <text:list-item>
                <text:p text:style-name="P6"><text:span text:style-name="T2">Synopsis (3 phrases, sans tout dévoiler)</text:span></text:p>
              </text:list-item>
              <text:list-item>
                <text:p text:style-name="P6"><text:span text:style-name="T2">Réalisation (qui, quand, durée, genre)</text:span></text:p>
              </text:list-item>
              <text:list-item>
                <text:p text:style-name="P6"><text:span text:style-name="T2">Plans-clés (cadrage + effet)</text:span></text:p>
              </text:list-item>
              <text:list-item>
                <text:p text:style-name="P6"><text:span text:style-name="T2">Interprétation (thème + message justif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Clermont-Ferran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Clermont-Ferran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court-métrage : une forme reconnue, laboratoire des futurs cinéastes</text:span></text:p>
              </text:list-item>
              <text:list-item>
                <text:p text:style-name="P6"><text:span text:style-name="T2">Festival international du court métrage de Clermont-Ferrand (depuis 1979)</text:span></text:p>
              </text:list-item>
              <text:list-item>
                <text:p text:style-name="P6"><text:span text:style-name="T2">Présenté comme le plus grand rendez-vous mondial du format court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-modèle « Le Dernier Bus »</text:span></text:p>
              </text:list-item>
              <text:list-item>
                <text:p text:style-name="P6"><text:span text:style-name="T2">Ex. 2 — Le bon terme (ellipse / plan-séquence / voix off / gros plan)</text:span></text:p>
              </text:list-item>
              <text:list-item>
                <text:p text:style-name="P6"><text:span text:style-name="T2">Ex. 3 — Relier procédé → effet</text:span></text:p>
              </text:list-item>
              <text:list-item>
                <text:p text:style-name="P6"><text:span text:style-name="T2">Ex. 4 — Synopsis en 3 phrases</text:span></text:p>
              </text:list-item>
            </text:list>
            <text:p text:style-name="P3"><text:span text:style-name="T2">Correction : section Solution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che d’analyse (~250 mots) d’un court-métrage de votre choix</text:span></text:p>
            <text:list text:style-name="L3">
              <text:list-item>
                <text:p text:style-name="P3"><text:span text:style-name="T2">4 étapes de la méthode</text:span></text:p>
              </text:list-item>
              <text:list-item>
                <text:p text:style-name="P3"><text:span text:style-name="T2">≥ </text:span><text:span text:style-name="T2">6 termes filmiques · 2 structures « procédé → effet »</text:span></text:p>
              </text:list-item>
              <text:list-item>
                <text:p text:style-name="P3"><text:span text:style-name="T2">Ne recopier ni dialogue ni image : décrire avec ses mots</text:span></text:p>
              </text:list-item>
            </text:list>
            <text:p text:style-name="P3"><text:span text:style-name="T2">Barème : 20 p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plan / scène / séquence</text:span></text:p>
              </text:list-item>
              <text:list-item>
                <text:p text:style-name="P6"><text:span text:style-name="T2">☐ </text:span><text:span text:style-name="T2">J’emploie ≥ 8 termes filmiques</text:span></text:p>
              </text:list-item>
              <text:list-item>
                <text:p text:style-name="P6"><text:span text:style-name="T2">☐ </text:span><text:span text:style-name="T2">Je décris un plan et son effet</text:span></text:p>
              </text:list-item>
              <text:list-item>
                <text:p text:style-name="P6"><text:span text:style-name="T2">☐ </text:span><text:span text:style-name="T2">Je rédige une fiche en 4 étapes</text:span></text:p>
              </text:list-item>
              <text:list-item>
                <text:p text:style-name="P6"><text:span text:style-name="T2">☐ </text:span><text:span text:style-name="T2">Je justifie mon interprét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audiovisuelle (12 pts)</text:span></text:p>
              </text:list-item>
              <text:list-item>
                <text:p text:style-name="P6"><text:span text:style-name="T2">Tâche 2 — Langage filmique, 6 items (6 pts)</text:span></text:p>
              </text:list-item>
              <text:list-item>
                <text:p text:style-name="P6"><text:span text:style-name="T2">Tâche 3 — Fiche d’analyse écrite (12 pts)</text:span></text:p>
              </text:list-item>
            </text:list>
            <text:p text:style-name="P3"><text:span text:style-name="T2">Réussite à partir de 15 p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urt métrage — Wikipédia, CC BY-SA</text:span></text:p>
              </text:list-item>
              <text:list-item>
                <text:p text:style-name="P6"><text:span text:style-name="T2">Festival de Clermont-Ferrand — Wikipédia, CC BY-SA</text:span></text:p>
              </text:list-item>
              <text:list-item>
                <text:p text:style-name="P6"><text:span text:style-name="T2">Plan-séquence — Wikipédia, CC BY-SA</text:span></text:p>
              </text:list-item>
            </text:list>
            <text:p text:style-name="P3"><text:span text:style-name="T2">Textes et dialogues originaux · « Le Dernier Bus » est fictif · Plateforme non affilié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30</meta:creation-date>
    <dc:date>2026-07-21T16:29:30</dc:date>
    <meta:document-statistic meta:object-count="185"/>
    <meta:generator>LibreOffice/24.2.7.2$Linux_X86_64 LibreOffice_project/420$Build-2</meta:generator>
  </office:meta>
</office:document-meta>
</file>