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rancophonie aujourd’hu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rancophonie aujourd’hu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4 · Parcours E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la </text:span><text:span text:style-name="T3">Francophonie</text:span><text:span text:style-name="T2"> (OIF) de la </text:span><text:span text:style-name="T3">francophonie</text:span><text:span text:style-name="T2"> (les locuteurs)</text:span></text:p>
              </text:list-item>
              <text:list-item>
                <text:p text:style-name="P6"><text:span text:style-name="T2">Comprendre un texte informatif sur le français dans le monde</text:span></text:p>
              </text:list-item>
              <text:list-item>
                <text:p text:style-name="P6"><text:span text:style-name="T2">Présenter oralement un pays ou une figure francophone</text:span></text:p>
              </text:list-item>
              <text:list-item>
                <text:p text:style-name="P6"><text:span text:style-name="T2">Rédiger un portrait d’environ 150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20 mars — Journée internationale de la Francophonie</text:span></text:p>
            <text:p text:style-name="P3"><text:span text:style-name="T2">Mme Lefèvre : « Sur combien de continents parle-t-on français ? »</text:span></text:p>
            <text:p text:style-name="P3"><text:span text:style-name="T2">Karim : « Chez mes grands-parents, au Sénégal, on parle français à l’école. »</text:span></text:p>
            <text:p text:style-name="P3"><text:span text:style-name="T2">→ </text:span><text:span text:style-name="T2">Le français se parle sur les </text:span><text:span text:style-name="T3">cinq continents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pays sont membres de l’OIF ?</text:span></text:p>
              </text:list-item>
              <text:list-item>
                <text:p text:style-name="P6"><text:span text:style-name="T2">Le français recule-t-il ou progresse-t-il ?</text:span></text:p>
              </text:list-item>
              <text:list-item>
                <text:p text:style-name="P6"><text:span text:style-name="T2">Trois pays francophones hors d’Europe ?</text:span></text:p>
              </text:list-item>
              <text:list-item>
                <text:p text:style-name="P6"><text:span text:style-name="T2">Qu’est-ce que la Négritud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francophonie · un·e locuteur·rice</text:span></text:p>
              </text:list-item>
              <text:list-item>
                <text:p text:style-name="P6"><text:span text:style-name="T2">une langue officielle · un espace linguistique</text:span></text:p>
              </text:list-item>
              <text:list-item>
                <text:p text:style-name="P6"><text:span text:style-name="T2">un État membre · un continent</text:span></text:p>
              </text:list-item>
              <text:list-item>
                <text:p text:style-name="P6"><text:span text:style-name="T2">répandu·e · rayonner · une figure marquan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</text:span><text:span text:style-name="T3">présent</text:span><text:span text:style-name="T2"> pour présenter des faits :</text:span></text:p>
            <text:list text:style-name="L3">
              <text:list-item>
                <text:p text:style-name="P3"><text:span text:style-name="T4">Le français </text:span><text:span text:style-name="T5">se parle</text:span><text:span text:style-name="T4"> sur cinq continents.</text:span></text:p>
              </text:list-item>
              <text:list-item>
                <text:p text:style-name="P3"><text:span text:style-name="T4">L’OIF </text:span><text:span text:style-name="T5">compte</text:span><text:span text:style-name="T4"> de nombreux États membres.</text:span></text:p>
              </text:list-item>
            </text:list>
            <text:p text:style-name="P3"><text:span text:style-name="T2">Quantifier : environ · plus de · près d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français dans le mond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français dans le mond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urope : Belgique, Suisse, Luxembourg</text:span></text:p>
              </text:list-item>
              <text:list-item>
                <text:p text:style-name="P6"><text:span text:style-name="T2">Amérique : Québec, Haïti</text:span></text:p>
              </text:list-item>
              <text:list-item>
                <text:p text:style-name="P6"><text:span text:style-name="T2">Afrique : Sénégal, Côte d’Ivoire, RDC</text:span></text:p>
              </text:list-item>
              <text:list-item>
                <text:p text:style-name="P6"><text:span text:style-name="T2">Océan Indien et Pacifique</text:span></text:p>
              </text:list-item>
            </text:list>
            <text:p text:style-name="P3"><text:span text:style-name="T2">Croissance la plus forte : </text:span><text:span text:style-name="T3">l’Afriq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’O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’O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réée en 1970</text:span></text:p>
              </text:list-item>
              <text:list-item>
                <text:p text:style-name="P6"><text:span text:style-name="T2">Des dizaines d’États et de gouvernements</text:span></text:p>
              </text:list-item>
              <text:list-item>
                <text:p text:style-name="P6"><text:span text:style-name="T2">Cinq continents</text:span></text:p>
              </text:list-item>
              <text:list-item>
                <text:p text:style-name="P6"><text:span text:style-name="T2">Journée de la Francophonie : </text:span><text:span text:style-name="T3">20 mars</text:span></text:p>
              </text:list-item>
            </text:list>
            <text:p text:style-name="P3"><text:span text:style-name="T4">Source : Wikipédia, CC 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Vocabulaire à trous</text:span></text:p>
              </text:list-item>
              <text:list-item>
                <text:p text:style-name="P6"><text:span text:style-name="T2">Grammaire — le présent</text:span></text:p>
              </text:list-item>
              <text:list-item>
                <text:p text:style-name="P6"><text:span text:style-name="T2">Vers l’oral — présenter un pay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ortrait d’une figure francophone (~150 mots)</text:span></text:p>
            <text:list text:style-name="L5">
              <text:list-item>
                <text:p text:style-name="P3"><text:span text:style-name="T2">Qui ? (nom, pays, domaine)</text:span></text:p>
              </text:list-item>
              <text:list-item>
                <text:p text:style-name="P3"><text:span text:style-name="T2">Parcours (dates)</text:span></text:p>
              </text:list-item>
              <text:list-item>
                <text:p text:style-name="P3"><text:span text:style-name="T2">Pourquoi elle compte</text:span></text:p>
              </text:list-item>
            </text:list>
            <text:p text:style-name="P3"><text:span text:style-name="T2">Présent + passé composé · 3 mots de la lis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Francophonie / francophonie</text:span></text:p>
              </text:list-item>
              <text:list-item>
                <text:p text:style-name="P6"><text:span text:style-name="T2">Je nomme des pays sur 3 continents</text:span></text:p>
              </text:list-item>
              <text:list-item>
                <text:p text:style-name="P6"><text:span text:style-name="T2">Je présente à l’oral</text:span></text:p>
              </text:list-item>
              <text:list-item>
                <text:p text:style-name="P6"><text:span text:style-name="T2">J’utilise le présent</text:span></text:p>
              </text:list-item>
              <text:list-item>
                <text:p text:style-name="P6"><text:span text:style-name="T2">J’ai rédigé un portra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oints</text:span></text:p>
            <text:list text:style-name="L3">
              <text:list-item>
                <text:p text:style-name="P3"><text:span text:style-name="T2">Tâche 1 : compréhension (10 P.)</text:span></text:p>
              </text:list-item>
              <text:list-item>
                <text:p text:style-name="P3"><text:span text:style-name="T2">Tâche 2 : lexique + grammaire (8 P.)</text:span></text:p>
              </text:list-item>
              <text:list-item>
                <text:p text:style-name="P3"><text:span text:style-name="T2">Tâche 3 : écrit ou oral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IF — Wikipédia (CC BY-SA)</text:span></text:p>
              </text:list-item>
              <text:list-item>
                <text:p text:style-name="P6"><text:span text:style-name="T2">Journée internationale de la Francophonie — Wikipédia (CC BY-SA)</text:span></text:p>
              </text:list-item>
              <text:list-item>
                <text:p text:style-name="P6"><text:span text:style-name="T2">Français dans le monde — Wikipédia (CC BY-SA)</text:span></text:p>
              </text:list-item>
            </text:list>
            <text:p text:style-name="P3"><text:span text:style-name="T2">Support indépendant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34</meta:creation-date>
    <dc:date>2026-07-21T16:28:34</dc:date>
    <meta:document-statistic meta:object-count="185"/>
    <meta:generator>LibreOffice/24.2.7.2$Linux_X86_64 LibreOffice_project/420$Build-2</meta:generator>
  </office:meta>
</office:document-meta>
</file>