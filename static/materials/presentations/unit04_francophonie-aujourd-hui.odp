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rancophonie aujourd’hu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Francophonie aujourd’hu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4 · Parcours G+M · Classe 10 · Niveau M</text:span></text:p>
            <text:p text:style-name="P3"><text:span text:style-name="T2">Le français autour du mon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tuer 5 régions francophones du monde</text:span></text:p>
              </text:list-item>
              <text:list-item>
                <text:p text:style-name="P6"><text:span text:style-name="T2">Nommer 3 institutions de la Francophonie</text:span></text:p>
              </text:list-item>
              <text:list-item>
                <text:p text:style-name="P6"><text:span text:style-name="T2">Comprendre un texte informatif simple</text:span></text:p>
              </text:list-item>
              <text:list-item>
                <text:p text:style-name="P6"><text:span text:style-name="T2">Présenter oralement un pays francophone (~3 min)</text:span></text:p>
              </text:list-item>
              <text:list-item>
                <text:p text:style-name="P6"><text:span text:style-name="T2">Employer </text:span><text:span text:style-name="T3">au / en / aux / à</text:span><text:span text:style-name="T2"> devant pays et vill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me Lefèvre déroule une carte du monde.</text:span></text:p>
            <text:p text:style-name="P3"><text:span text:style-name="T2">« Sur quels continents parle-t-on français ? »</text:span></text:p>
            <text:p text:style-name="P3"><text:span text:style-name="T2">Léa : « En France, en Belgique, en Suisse… » Karim : « Et au Maghreb ! »</text:span></text:p>
            <text:p text:style-name="P3"><text:span text:style-name="T2">« Où vit aujourd’hui la plus grande partie des francophones ? » → En </text:span><text:span text:style-name="T4">Afrique</text:span><text:span text:style-name="T2"> — et cette part augment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e pays francophones en une minute ?</text:span></text:p>
              </text:list-item>
              <text:list-item>
                <text:p text:style-name="P6"><text:span text:style-name="T2">Montrez 5 régions sur la carte</text:span></text:p>
              </text:list-item>
              <text:list-item>
                <text:p text:style-name="P6"><text:span text:style-name="T2">Le français : langue qui recule ou qui progress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5 rég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5 régi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urope</text:span><text:span text:style-name="T2"> : France, Belgique, Suisse, Luxembourg</text:span></text:p>
              </text:list-item>
              <text:list-item>
                <text:p text:style-name="P6"><text:span text:style-name="T4">Afrique</text:span><text:span text:style-name="T2"> : Sénégal, Côte d’Ivoire, Cameroun, RDC</text:span></text:p>
              </text:list-item>
              <text:list-item>
                <text:p text:style-name="P6"><text:span text:style-name="T4">Amériques</text:span><text:span text:style-name="T2"> : Québec, Acadie, Haïti</text:span></text:p>
              </text:list-item>
              <text:list-item>
                <text:p text:style-name="P6"><text:span text:style-name="T4">Océan Indien / Pacifique</text:span><text:span text:style-name="T2"> : Madagascar, Polynésie, Vanuatu</text:span></text:p>
              </text:list-item>
              <text:list-item>
                <text:p text:style-name="P6"><text:span text:style-name="T4">Maghreb-Levant</text:span><text:span text:style-name="T2"> : Maroc, Tunisie, Algérie, Liba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préposit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prépositi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n</text:span><text:span text:style-name="T2"> + pays féminin / voyelle : </text:span><text:span text:style-name="T3">en France, en Algérie</text:span></text:p>
              </text:list-item>
              <text:list-item>
                <text:p text:style-name="P6"><text:span text:style-name="T4">au</text:span><text:span text:style-name="T2"> + pays masculin : </text:span><text:span text:style-name="T3">au Sénégal, au Canada</text:span></text:p>
              </text:list-item>
              <text:list-item>
                <text:p text:style-name="P6"><text:span text:style-name="T4">aux</text:span><text:span text:style-name="T2"> + pays pluriel : </text:span><text:span text:style-name="T3">aux Comores</text:span></text:p>
              </text:list-item>
              <text:list-item>
                <text:p text:style-name="P6"><text:span text:style-name="T4">à</text:span><text:span text:style-name="T2"> + ville : </text:span><text:span text:style-name="T3">à Dakar, à Montré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Une langue sur cinq contine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Une langue sur cinq contine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français : Belgique, Suisse, Québec, Sénégal, Madagascar, Polynésie…</text:span></text:p>
            <text:list text:style-name="L3">
              <text:list-item>
                <text:p text:style-name="P3"><text:span text:style-name="T2">Parfois </text:span><text:span text:style-name="T4">langue maternelle</text:span></text:p>
              </text:list-item>
              <text:list-item>
                <text:p text:style-name="P3"><text:span text:style-name="T2">Souvent </text:span><text:span text:style-name="T4">langue officielle</text:span><text:span text:style-name="T2"> ou </text:span><text:span text:style-name="T4">d’enseignement</text:span><text:span text:style-name="T2"> (Afrique)</text:span></text:p>
              </text:list-item>
              <text:list-item>
                <text:p text:style-name="P3"><text:span text:style-name="T2">Population francophone </text:span><text:span text:style-name="T4">en pleine croissance</text:span><text:span text:style-name="T2">, portée par l’Afriq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20 ma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20 ma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Journée internationale de la Francophonie</text:span></text:p>
            <text:p text:style-name="P3"><text:span text:style-name="T2">Rappelle la convention signée le 20 mars 1970 à </text:span><text:span text:style-name="T4">Niamey</text:span><text:span text:style-name="T2"> (Niger), à l’origine de l’actuelle </text:span><text:span text:style-name="T4">OIF</text:span><text:span text:style-name="T2">.</text:span></text:p>
            <text:p text:style-name="P3"><text:span text:style-name="T3">(D’après Wikipédia, CC BY-SA 4.0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 institut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 instituti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OIF</text:span><text:span text:style-name="T2"> — Organisation internationale de la Francophonie</text:span></text:p>
              </text:list-item>
              <text:list-item>
                <text:p text:style-name="P6"><text:span text:style-name="T4">TV5MONDE</text:span><text:span text:style-name="T2"> — télévision internationale francophone</text:span></text:p>
              </text:list-item>
              <text:list-item>
                <text:p text:style-name="P6"><text:span text:style-name="T4">AUF</text:span><text:span text:style-name="T2"> — Agence universitaire de la Francophoni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Compréhension du texte</text:span></text:p>
              </text:list-item>
              <text:list-item>
                <text:p text:style-name="P6"><text:span text:style-name="T2">Géographie : classer les pays par région</text:span></text:p>
              </text:list-item>
              <text:list-item>
                <text:p text:style-name="P6"><text:span text:style-name="T2">Vocabulaire : relier terme et définition</text:span></text:p>
              </text:list-item>
              <text:list-item>
                <text:p text:style-name="P6"><text:span text:style-name="T2">Prépositions : </text:span><text:span text:style-name="T3">en / au / aux / à</text:span></text:p>
              </text:list-item>
            </text:list>
            <text:p text:style-name="P3"><text:span text:style-name="T2">→ </text:span><text:span text:style-name="T2">Solutions sur la fich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présenter un pay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présenter un pay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Situation (continent, préposition)</text:span></text:p>
              </text:list-item>
              <text:list-item>
                <text:p text:style-name="P6"><text:span text:style-name="T2">Statut du français</text:span></text:p>
              </text:list-item>
              <text:list-item>
                <text:p text:style-name="P6"><text:span text:style-name="T2">Un trait culturel</text:span></text:p>
              </text:list-item>
              <text:list-item>
                <text:p text:style-name="P6"><text:span text:style-name="T2">Deux personnalités</text:span></text:p>
              </text:list-item>
            </text:list>
            <text:p text:style-name="P3"><text:span text:style-name="T2">Durée : ~3 min · évalué sur 12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5 régions francophones</text:span></text:p>
              </text:list-item>
              <text:list-item>
                <text:p text:style-name="P6"><text:span text:style-name="T2">☐ </text:span><text:span text:style-name="T2">OIF, TV5MONDE, AUF</text:span></text:p>
              </text:list-item>
              <text:list-item>
                <text:p text:style-name="P6"><text:span text:style-name="T2">☐ </text:span><text:span text:style-name="T2">Texte informatif compris</text:span></text:p>
              </text:list-item>
              <text:list-item>
                <text:p text:style-name="P6"><text:span text:style-name="T2">☐ </text:span><text:span text:style-name="T3">au / en / aux / à</text:span><text:span text:style-name="T2"> corrects</text:span></text:p>
              </text:list-item>
              <text:list-item>
                <text:p text:style-name="P6"><text:span text:style-name="T2">☐ </text:span><text:span text:style-name="T2">Présentation de 3 m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Tâche 1</text:span><text:span text:style-name="T2"> — Compréhension de l’écrit (10 P.)</text:span></text:p>
              </text:list-item>
              <text:list-item>
                <text:p text:style-name="P6"><text:span text:style-name="T4">Tâche 2</text:span><text:span text:style-name="T2"> — Vocabulaire + géographie (8 P.)</text:span></text:p>
              </text:list-item>
              <text:list-item>
                <text:p text:style-name="P6"><text:span text:style-name="T4">Tâche 3</text:span><text:span text:style-name="T2"> — Présentation orale (12 P.)</text:span></text:p>
              </text:list-item>
            </text:list>
            <text:p text:style-name="P3"><text:span text:style-name="T4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Francophonie » — Wikipédia (2026), CC BY-SA 4.0</text:span></text:p>
              </text:list-item>
              <text:list-item>
                <text:p text:style-name="P6"><text:span text:style-name="T2">« Organisation internationale de la Francophonie » — Wikipédia (2026), CC BY-SA 4.0</text:span></text:p>
              </text:list-item>
              <text:list-item>
                <text:p text:style-name="P6"><text:span text:style-name="T2">« Journée internationale de la Francophonie » — Wikipédia (2026), CC BY-SA 4.0</text:span></text:p>
              </text:list-item>
              <text:list-item>
                <text:p text:style-name="P6"><text:span text:style-name="T2">OIF — francophonie.org · TV5MONDE — tv5monde.com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28</meta:creation-date>
    <dc:date>2026-07-21T15:46:28</dc:date>
    <meta:document-statistic meta:object-count="189"/>
    <meta:generator>LibreOffice/24.2.7.2$Linux_X86_64 LibreOffice_project/420$Build-2</meta:generator>
  </office:meta>
</office:document-meta>
</file>