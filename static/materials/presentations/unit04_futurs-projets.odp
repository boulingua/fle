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3.528cm" fo:margin-right="0cm" fo:margin-top="0.141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Futurs projets — le futur simp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Futurs projets — le futur simp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4 · Parcours G+M · Classe 8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njuguer le futur simple (réguliers + irréguliers courants)</text:span></text:p>
              </text:list-item>
              <text:list-item>
                <text:p text:style-name="P6"><text:span text:style-name="T2">Distinguer futur proche et futur simple</text:span></text:p>
              </text:list-item>
              <text:list-item>
                <text:p text:style-name="P6"><text:span text:style-name="T2">Présenter trois projets d’avenir à l’oral</text:span></text:p>
              </text:list-item>
              <text:list-item>
                <text:p text:style-name="P6"><text:span text:style-name="T2">Rédiger ~80 mots sur mes proje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« Léa, qu’est-ce que tu feras dans dix ans ? »</text:span><text:span text:style-name="T2"> — Je serai vétérinaire. Je soignerai les animaux. — Et toi, Karim ? — Je voyagerai… Je verrai le monde d’abord !</text:span></text:p>
            <text:p text:style-name="P3"><text:span text:style-name="T2">Quels verbes parlent de l’avenir ? Quelle lettre revient toujours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 ferez-vous demain ? Et dans dix ans ?</text:span></text:p>
              </text:list-item>
              <text:list-item>
                <text:p text:style-name="P6"><text:span text:style-name="T3">Je vais partir</text:span><text:span text:style-name="T2"> ou </text:span><text:span text:style-name="T3">je partirai</text:span><text:span text:style-name="T2"> ?</text:span></text:p>
              </text:list-item>
              <text:list-item>
                <text:p text:style-name="P6"><text:span text:style-name="T2">Cherchez la lettre commune : feras · serai · voyagerai · verrai · ferez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’avenir · un projet · un rêve</text:span></text:p>
              </text:list-item>
              <text:list-item>
                <text:p text:style-name="P6"><text:span text:style-name="T2">un métier · les études · faire un stage</text:span></text:p>
              </text:list-item>
              <text:list-item>
                <text:p text:style-name="P6"><text:span text:style-name="T2">s’installer · gagner sa vie · fonder une famille</text:span></text:p>
              </text:list-item>
              <text:list-item>
                <text:p text:style-name="P6"><text:span text:style-name="T2">plus tard · dans dix ans · peut-êt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futur simple — form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futur simple — form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adical (souvent l’infinitif) + terminaisons</text:span></text:p>
            <text:p text:style-name="P3"><text:span text:style-name="T4">-ai · -as · -a · -ons · -ez · -ont</text:span></text:p>
            <text:list text:style-name="L3">
              <text:list-item>
                <text:p text:style-name="P3"><text:span text:style-name="T2">parler → je parlerai</text:span></text:p>
              </text:list-item>
              <text:list-item>
                <text:p text:style-name="P3"><text:span text:style-name="T2">finir → je finirai</text:span></text:p>
              </text:list-item>
              <text:list-item>
                <text:p text:style-name="P3"><text:span text:style-name="T2">prendre → je prendrai</text:span></text:p>
              </text:list-item>
            </text:list>
            <text:p text:style-name="P3"><text:span text:style-name="T2">Astuce : toujours un </text:span><text:span text:style-name="T4">-r-</text:span><text:span text:style-name="T2"> avant la terminais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dicaux irrégulier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adicaux irrégulier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être → ser- (je serai)</text:span></text:p>
              </text:list-item>
              <text:list-item>
                <text:p text:style-name="P6"><text:span text:style-name="T2">avoir → aur- (tu auras)</text:span></text:p>
              </text:list-item>
              <text:list-item>
                <text:p text:style-name="P6"><text:span text:style-name="T2">aller → ir- (il ira)</text:span></text:p>
              </text:list-item>
              <text:list-item>
                <text:p text:style-name="P6"><text:span text:style-name="T2">faire → fer- (nous ferons)</text:span></text:p>
              </text:list-item>
              <text:list-item>
                <text:p text:style-name="P6"><text:span text:style-name="T2">voir → verr- · pouvoir → pourr-</text:span></text:p>
              </text:list-item>
              <text:list-item>
                <text:p text:style-name="P6"><text:span text:style-name="T2">vouloir → voudr- · venir → viendr- · savoir → saur-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 proche ou futur simple ?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Futur proche ou futur simple ?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Proche</text:span><text:span text:style-name="T2"> : </text:span><text:span text:style-name="T3">aller</text:span><text:span text:style-name="T2"> + infinitif → tout de suite, sûr </text:span><text:span text:style-name="T3">Je vais partir</text:span><text:span text:style-name="T2"> (le bus arrive)</text:span></text:p>
              </text:list-item>
              <text:list-item>
                <text:p text:style-name="P6"><text:span text:style-name="T4">Simple</text:span><text:span text:style-name="T2"> : projet, avenir lointain </text:span><text:span text:style-name="T3">Je partirai un jour à Pari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modè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modè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7"><text:span text:style-name="T5">Dans dix ans, je serai à l’université. J’étudierai la biologie. Je ferai un stage au Sénégal. Un jour, je publierai mon premier article. Le soir, je téléphonerai à Inès, qui sera devenue professeure à Montréal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’orientation en Fr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’orientation en Fr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Fin du collège : classe de </text:span><text:span text:style-name="T4">troisième</text:span><text:span text:style-name="T2"> + </text:span><text:span text:style-name="T4">brevet</text:span></text:p>
              </text:list-item>
              <text:list-item>
                <text:p text:style-name="P6"><text:span text:style-name="T2">Choix : voie </text:span><text:span text:style-name="T4">générale et technologique</text:span><text:span text:style-name="T2"> ou </text:span><text:span text:style-name="T4">professionnelle</text:span></text:p>
              </text:list-item>
              <text:list-item>
                <text:p text:style-name="P6"><text:span text:style-name="T2">Chaque élève formule des </text:span><text:span text:style-name="T4">vœux</text:span><text:span text:style-name="T2"> d’orientation</text:span></text:p>
              </text:list-item>
              <text:list-item>
                <text:p text:style-name="P6"><text:span text:style-name="T2">Le premier grand « projet d’avenir »</text:span></text:p>
              </text:list-item>
            </text:list>
            <text:p text:style-name="P3"><text:span text:style-name="T3">(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Ex. 1 (G)</text:span><text:span text:style-name="T2"> : conjuguer (être, faire, aller, avoir, savoir)</text:span></text:p>
              </text:list-item>
              <text:list-item>
                <text:p text:style-name="P6"><text:span text:style-name="T4">Ex. 2 (M)</text:span><text:span text:style-name="T2"> : proche ou simple ? + justifier</text:span></text:p>
              </text:list-item>
              <text:list-item>
                <text:p text:style-name="P6"><text:span text:style-name="T4">Ex. 3 (M)</text:span><text:span text:style-name="T2"> : réécrire à la 3ᵉ personne (« Léa »)</text:span></text:p>
              </text:list-item>
              <text:list-item>
                <text:p text:style-name="P6"><text:span text:style-name="T4">Ex. 4 (E)</text:span><text:span text:style-name="T2"> : compléter avec vos proje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monolo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monolo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ésentez </text:span><text:span text:style-name="T4">3 projets d’avenir</text:span><text:span text:style-name="T2"> (~1 min) :</text:span></text:p>
            <text:list text:style-name="L5">
              <text:list-item>
                <text:p text:style-name="P3"><text:span text:style-name="T2">Où serez-vous ?</text:span></text:p>
              </text:list-item>
              <text:list-item>
                <text:p text:style-name="P3"><text:span text:style-name="T2">Études / métier ?</text:span></text:p>
              </text:list-item>
              <text:list-item>
                <text:p text:style-name="P3"><text:span text:style-name="T2">Un projet personnel</text:span></text:p>
              </text:list-item>
            </text:list>
            <text:p text:style-name="P3"><text:span text:style-name="T2">≥ </text:span><text:span text:style-name="T2">6 verbes au futur, dont 2 irréguliers · connecteur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conjugue les 9 irréguliers</text:span></text:p>
              </text:list-item>
              <text:list-item>
                <text:p text:style-name="P6"><text:span text:style-name="T2">☐ </text:span><text:span text:style-name="T2">Je choisis proche / simple</text:span></text:p>
              </text:list-item>
              <text:list-item>
                <text:p text:style-name="P6"><text:span text:style-name="T2">☐ </text:span><text:span text:style-name="T2">Je repère le -r-</text:span></text:p>
              </text:list-item>
              <text:list-item>
                <text:p text:style-name="P6"><text:span text:style-name="T2">☐ </text:span><text:span text:style-name="T2">Je parle 1 min sans lire</text:span></text:p>
              </text:list-item>
              <text:list-item>
                <text:p text:style-name="P6"><text:span text:style-name="T2">☐ </text:span><text:span text:style-name="T2">J’écris ~80 mots au futu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Grammaire, conjugaison (10 P.)</text:span></text:p>
              </text:list-item>
              <text:list-item>
                <text:p text:style-name="P6"><text:span text:style-name="T2">Tâche 2 — Proche ou simple ? + justifier (5 P.)</text:span></text:p>
              </text:list-item>
              <text:list-item>
                <text:p text:style-name="P6"><text:span text:style-name="T2">Tâche 3 — Écrire ~80 mots sur vos projets (15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èges à évit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ièges à évit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je serai</text:span><text:span text:style-name="T2"> (être) ≠ </text:span><text:span text:style-name="T3">je saurai</text:span><text:span text:style-name="T2"> (savoir)</text:span></text:p>
              </text:list-item>
              <text:list-item>
                <text:p text:style-name="P6"><text:span text:style-name="T2">Futur proche : </text:span><text:span text:style-name="T3">aller</text:span><text:span text:style-name="T2"> au présent, pas à l’imparfait</text:span></text:p>
              </text:list-item>
              <text:list-item>
                <text:p text:style-name="P6"><text:span text:style-name="T2">Double -r- : je verrai, tu pourras, ils mourro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3:44</meta:creation-date>
    <dc:date>2026-07-21T15:33:44</dc:date>
    <meta:document-statistic meta:object-count="193"/>
    <meta:generator>LibreOffice/24.2.7.2$Linux_X86_64 LibreOffice_project/420$Build-2</meta:generator>
  </office:meta>
</office:document-meta>
</file>