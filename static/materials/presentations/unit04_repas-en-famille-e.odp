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Repas en f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Repas en f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dialogue à table et repérer le menu</text:span></text:p>
              </text:list-item>
              <text:list-item>
                <text:p text:style-name="P6"><text:span text:style-name="T2">Nommer et classer au moins 15 aliments</text:span></text:p>
              </text:list-item>
              <text:list-item>
                <text:p text:style-name="P6"><text:span text:style-name="T2">Employer les partitifs </text:span><text:span text:style-name="T3">du, de la, de l’, des</text:span><text:span text:style-name="T2"> + </text:span><text:span text:style-name="T3">de</text:span><text:span text:style-name="T2"> à la négation</text:span></text:p>
              </text:list-item>
              <text:list-item>
                <text:p text:style-name="P6"><text:span text:style-name="T2">Dialoguer pour planifier un repas famili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manche midi, chez la famille Lemaire.</text:span></text:p>
            <text:p text:style-name="P7"><text:span text:style-name="T4">— </text:span><text:span text:style-name="T4">Tu veux </text:span><text:span text:style-name="T5">de l’</text:span><text:span text:style-name="T4">eau ou </text:span><text:span text:style-name="T5">du</text:span><text:span text:style-name="T4"> jus de pomme ? — </text:span><text:span text:style-name="T5">De l’</text:span><text:span text:style-name="T4">eau. Mais je ne prends pas </text:span><text:span text:style-name="T5">de</text:span><text:span text:style-name="T4"> viande aujourd’hui. — Pas de problème, il y a </text:span><text:span text:style-name="T5">de la</text:span><text:span text:style-name="T4"> quiche pour tout le mond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ngez-vous souvent en famille ? Quel jour ?</text:span></text:p>
              </text:list-item>
              <text:list-item>
                <text:p text:style-name="P6"><text:span text:style-name="T2">Quel est votre plat préféré ?</text:span></text:p>
              </text:list-item>
              <text:list-item>
                <text:p text:style-name="P6"><text:span text:style-name="T2">Aimez-vous cuisiner ?</text:span></text:p>
              </text:list-item>
              <text:list-item>
                <text:p text:style-name="P6"><text:span text:style-name="T2">Connaissez-vous des plats frança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4.17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6">Catégorie</text:span></text:p>
              </table:table-cell>
              <table:table-cell>
                <text:p text:style-name="P8"><text:span text:style-name="T6">Aliment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Entrée</text:span></text:p>
              </table:table-cell>
              <table:table-cell>
                <text:p text:style-name="P8"><text:span text:style-name="T7">quiche, soupe, salade, charcuteri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Plat</text:span></text:p>
              </table:table-cell>
              <table:table-cell>
                <text:p text:style-name="P8"><text:span text:style-name="T7">gigot d’agneau, poulet rôti, poisson, pâte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Dessert</text:span></text:p>
              </table:table-cell>
              <table:table-cell>
                <text:p text:style-name="P8"><text:span text:style-name="T7">tarte aux pommes, gâteau, glace, mouss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Boissons</text:span></text:p>
              </table:table-cell>
              <table:table-cell>
                <text:p text:style-name="P8"><text:span text:style-name="T7">eau, jus de pomme, so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parti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parti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8">du</text:span><text:span text:style-name="T2"> + masculin : </text:span><text:span text:style-name="T3">du fromage</text:span></text:p>
              </text:list-item>
              <text:list-item>
                <text:p text:style-name="P6"><text:span text:style-name="T8">de la</text:span><text:span text:style-name="T2"> + féminin : </text:span><text:span text:style-name="T3">de la salade</text:span></text:p>
              </text:list-item>
              <text:list-item>
                <text:p text:style-name="P6"><text:span text:style-name="T8">de l’</text:span><text:span text:style-name="T2"> + voyelle : </text:span><text:span text:style-name="T3">de l’eau</text:span></text:p>
              </text:list-item>
              <text:list-item>
                <text:p text:style-name="P6"><text:span text:style-name="T8">des</text:span><text:span text:style-name="T2"> + pluriel : </text:span><text:span text:style-name="T3">des légumes</text:span></text:p>
              </text:list-item>
              <text:list-item>
                <text:p text:style-name="P6"><text:span text:style-name="T8">négation → de</text:span><text:span text:style-name="T2"> : </text:span><text:span text:style-name="T3">Je ne mange pas </text:span><text:span text:style-name="T9">de</text:span><text:span text:style-name="T3"> viande.</text:span></text:p>
              </text:list-item>
              <text:list-item>
                <text:p text:style-name="P6"><text:span text:style-name="T8">opinion → article défini</text:span><text:span text:style-name="T2"> : </text:span><text:span text:style-name="T3">J’aime </text:span><text:span text:style-name="T9">le</text:span><text:span text:style-name="T3"> fromag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8">Le repas gastronomique des Français</text:span><text:span text:style-name="T2"> (UNESCO, 2010)</text:span></text:p>
            <text:p text:style-name="P3"><text:span text:style-name="T2">Une pratique sociale pour célébrer les moments importants : apéritif, entrée, plat, fromage, dessert. Ce qui compte, c’est la convivialité et le partage.</text:span></text:p>
            <text:p text:style-name="P3"><text:span text:style-name="T3">(Source : Wikipédia, CC BY-SA — voir Sources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orale (5 questions)</text:span></text:p>
              </text:list-item>
              <text:list-item>
                <text:p text:style-name="P6"><text:span text:style-name="T2">Ex. 2 : compléter avec les partitifs</text:span></text:p>
              </text:list-item>
              <text:list-item>
                <text:p text:style-name="P6"><text:span text:style-name="T2">Ex. 3 : entrée, plat ou dessert ?</text:span></text:p>
              </text:list-item>
              <text:list-item>
                <text:p text:style-name="P6"><text:span text:style-name="T2">Ex. 4 : opinion (défini) ou quantité (partitif) ?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8">En binôme (~10 répliques) :</text:span><text:span text:style-name="T2"> planifiez un repas familial.</text:span></text:p>
            <text:list text:style-name="L3">
              <text:list-item>
                <text:p text:style-name="P3"><text:span text:style-name="T2">Menu complet : entrée, plat, dessert, boisson</text:span></text:p>
              </text:list-item>
              <text:list-item>
                <text:p text:style-name="P3"><text:span text:style-name="T2">Au moins 3 partitifs + 1 négation + 1 question</text:span></text:p>
              </text:list-item>
            </text:list>
            <text:p text:style-name="P3"><text:span text:style-name="T2">Critères : contenu · partitifs · interaction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le menu d’un dialogue</text:span></text:p>
              </text:list-item>
              <text:list-item>
                <text:p text:style-name="P6"><text:span text:style-name="T2">☐ </text:span><text:span text:style-name="T2">Je nomme et classe 15 aliments</text:span></text:p>
              </text:list-item>
              <text:list-item>
                <text:p text:style-name="P6"><text:span text:style-name="T2">☐ </text:span><text:span text:style-name="T2">J’utilise les partitifs + </text:span><text:span text:style-name="T3">de</text:span><text:span text:style-name="T2"> à la négation</text:span></text:p>
              </text:list-item>
              <text:list-item>
                <text:p text:style-name="P6"><text:span text:style-name="T2">☐ </text:span><text:span text:style-name="T2">Je distingue partitif et article défini</text:span></text:p>
              </text:list-item>
              <text:list-item>
                <text:p text:style-name="P6"><text:span text:style-name="T2">☐ </text:span><text:span text:style-name="T2">Je dialogue pour planifier un re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: 10 pts</text:span></text:p>
              </text:list-item>
              <text:list-item>
                <text:p text:style-name="P6"><text:span text:style-name="T2">Tâche 2 — Partitifs (8 phrases) : 8 pts</text:span></text:p>
              </text:list-item>
              <text:list-item>
                <text:p text:style-name="P6"><text:span text:style-name="T2">Tâche 3 — Interaction orale (scène à table) : 12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pas gastronomique des Français — Wikipédia, CC BY-SA 4.0</text:span></text:p>
              </text:list-item>
              <text:list-item>
                <text:p text:style-name="P6"><text:span text:style-name="T2">Article partitif — Wikipédia, CC BY-SA 4.0</text:span></text:p>
              </text:list-item>
              <text:list-item>
                <text:p text:style-name="P6"><text:span text:style-name="T2">UNESCO, Patrimoine culturel immatériel (2010) — référ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27</meta:creation-date>
    <dc:date>2026-07-21T16:09:27</dc:date>
    <meta:document-statistic meta:object-count="181"/>
    <meta:generator>LibreOffice/24.2.7.2$Linux_X86_64 LibreOffice_project/420$Build-2</meta:generator>
  </office:meta>
</office:document-meta>
</file>