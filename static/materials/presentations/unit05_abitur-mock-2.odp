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5 — épreuve finale mock 2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5 — épreuve finale mock 2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xtrait littéraire · Parcours E · classe 13 · Niveau E</text:span></text:p>
            <text:p text:style-name="P3"><text:span text:style-name="T2">Compréhension écrite + expression écrite argumenté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extrait littéraire du XIXe siècle</text:span></text:p>
              </text:list-item>
              <text:list-item>
                <text:p text:style-name="P6"><text:span text:style-name="T2">Repérer et nommer des procédés d’écriture</text:span></text:p>
              </text:list-item>
              <text:list-item>
                <text:p text:style-name="P6"><text:span text:style-name="T2">Rédiger un texte argumenté (~300 mots)</text:span></text:p>
              </text:list-item>
              <text:list-item>
                <text:p text:style-name="P6"><text:span text:style-name="T2">Gérer son temps en conditions d’exame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ux semaines avant l’épreuve : article de presse (mock 1) ou extrait littéraire (mock 2) ?</text:span></text:p>
            <text:list text:style-name="L3">
              <text:list-item>
                <text:p text:style-name="P3"><text:span text:style-name="T2">Résumer n’est pas analyser</text:span></text:p>
              </text:list-item>
              <text:list-item>
                <text:p text:style-name="P3"><text:span text:style-name="T2">Le correcteur attend une analyse et une prise de posi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nticiper par le titre : </text:span><text:span text:style-name="T3">La Parure</text:span></text:p>
              </text:list-item>
              <text:list-item>
                <text:p text:style-name="P6"><text:span text:style-name="T2">Trois axes : intrigue · forme · thème</text:span></text:p>
              </text:list-item>
              <text:list-item>
                <text:p text:style-name="P6"><text:span text:style-name="T2">Vocabulaire : richesse vs pauvre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trait, champ lexical, opposition</text:span></text:p>
              </text:list-item>
              <text:list-item>
                <text:p text:style-name="P6"><text:span text:style-name="T2">ironie, registre, focalisation</text:span></text:p>
              </text:list-item>
              <text:list-item>
                <text:p text:style-name="P6"><text:span text:style-name="T2">visée critiq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connecteu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connecteu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ntroduire : tout d’abord, d’une part</text:span></text:p>
              </text:list-item>
              <text:list-item>
                <text:p text:style-name="P6"><text:span text:style-name="T2">Ajouter : de plus, en outre</text:span></text:p>
              </text:list-item>
              <text:list-item>
                <text:p text:style-name="P6"><text:span text:style-name="T2">Opposer : cependant, en revanche</text:span></text:p>
              </text:list-item>
              <text:list-item>
                <text:p text:style-name="P6"><text:span text:style-name="T2">Illustrer : par exemple, ainsi</text:span></text:p>
              </text:list-item>
              <text:list-item>
                <text:p text:style-name="P6"><text:span text:style-name="T2">Conclure : en somme, pour conclure</text:span></text:p>
              </text:list-item>
            </text:list>
            <text:p text:style-name="P3"><text:span text:style-name="T2">Règle : citation brève + interpréta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suppo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suppo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La Parure</text:span><text:span text:style-name="T2">, Guy de Maupassant (1884) — domaine public</text:span></text:p>
            <text:p text:style-name="P3"><text:span text:style-name="T2">« C’était une de ces jolies et charmantes filles, nées, comme par une erreur du destin, dans une famille d’employés…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aupassant (1850–1893) : maître de la nouvelle réaliste</text:span></text:p>
              </text:list-item>
              <text:list-item>
                <text:p text:style-name="P6"><text:span text:style-name="T3">La Parure</text:span><text:span text:style-name="T2"> (1884) : célèbre pour sa chute</text:span></text:p>
              </text:list-item>
              <text:list-item>
                <text:p text:style-name="P6"><text:span text:style-name="T2">Thèmes : vanité, désir de paraître</text:span></text:p>
              </text:list-item>
              <text:list-item>
                <text:p text:style-name="P6"><text:span text:style-name="T2">Source :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(G) : milieu, mariage, souffrance</text:span></text:p>
              </text:list-item>
              <text:list-item>
                <text:p text:style-name="P6"><text:span text:style-name="T2">Champ lexical (M) : 4 mots de la pauvreté</text:span></text:p>
              </text:list-item>
              <text:list-item>
                <text:p text:style-name="P6"><text:span text:style-name="T2">Procédés (M) : l’opposition centrale</text:span></text:p>
              </text:list-item>
              <text:list-item>
                <text:p text:style-name="P6"><text:span text:style-name="T2">Interprétation (E) : « erreur du destin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s (extrai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lutions (extrai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amille d’employés · petit commis</text:span></text:p>
              </text:list-item>
              <text:list-item>
                <text:p text:style-name="P6"><text:span text:style-name="T2">Pauvreté : « misère des murs », « usure des sièges »</text:span></text:p>
              </text:list-item>
              <text:list-item>
                <text:p text:style-name="P6"><text:span text:style-name="T2">Opposition beauté / condition modeste</text:span></text:p>
              </text:list-item>
              <text:list-item>
                <text:p text:style-name="P6"><text:span text:style-name="T2">Ironie du narrateur → thème de la van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exte argumenté (~300 mots)</text:span></text:p>
            <text:p text:style-name="P3"><text:span text:style-name="T2">« Vouloir paraître plus riche que l’on n’est : faiblesse ou moteur social ? »</text:span></text:p>
            <text:p text:style-name="P3"><text:span text:style-name="T2">Critères : thèse · structure · citation interprétée · connecteurs · lang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ésumer ≠ analyser</text:span></text:p>
              </text:list-item>
              <text:list-item>
                <text:p text:style-name="P6"><text:span text:style-name="T2">Citer et interpréter</text:span></text:p>
              </text:list-item>
              <text:list-item>
                <text:p text:style-name="P6"><text:span text:style-name="T2">Champ lexical et opposition</text:span></text:p>
              </text:list-item>
              <text:list-item>
                <text:p text:style-name="P6"><text:span text:style-name="T2">Connecteurs logiques</text:span></text:p>
              </text:list-item>
              <text:list-item>
                <text:p text:style-name="P6"><text:span text:style-name="T2">Relire et corrig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rtie A — Compréhension écrite (12 P.)</text:span></text:p>
              </text:list-item>
              <text:list-item>
                <text:p text:style-name="P6"><text:span text:style-name="T2">Partie B — Expression écrite (18 P.)</text:span></text:p>
              </text:list-item>
              <text:list-item>
                <text:p text:style-name="P6"><text:span text:style-name="T2">Total : 30 points · 60 mi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La Parure</text:span><text:span text:style-name="T2">, Maupassant (1884) — Wikisource, domaine public</text:span></text:p>
              </text:list-item>
              <text:list-item>
                <text:p text:style-name="P6"><text:span text:style-name="T2">Guy de Maupassant — Wikipédia, CC BY-SA</text:span></text:p>
              </text:list-item>
              <text:list-item>
                <text:p text:style-name="P6"><text:span text:style-name="T3">La Parure</text:span><text:span text:style-name="T2"> (nouvelle) —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48</meta:creation-date>
    <dc:date>2026-07-21T16:30:48</dc:date>
    <meta:document-statistic meta:object-count="189"/>
    <meta:generator>LibreOffice/24.2.7.2$Linux_X86_64 LibreOffice_project/420$Build-2</meta:generator>
  </office:meta>
</office:document-meta>
</file>