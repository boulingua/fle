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7.62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5 — Amis et confli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5 — Amis et confli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7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et exprimer mes sentiments</text:span></text:p>
              </text:list-item>
              <text:list-item>
                <text:p text:style-name="P6"><text:span text:style-name="T2">Donner mon opinion, dire mon désaccord poliment</text:span></text:p>
              </text:list-item>
              <text:list-item>
                <text:p text:style-name="P6"><text:span text:style-name="T2">Utiliser les pronoms COD</text:span></text:p>
              </text:list-item>
              <text:list-item>
                <text:p text:style-name="P6"><text:span text:style-name="T2">Dialoguer pour résoudre un désaccord</text:span></text:p>
              </text:list-item>
              <text:list-item>
                <text:p text:style-name="P6"><text:span text:style-name="T2">Écrire un message de réconciliation (~12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et Karim, amis depuis l’école primaire. Samedi, cinéma manqué.</text:span></text:p>
            <text:list text:style-name="L3">
              <text:list-item>
                <text:p text:style-name="P3"><text:span text:style-name="T2">Léa : Tu m’avais promis de venir. Je t’ai attendue une heure !</text:span></text:p>
              </text:list-item>
              <text:list-item>
                <text:p text:style-name="P3"><text:span text:style-name="T2">Karim : Désolé, ma sœur était malade, je devais la garder.</text:span></text:p>
              </text:list-item>
              <text:list-item>
                <text:p text:style-name="P3"><text:span text:style-name="T2">Léa : Tu aurais pu m’envoyer un message !</text:span></text:p>
              </text:list-item>
              <text:list-item>
                <text:p text:style-name="P3"><text:span text:style-name="T2">Karim : Tu as raison. On se voit demain ? Je t’invit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un(e) meilleur(e) ami(e) ?</text:span></text:p>
              </text:list-item>
              <text:list-item>
                <text:p text:style-name="P6"><text:span text:style-name="T2">Vous arrive-t-il de vous disputer ? Pourquoi ?</text:span></text:p>
              </text:list-item>
              <text:list-item>
                <text:p text:style-name="P6"><text:span text:style-name="T2">Comment faites-vous la paix ?</text:span></text:p>
              </text:list-item>
            </text:list>
            <text:p text:style-name="P3"><text:span text:style-name="T2">Trois mots pour « ami » au tableau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sentime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sentime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ntent · heureux · triste · fâché / en colère · déçu · jaloux · inquiet</text:span></text:p>
            <text:p text:style-name="P3"><text:span text:style-name="T2">se disputer · un malentendu · s’excuser · se réconcilier · faire la paix</text:span></text:p>
            <text:p text:style-name="P3"><text:span text:style-name="T2">Opinion : à mon avis… · je pense que… · je trouve que… · je (ne) suis (pas) d’accord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ronoms COD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ronoms COD</text:span></text:p>
          </draw:text-box>
        </draw:frame>
        <draw:frame draw:name="Content Placeholder 5" draw:style-name="gr2" draw:layer="layout" svg:width="22.859cm" svg:height="4.174cm" svg:x="1.27cm" svg:y="3.31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3">Personne</text:span></text:p>
              </table:table-cell>
              <table:table-cell>
                <text:p text:style-name="P7"><text:span text:style-name="T3">Sing.</text:span></text:p>
              </table:table-cell>
              <table:table-cell>
                <text:p text:style-name="P7"><text:span text:style-name="T3">Pluriel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ʳᵉ</text:span></text:p>
              </table:table-cell>
              <table:table-cell>
                <text:p text:style-name="P7"><text:span text:style-name="T4">me / m’</text:span></text:p>
              </table:table-cell>
              <table:table-cell>
                <text:p text:style-name="P7"><text:span text:style-name="T4">nou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2ᵉ</text:span></text:p>
              </table:table-cell>
              <table:table-cell>
                <text:p text:style-name="P7"><text:span text:style-name="T4">te / t’</text:span></text:p>
              </table:table-cell>
              <table:table-cell>
                <text:p text:style-name="P7"><text:span text:style-name="T4">vou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3ᵉ m.</text:span></text:p>
              </table:table-cell>
              <table:table-cell>
                <text:p text:style-name="P7"><text:span text:style-name="T4">le / l’</text:span></text:p>
              </table:table-cell>
              <table:table-cell>
                <text:p text:style-name="P7"><text:span text:style-name="T4">le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3ᵉ f.</text:span></text:p>
              </table:table-cell>
              <table:table-cell>
                <text:p text:style-name="P7"><text:span text:style-name="T4">la / l’</text:span></text:p>
              </table:table-cell>
              <table:table-cell>
                <text:p text:style-name="P7"><text:span text:style-name="T4">l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’écoute Karim → Je </text:span><text:span text:style-name="T5">l’</text:span><text:span text:style-name="T2">écoute. Le pronom se place </text:span><text:span text:style-name="T5">devant le verbe</text:span><text:span text:style-name="T2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édiation par les pairs à l’école : des élèves formés aident à dialoguer après une dispute.</text:span></text:p>
            <text:p text:style-name="P3"><text:span text:style-name="T2">Inspirée de la Communication Non Violente (M. Rosenberg) : décrire les faits, dire son sentiment, nommer son besoin, faire une demand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7">
              <text:list-item>
                <text:p text:style-name="P6"><text:span text:style-name="T2">Compréhension du dialogue</text:span></text:p>
              </text:list-item>
              <text:list-item>
                <text:p text:style-name="P6"><text:span text:style-name="T2">Vocabulaire des sentiments</text:span></text:p>
              </text:list-item>
              <text:list-item>
                <text:p text:style-name="P6"><text:span text:style-name="T2">Pronoms COD (transformer)</text:span></text:p>
              </text:list-item>
              <text:list-item>
                <text:p text:style-name="P6"><text:span text:style-name="T2">Donner son opinion</text:span></text:p>
              </text:list-item>
            </text:list>
            <text:p text:style-name="P3"><text:span text:style-name="T2">Différenciation G / M / E — voir fich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jeu de rô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jeu de rô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cène de réconciliation à deux (~3 min) :</text:span></text:p>
            <text:list text:style-name="L7">
              <text:list-item>
                <text:p text:style-name="P3"><text:span text:style-name="T2">expliquer + dire son sentiment</text:span></text:p>
              </text:list-item>
              <text:list-item>
                <text:p text:style-name="P3"><text:span text:style-name="T2">reconnaître + s’excuser</text:span></text:p>
              </text:list-item>
              <text:list-item>
                <text:p text:style-name="P3"><text:span text:style-name="T2">proposer une solution</text:span></text:p>
              </text:list-item>
            </text:list>
            <text:p text:style-name="P3"><text:span text:style-name="T2">3 sentiments · 2 pronoms COD · 1 opin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6 sentiments</text:span></text:p>
              </text:list-item>
              <text:list-item>
                <text:p text:style-name="P6"><text:span text:style-name="T2">J’utilise les pronoms COD</text:span></text:p>
              </text:list-item>
              <text:list-item>
                <text:p text:style-name="P6"><text:span text:style-name="T2">Je donne mon opinion</text:span></text:p>
              </text:list-item>
              <text:list-item>
                <text:p text:style-name="P6"><text:span text:style-name="T2">Je dialogue pour résoudre un conflit</text:span></text:p>
              </text:list-item>
              <text:list-item>
                <text:p text:style-name="P6"><text:span text:style-name="T2">J’écris un message de réconcili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Dialogue de réconciliation (12 P.)</text:span></text:p>
              </text:list-item>
              <text:list-item>
                <text:p text:style-name="P6"><text:span text:style-name="T2">Tâche 2 — Message écrit ~120 mots (13 P.)</text:span></text:p>
              </text:list-item>
            </text:list>
            <text:p text:style-name="P3"><text:span text:style-name="T2">Total : 25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munication non violente (Rosenberg) — Wikipédia, CC BY-SA 4.0</text:span></text:p>
              </text:list-item>
              <text:list-item>
                <text:p text:style-name="P6"><text:span text:style-name="T2">Médiation par les pairs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30</meta:creation-date>
    <dc:date>2026-07-21T16:09:30</dc:date>
    <meta:document-statistic meta:object-count="184"/>
    <meta:generator>LibreOffice/24.2.7.2$Linux_X86_64 LibreOffice_project/420$Build-2</meta:generator>
  </office:meta>
</office:document-meta>
</file>