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5 — Amis et conflit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5 — Amis et conflit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7 · Niveau M</text:span></text:p>
            <text:p text:style-name="P3"><text:span text:style-name="T2">Sentiments · opinions simples · résoudre une dispu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ommer mes sentiments</text:span></text:p>
              </text:list-item>
              <text:list-item>
                <text:p text:style-name="P6"><text:span text:style-name="T2">Donner une opinion simple sur une amitié</text:span></text:p>
              </text:list-item>
              <text:list-item>
                <text:p text:style-name="P6"><text:span text:style-name="T2">Raconter un petit conflit et sa fin</text:span></text:p>
              </text:list-item>
              <text:list-item>
                <text:p text:style-name="P6"><text:span text:style-name="T2">Utiliser les pronoms COD</text:span></text:p>
              </text:list-item>
              <text:list-item>
                <text:p text:style-name="P6"><text:span text:style-name="T2">Proposer une réconcilia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— </text:span><text:span text:style-name="T2">Léa, tu fais la tête ? Qu’est-ce qu’il y a ? — Tu ne m’as pas attendue ce matin. — Je suis désolé. On se réconcilie ? — D’accord. Mais la prochaine fois, tu m’attends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s-tu un·e meilleur·e ami·e ?</text:span></text:p>
              </text:list-item>
              <text:list-item>
                <text:p text:style-name="P6"><text:span text:style-name="T2">Te disputes-tu parfois ? À quel sujet ?</text:span></text:p>
              </text:list-item>
              <text:list-item>
                <text:p text:style-name="P6"><text:span text:style-name="T2">Comment fait-on la paix ?</text:span></text:p>
              </text:list-item>
              <text:list-item>
                <text:p text:style-name="P6"><text:span text:style-name="T2">Trois mots pour un·e bon·ne ami·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content · heureux · triste · fâché · jaloux · déçu · inquiet</text:span></text:p>
            <text:p text:style-name="P3"><text:span text:style-name="T2">se disputer · se réconcilier · faire la paix</text:span></text:p>
            <text:p text:style-name="P3"><text:span text:style-name="T2">un malentendu · s’excuser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Pronoms COD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Pronoms COD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Ils remplacent un nom et se placent </text:span><text:span text:style-name="T3">avant le verbe</text:span><text:span text:style-name="T2">.</text:span></text:p>
            <text:p text:style-name="P3"><text:span text:style-name="T2">me/m’ · te/t’ · le/l’ · la/l’ · nous · vous · les</text:span></text:p>
            <text:p text:style-name="P3"><text:span text:style-name="T4">Tu écoutes Léa ?</text:span><text:span text:style-name="T2"> → </text:span><text:span text:style-name="T4">Oui, je l’écoute.</text:span><text:span text:style-name="T2"> </text:span><text:span text:style-name="T4">Tu m’aides ?</text:span><text:span text:style-name="T2"> → </text:span><text:span text:style-name="T4">Oui, je t’aid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e — Le malentendu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exte — Le malentendu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— </text:span><text:span text:style-name="T2">Tu m’as oubliée samedi ! — J’ai eu un match, je t’ai envoyé un message. — Je ne l’ai pas reçu. — C’est un malentendu ! On se voit ce soir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En France, des collèges pratiquent la </text:span><text:span text:style-name="T3">médiation par les pairs</text:span><text:span text:style-name="T2"> : des élèves formés aident d’autres élèves à régler leurs petits conflits par la parole.</text:span></text:p>
            <text:p text:style-name="P3"><text:span text:style-name="T2">Règles : écouter · confidentialité · chercher une solution ensembl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Pronoms COD</text:span></text:p>
              </text:list-item>
              <text:list-item>
                <text:p text:style-name="P6"><text:span text:style-name="T2">Ex. 2 Sentiments</text:span></text:p>
              </text:list-item>
              <text:list-item>
                <text:p text:style-name="P6"><text:span text:style-name="T2">Ex. 3 Opinion simple</text:span></text:p>
              </text:list-item>
              <text:list-item>
                <text:p text:style-name="P6"><text:span text:style-name="T2">Ex. 4 Compréhension du texte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Racontez une dispute puis une réconciliation (~80 mots).</text:span></text:p>
            <text:p text:style-name="P3"><text:span text:style-name="T2">2 sentiments · 2 pronoms COD · passé composé · une opinion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nomme 6 sentiments</text:span></text:p>
              </text:list-item>
              <text:list-item>
                <text:p text:style-name="P6"><text:span text:style-name="T2">J’emploie les pronoms COD</text:span></text:p>
              </text:list-item>
              <text:list-item>
                <text:p text:style-name="P6"><text:span text:style-name="T2">Je donne une opinion simple</text:span></text:p>
              </text:list-item>
              <text:list-item>
                <text:p text:style-name="P6"><text:span text:style-name="T2">Je raconte au passé composé</text:span></text:p>
              </text:list-item>
              <text:list-item>
                <text:p text:style-name="P6"><text:span text:style-name="T2">Je joue un dialogue de réconcilia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Tâche 1 — Pronoms COD (10 P.) Tâche 2 — Compréhension (8 P.) Tâche 3 — Expression écrite (12 P.)</text:span></text:p>
            <text:p text:style-name="P3"><text:span text:style-name="T3">Total : 30 P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Amitié</text:span><text:span text:style-name="T2"> — Wikipédia, CC BY-SA 4.0</text:span></text:p>
              </text:list-item>
              <text:list-item>
                <text:p text:style-name="P6"><text:span text:style-name="T4">Médiation par les pairs</text:span><text:span text:style-name="T2"> — Éduscol, ministère de l’Éducation national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08:16</meta:creation-date>
    <dc:date>2026-07-21T15:08:16</dc:date>
    <meta:document-statistic meta:object-count="185"/>
    <meta:generator>LibreOffice/24.2.7.2$Linux_X86_64 LibreOffice_project/420$Build-2</meta:generator>
  </office:meta>
</office:document-meta>
</file>