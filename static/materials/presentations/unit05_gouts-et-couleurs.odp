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5 — Goûts et coul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5 — Goûts et coul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6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et accorder dix couleurs</text:span></text:p>
              </text:list-item>
              <text:list-item>
                <text:p text:style-name="P6"><text:span text:style-name="T2">Exprimer un goût : adorer, aimer, préférer, ne pas aimer, détester</text:span></text:p>
              </text:list-item>
              <text:list-item>
                <text:p text:style-name="P6"><text:span text:style-name="T2">Poser une question sur les goûts et y répondre</text:span></text:p>
              </text:list-item>
              <text:list-item>
                <text:p text:style-name="P6"><text:span text:style-name="T2">Écrire un court texte (~70 mots) sur mes goûts</text:span></text:p>
              </text:list-item>
              <text:list-item>
                <text:p text:style-name="P6"><text:span text:style-name="T2">Justifier avec </text:span><text:span text:style-name="T3">parce q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ant les casiers :</text:span></text:p>
            <text:list text:style-name="L3">
              <text:list-item>
                <text:p text:style-name="P3"><text:span text:style-name="T2">Anouk : « Ton sac est vert ! J’adore cette couleur. »</text:span></text:p>
              </text:list-item>
              <text:list-item>
                <text:p text:style-name="P3"><text:span text:style-name="T2">Tristan : « Moi, je préfère le bleu. »</text:span></text:p>
              </text:list-item>
              <text:list-item>
                <text:p text:style-name="P3"><text:span text:style-name="T2">Anouk : « Tu aimes le rouge ? »</text:span></text:p>
              </text:list-item>
              <text:list-item>
                <text:p text:style-name="P3"><text:span text:style-name="T2">Tristan : « Bof… je n’aime pas trop. C’est trop vif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z cinq couleurs dans la salle</text:span></text:p>
              </text:list-item>
              <text:list-item>
                <text:p text:style-name="P6"><text:span text:style-name="T2">« Ma couleur préférée, c’est le… »</text:span></text:p>
              </text:list-item>
              <text:list-item>
                <text:p text:style-name="P6"><text:span text:style-name="T2">Vrai ou faux : « une voiture rouges » ?</text:span></text:p>
              </text:list-item>
              <text:list-item>
                <text:p text:style-name="P6"><text:span text:style-name="T2">Connaissez-vous </text:span><text:span text:style-name="T3">aimer</text:span><text:span text:style-name="T2"> et </text:span><text:span text:style-name="T3">adorer</text:span><text:span text:style-name="T2">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coul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s coul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ouge · bleu(e) · jaune · vert(e) · noir(e)</text:span></text:p>
            <text:p text:style-name="P3"><text:span text:style-name="T2">blanc(he) · orange · violet(te) · rose · gris(e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imer un goû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Exprimer un goû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u + au – :</text:span></text:p>
            <text:list text:style-name="L3">
              <text:list-item>
                <text:p text:style-name="P3"><text:span text:style-name="T2">j’adore</text:span></text:p>
              </text:list-item>
              <text:list-item>
                <text:p text:style-name="P3"><text:span text:style-name="T2">j’aime (bien)</text:span></text:p>
              </text:list-item>
              <text:list-item>
                <text:p text:style-name="P3"><text:span text:style-name="T2">je préfère</text:span></text:p>
              </text:list-item>
              <text:list-item>
                <text:p text:style-name="P3"><text:span text:style-name="T2">je n’aime pas (trop)</text:span></text:p>
              </text:list-item>
              <text:list-item>
                <text:p text:style-name="P3"><text:span text:style-name="T2">je détes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’accord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’accord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pull </text:span><text:span text:style-name="T4">vert</text:span><text:span text:style-name="T2"> → une veste </text:span><text:span text:style-name="T4">verte</text:span></text:p>
              </text:list-item>
              <text:list-item>
                <text:p text:style-name="P6"><text:span text:style-name="T2">des pulls </text:span><text:span text:style-name="T4">verts</text:span><text:span text:style-name="T2"> → des vestes </text:span><text:span text:style-name="T4">vertes</text:span></text:p>
              </text:list-item>
            </text:list>
            <text:p text:style-name="P3"><text:span text:style-name="T2">Invariables : </text:span><text:span text:style-name="T4">orange</text:span><text:span text:style-name="T2">, </text:span><text:span text:style-name="T4">marron</text:span></text:p>
            <text:p text:style-name="P3"><text:span text:style-name="T3">un sac orange · des gants marr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lo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alo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— </text:span><text:span text:style-name="T2">Tu aimes la peinture ?</text:span></text:p>
              </text:list-item>
              <text:list-item>
                <text:p text:style-name="P6"><text:span text:style-name="T2">— </text:span><text:span text:style-name="T2">Oui, j’adore ! Je peins des paysages : du bleu, du vert.</text:span></text:p>
              </text:list-item>
              <text:list-item>
                <text:p text:style-name="P6"><text:span text:style-name="T2">— </text:span><text:span text:style-name="T2">Moi, je préfère le noir et le blanc.</text:span></text:p>
              </text:list-item>
              <text:list-item>
                <text:p text:style-name="P6"><text:span text:style-name="T2">— </text:span><text:span text:style-name="T2">Chacun ses goûts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Europe, le </text:span><text:span text:style-name="T4">bleu</text:span><text:span text:style-name="T2"> est souvent la couleur préférée, devant le vert et le rouge.</text:span></text:p>
            <text:p text:style-name="P3"><text:span text:style-name="T2">Le bleu est associé au calme et à la confiance.</text:span></text:p>
            <text:p text:style-name="P3"><text:span text:style-name="T3">(D’après Wikipédia, « Bleu », CC-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dialogue</text:span></text:p>
              </text:list-item>
              <text:list-item>
                <text:p text:style-name="P6"><text:span text:style-name="T2">Accord des adjectifs de couleur</text:span></text:p>
              </text:list-item>
              <text:list-item>
                <text:p text:style-name="P6"><text:span text:style-name="T2">Exprimer un goût (phrases complètes)</text:span></text:p>
              </text:list-item>
              <text:list-item>
                <text:p text:style-name="P6"><text:span text:style-name="T2">Mini-dialogue à compléter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essage à un(e) correspondant(e) (~70 mots) :</text:span></text:p>
            <text:list text:style-name="L3">
              <text:list-item>
                <text:p text:style-name="P3"><text:span text:style-name="T2">2 goûts positifs, 1 « je préfère », 1 goût négatif</text:span></text:p>
              </text:list-item>
              <text:list-item>
                <text:p text:style-name="P3"><text:span text:style-name="T2">3 couleurs accordées</text:span></text:p>
              </text:list-item>
              <text:list-item>
                <text:p text:style-name="P3"><text:span text:style-name="T2">1 justification avec </text:span><text:span text:style-name="T3">parce q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 — Interaction orale (dialogue) : 10 P.</text:span></text:p>
              </text:list-item>
              <text:list-item>
                <text:p text:style-name="P6"><text:span text:style-name="T2">B — Expression écrite (~70 mots) : 12 P.</text:span></text:p>
              </text:list-item>
              <text:list-item>
                <text:p text:style-name="P6"><text:span text:style-name="T2">C — Vocabulaire et grammaire : 8 P.</text:span></text:p>
              </text:list-item>
            </text:list>
            <text:p text:style-name="P3"><text:span text:style-name="T4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dix couleurs</text:span></text:p>
              </text:list-item>
              <text:list-item>
                <text:p text:style-name="P6"><text:span text:style-name="T2">J’accorde les adjectifs</text:span></text:p>
              </text:list-item>
              <text:list-item>
                <text:p text:style-name="P6"><text:span text:style-name="T2">J’exprime et je justifie un goût</text:span></text:p>
              </text:list-item>
              <text:list-item>
                <text:p text:style-name="P6"><text:span text:style-name="T2">Je pose une question et je répond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08</meta:creation-date>
    <dc:date>2026-07-21T15:47:08</dc:date>
    <meta:document-statistic meta:object-count="185"/>
    <meta:generator>LibreOffice/24.2.7.2$Linux_X86_64 LibreOffice_project/420$Build-2</meta:generator>
  </office:meta>
</office:document-meta>
</file>