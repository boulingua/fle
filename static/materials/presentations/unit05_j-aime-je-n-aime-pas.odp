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J’aime, je n’aime p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J’aime, je n’aime p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 ce que j’aime et ce que je n’aime pas</text:span></text:p>
              </text:list-item>
              <text:list-item>
                <text:p text:style-name="P6"><text:span text:style-name="T2">Construire la négation </text:span><text:span text:style-name="T3">ne … pas</text:span></text:p>
              </text:list-item>
              <text:list-item>
                <text:p text:style-name="P6"><text:span text:style-name="T2">Conjuguer les verbes en </text:span><text:span text:style-name="T3">-er</text:span><text:span text:style-name="T2"> au présent</text:span></text:p>
              </text:list-item>
              <text:list-item>
                <text:p text:style-name="P6"><text:span text:style-name="T2">Interviewer un ou une camarade sur ses goûts</text:span></text:p>
              </text:list-item>
              <text:list-item>
                <text:p text:style-name="P6"><text:span text:style-name="T2">Écrire un court texte sur mes préférenc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la cantine, Nora et Malik regardent le menu.</text:span></text:p>
            <text:list text:style-name="L3">
              <text:list-item>
                <text:p text:style-name="P3"><text:span text:style-name="T2">Nora : J’adore les pâtes au fromage !</text:span></text:p>
              </text:list-item>
              <text:list-item>
                <text:p text:style-name="P3"><text:span text:style-name="T2">Malik : Moi, je déteste le poisson.</text:span></text:p>
              </text:list-item>
              <text:list-item>
                <text:p text:style-name="P3"><text:span text:style-name="T2">Nora : Moi, j’aime beaucoup le poisson.</text:span></text:p>
              </text:list-item>
              <text:list-item>
                <text:p text:style-name="P3"><text:span text:style-name="T2">Malik : Je n’aime pas trop le chocolat.</text:span></text:p>
              </text:list-item>
            </text:list>
            <text:p text:style-name="P3"><text:span text:style-name="T2">Qui adore quoi ? Qui déteste 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3 choses que vous aimez</text:span></text:p>
              </text:list-item>
              <text:list-item>
                <text:p text:style-name="P6"><text:span text:style-name="T2">3 choses que vous n’aimez pas</text:span></text:p>
              </text:list-item>
              <text:list-item>
                <text:p text:style-name="P6"><text:span text:style-name="T2">« ich mag nicht » = ?</text:span></text:p>
              </text:list-item>
              <text:list-item>
                <text:p text:style-name="P6"><text:span text:style-name="T2">Rangez : je déteste · j’aime · j’adore · je n’aime 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’échelle des goû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’échelle des goû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★★★★ </text:span><text:span text:style-name="T2">J’adore</text:span></text:p>
              </text:list-item>
              <text:list-item>
                <text:p text:style-name="P6"><text:span text:style-name="T2">★★★ </text:span><text:span text:style-name="T2">J’aime beaucoup</text:span></text:p>
              </text:list-item>
              <text:list-item>
                <text:p text:style-name="P6"><text:span text:style-name="T2">★★ </text:span><text:span text:style-name="T2">J’aime bien</text:span></text:p>
              </text:list-item>
              <text:list-item>
                <text:p text:style-name="P6"><text:span text:style-name="T2">★ </text:span><text:span text:style-name="T2">Je n’aime pas trop</text:span></text:p>
              </text:list-item>
              <text:list-item>
                <text:p text:style-name="P6"><text:span text:style-name="T2">✗ </text:span><text:span text:style-name="T2">Je n’aime pas</text:span></text:p>
              </text:list-item>
              <text:list-item>
                <text:p text:style-name="P6"><text:span text:style-name="T2">✗✗ </text:span><text:span text:style-name="T2">Je détes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erbes en </text:span><text:span text:style-name="T3">-er</text:span><text:span text:style-name="T2"> : j’aim</text:span><text:span text:style-name="T4">e</text:span><text:span text:style-name="T2">, tu aim</text:span><text:span text:style-name="T4">es</text:span><text:span text:style-name="T2">, il aim</text:span><text:span text:style-name="T4">e</text:span><text:span text:style-name="T2">, nous aim</text:span><text:span text:style-name="T4">ons</text:span><text:span text:style-name="T2">, vous aim</text:span><text:span text:style-name="T4">ez</text:span><text:span text:style-name="T2">, ils aim</text:span><text:span text:style-name="T4">ent</text:span></text:p>
            <text:p text:style-name="P3"><text:span text:style-name="T2">Négation : </text:span><text:span text:style-name="T4">ne</text:span><text:span text:style-name="T2"> + verbe + </text:span><text:span text:style-name="T4">pas</text:span><text:span text:style-name="T2"> </text:span><text:span text:style-name="T3">ne</text:span><text:span text:style-name="T2"> → </text:span><text:span text:style-name="T3">n’</text:span><text:span text:style-name="T2"> devant voyelle : je </text:span><text:span text:style-name="T4">n’</text:span><text:span text:style-name="T2">aime </text:span><text:span text:style-name="T4">pas</text:span></text:p>
            <text:p text:style-name="P3"><text:span text:style-name="T2">Après </text:span><text:span text:style-name="T3">pas</text:span><text:span text:style-name="T2"> : </text:span><text:span text:style-name="T3">un/une/des</text:span><text:span text:style-name="T2"> → </text:span><text:span text:style-name="T3">de</text:span><text:span text:style-name="T2"> (</text:span><text:span text:style-name="T3">pas de chien</text:span><text:span text:style-name="T2">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blog de C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blog de C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’adore la danse et je joue de la guitare.</text:span></text:p>
            <text:p text:style-name="P3"><text:span text:style-name="T2">J’aime beaucoup cuisiner : nous préparons des crêpes !</text:span></text:p>
            <text:p text:style-name="P3"><text:span text:style-name="T2">Je n’aime pas trop les jeux vidéo.</text:span></text:p>
            <text:p text:style-name="P3"><text:span text:style-name="T2">Je déteste ranger ma chamb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Chandeleu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Chandeleu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2 février : jour des crêpes.</text:span></text:p>
            <text:p text:style-name="P3"><text:span text:style-name="T2">La crêpe ronde et dorée rappelle le soleil et symbolise l’abondance.</text:span></text:p>
            <text:p text:style-name="P3"><text:span text:style-name="T2">Tradition : faire sauter la crêpe d’une main en tenant une pièce dans l’autre.</text:span></text:p>
            <text:p text:style-name="P3"><text:span text:style-name="T2">Le repas gastronomique des Français : UNESCO 2010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mettre à la négative</text:span></text:p>
              </text:list-item>
              <text:list-item>
                <text:p text:style-name="P6"><text:span text:style-name="T2">Ex. 2 : quelle force ?</text:span></text:p>
              </text:list-item>
              <text:list-item>
                <text:p text:style-name="P6"><text:span text:style-name="T2">Ex. 3 : </text:span><text:span text:style-name="T3">ne / n’ / pas</text:span></text:p>
              </text:list-item>
              <text:list-item>
                <text:p text:style-name="P6"><text:span text:style-name="T2">Ex. 4 : conjuguer les verbes en </text:span><text:span text:style-name="T3">-er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terview en binôme (2 min) : 5 questions sur les goûts.</text:span></text:p>
            <text:p text:style-name="P3"><text:span text:style-name="T2">Notez : aime / n’aime pas.</text:span></text:p>
            <text:p text:style-name="P3"><text:span text:style-name="T2">Mini-rapport : « Lukas adore le foot mais déteste les math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utilise les 4 verbes de goût</text:span></text:p>
              </text:list-item>
              <text:list-item>
                <text:p text:style-name="P6"><text:span text:style-name="T2">Ma négation est correcte</text:span></text:p>
              </text:list-item>
              <text:list-item>
                <text:p text:style-name="P6"><text:span text:style-name="T2">Je conjugue les verbes en </text:span><text:span text:style-name="T3">-er</text:span></text:p>
              </text:list-item>
              <text:list-item>
                <text:p text:style-name="P6"><text:span text:style-name="T2">Je peux interviewer un camarade</text:span></text:p>
              </text:list-item>
              <text:list-item>
                <text:p text:style-name="P6"><text:span text:style-name="T2">Je peux écrire sur mes goû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négation (12 pts)</text:span></text:p>
              </text:list-item>
              <text:list-item>
                <text:p text:style-name="P6"><text:span text:style-name="T2">Tâche 2 : compréhension du blog (8 pts)</text:span></text:p>
              </text:list-item>
              <text:list-item>
                <text:p text:style-name="P6"><text:span text:style-name="T2">Tâche 3 : expression écrite (10 pts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7:52</meta:creation-date>
    <dc:date>2026-07-21T15:07:52</dc:date>
    <meta:document-statistic meta:object-count="181"/>
    <meta:generator>LibreOffice/24.2.7.2$Linux_X86_64 LibreOffice_project/420$Build-2</meta:generator>
  </office:meta>
</office:document-meta>
</file>