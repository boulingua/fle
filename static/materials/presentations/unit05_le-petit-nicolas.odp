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Le Petit Nicolas — Lecture suivi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Le Petit Nicolas — Lecture suivi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Parcours E · classe 9 · Niveau E</text:span></text:p>
            <text:p text:style-name="P3"><text:span text:style-name="T2">Modèle : Activer → Apporter → S’entraîner → Produire → Réfléchi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Œuvre protégé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Œuvre protégé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3">Le Petit Nicolas</text:span><text:span text:style-name="T2"> n’est pas dans le domaine public.</text:span></text:p>
            <text:list text:style-name="L3">
              <text:list-item>
                <text:p text:style-name="P3"><text:span text:style-name="T2">On </text:span><text:span text:style-name="T4">présente</text:span><text:span text:style-name="T2"> le livre et ses auteurs.</text:span></text:p>
              </text:list-item>
              <text:list-item>
                <text:p text:style-name="P3"><text:span text:style-name="T2">On </text:span><text:span text:style-name="T4">ne copie</text:span><text:span text:style-name="T2"> ni texte ni dessin.</text:span></text:p>
              </text:list-item>
              <text:list-item>
                <text:p text:style-name="P3"><text:span text:style-name="T2">Tous les textes de lecture du cours sont </text:span><text:span text:style-name="T4">originaux</text:span><text:span text:style-name="T2">.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Présenter le livre et ses auteurs.</text:span></text:p>
              </text:list-item>
              <text:list-item>
                <text:p text:style-name="P6"><text:span text:style-name="T2">Comprendre un court récit scolaire d’enfant.</text:span></text:p>
              </text:list-item>
              <text:list-item>
                <text:p text:style-name="P6"><text:span text:style-name="T2">Reconnaître la voix enfantine et l’humour tendre.</text:span></text:p>
              </text:list-item>
              <text:list-item>
                <text:p text:style-name="P6"><text:span text:style-name="T2">Distinguer imparfait et passé composé.</text:span></text:p>
              </text:list-item>
              <text:list-item>
                <text:p text:style-name="P6"><text:span text:style-name="T2">Rédiger une anecdote (~150 mots).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Mme Devos présente une lecture suivie.</text:span></text:p>
            <text:list text:style-name="L3">
              <text:list-item>
                <text:p text:style-name="P3"><text:span text:style-name="T2">Anouk et Soraya reconnaissent le nom.</text:span></text:p>
              </text:list-item>
              <text:list-item>
                <text:p text:style-name="P3"><text:span text:style-name="T2">On ne lit pas encore le livre : on découvre </text:span><text:span text:style-name="T4">qui</text:span><text:span text:style-name="T2">, </text:span><text:span text:style-name="T4">quoi</text:span><text:span text:style-name="T2">, </text:span><text:span text:style-name="T4">comment</text:span><text:span text:style-name="T2">.</text:span></text:p>
              </text:list-item>
              <text:list-item>
                <text:p text:style-name="P3"><text:span text:style-name="T2">Un enfant raconte sa journée d’école.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1. 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Vos mots liés à l’école ?</text:span></text:p>
              </text:list-item>
              <text:list-item>
                <text:p text:style-name="P6"><text:span text:style-name="T2">Enfant vs adulte : même journée, regard différent.</text:span></text:p>
              </text:list-item>
              <text:list-item>
                <text:p text:style-name="P6"><text:span text:style-name="T2">Roman ou recueil d’histoires courtes ?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Vocabula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Vocabula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la maîtresse · la récré · le cartable · une bêtise · se disputer · se réconcilier · raconter · le narrateur · un camarade · faire semblant de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Point de langu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Point de langu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4">Imparfait</text:span><text:span text:style-name="T2"> = décor, habitude, durée : </text:span><text:span text:style-name="T3">il faisait beau, on jouait.</text:span></text:p>
              </text:list-item>
              <text:list-item>
                <text:p text:style-name="P6"><text:span text:style-name="T4">Passé composé</text:span><text:span text:style-name="T2"> = action, événement : </text:span><text:span text:style-name="T3">Léo est tombé.</text:span></text:p>
              </text:list-item>
              <text:list-item>
                <text:p text:style-name="P6"><text:span text:style-name="T2">Astuce : l’imparfait pose le décor, le passé composé avance l’histoire.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Texte « La dictée »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Texte « La dictée »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3">(texte original)</text:span></text:p>
            <text:list text:style-name="L3">
              <text:list-item>
                <text:p text:style-name="P3"><text:span text:style-name="T2">Une dictée est annoncée.</text:span></text:p>
              </text:list-item>
              <text:list-item>
                <text:p text:style-name="P3"><text:span text:style-name="T2">Rachid fait semblant de travailler.</text:span></text:p>
              </text:list-item>
              <text:list-item>
                <text:p text:style-name="P3"><text:span text:style-name="T2">Une guêpe interrompt tout.</text:span></text:p>
              </text:list-item>
              <text:list-item>
                <text:p text:style-name="P3"><text:span text:style-name="T2">La dictée est reportée à demain.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Les auteur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Les auteur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4">René Goscinny</text:span><text:span text:style-name="T2"> (1926–1977) : texte ; aussi </text:span><text:span text:style-name="T3">Astérix</text:span><text:span text:style-name="T2">, </text:span><text:span text:style-name="T3">Lucky Luke</text:span><text:span text:style-name="T2">.</text:span></text:p>
              </text:list-item>
              <text:list-item>
                <text:p text:style-name="P6"><text:span text:style-name="T4">Jean-Jacques Sempé</text:span><text:span text:style-name="T2"> (1932–2022) : dessins.</text:span></text:p>
              </text:list-item>
              <text:list-item>
                <text:p text:style-name="P6"><text:span text:style-name="T2">Premières histoires en </text:span><text:span text:style-name="T4">1959</text:span><text:span text:style-name="T2">.</text:span></text:p>
              </text:list-item>
              <text:list-item>
                <text:p text:style-name="P6"><text:span text:style-name="T2">Humour né de l’écart enfant / adulte.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3. 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4">
              <text:list-item>
                <text:p text:style-name="P6"><text:span text:style-name="T2">Compréhension du texte.</text:span></text:p>
              </text:list-item>
              <text:list-item>
                <text:p text:style-name="P6"><text:span text:style-name="T2">Vocabulaire (relier).</text:span></text:p>
              </text:list-item>
              <text:list-item>
                <text:p text:style-name="P6"><text:span text:style-name="T2">Imparfait / passé composé (relever).</text:span></text:p>
              </text:list-item>
              <text:list-item>
                <text:p text:style-name="P6"><text:span text:style-name="T2">Transformation au passé.</text:span></text:p>
              </text:list-item>
            </text:list>
            <text:p text:style-name="P3"><text:span text:style-name="T2">Différenciation G / M / E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Produ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4. Produ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Anecdote scolaire </text:span><text:span text:style-name="T4">originale</text:span><text:span text:style-name="T2">, ~150 mots :</text:span></text:p>
            <text:list text:style-name="L3">
              <text:list-item>
                <text:p text:style-name="P3"><text:span text:style-name="T2">deux camarades nommés,</text:span></text:p>
              </text:list-item>
              <text:list-item>
                <text:p text:style-name="P3"><text:span text:style-name="T2">cadre à l’imparfait,</text:span></text:p>
              </text:list-item>
              <text:list-item>
                <text:p text:style-name="P3"><text:span text:style-name="T2">3 actions au passé composé,</text:span></text:p>
              </text:list-item>
              <text:list-item>
                <text:p text:style-name="P3"><text:span text:style-name="T2">une réplique au discours direct.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. 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5. 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Je présente le livre et ses auteurs.</text:span></text:p>
              </text:list-item>
              <text:list-item>
                <text:p text:style-name="P6"><text:span text:style-name="T2">Je comprends un récit d’enfant.</text:span></text:p>
              </text:list-item>
              <text:list-item>
                <text:p text:style-name="P6"><text:span text:style-name="T2">Je reconnais l’humour tendre.</text:span></text:p>
              </text:list-item>
              <text:list-item>
                <text:p text:style-name="P6"><text:span text:style-name="T2">Je distingue imparfait et passé composé.</text:span></text:p>
              </text:list-item>
              <text:list-item>
                <text:p text:style-name="P6"><text:span text:style-name="T2">J’ai écrit mon anecdote.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valuation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Tâche 1 : compréhension (10 pts)</text:span></text:p>
              </text:list-item>
              <text:list-item>
                <text:p text:style-name="P6"><text:span text:style-name="T2">Tâche 2 : imparfait / passé composé (8 pts)</text:span></text:p>
              </text:list-item>
              <text:list-item>
                <text:p text:style-name="P6"><text:span text:style-name="T2">Tâche 3 : expression écrite ~150 mots (12 pts)</text:span></text:p>
              </text:list-item>
            </text:list>
            <text:p text:style-name="P3"><text:span text:style-name="T4">Total : 30 points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ur aller plus loin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Pour aller plus loin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Emprunter / se procurer le livre : petitnicolas.com</text:span></text:p>
              </text:list-item>
              <text:list-item>
                <text:p text:style-name="P6"><text:span text:style-name="T2">Sources : Wikipédia (CC BY-SA) — Le Petit Nicolas, Goscinny, Sempé.</text:span></text:p>
              </text:list-item>
              <text:list-item>
                <text:p text:style-name="P6"><text:span text:style-name="T2">Plateforme indépendante, sans lien avec les ayants droit.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6:25:39</meta:creation-date>
    <dc:date>2026-07-21T16:25:39</dc:date>
    <meta:document-statistic meta:object-count="189"/>
    <meta:generator>LibreOffice/24.2.7.2$Linux_X86_64 LibreOffice_project/420$Build-2</meta:generator>
  </office:meta>
</office:document-meta>
</file>