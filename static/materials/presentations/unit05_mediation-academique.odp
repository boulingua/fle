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Content_20_with_20_Caption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co2" style:family="table-column">
      <style:table-column-properties style:column-width="7.09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Médiation académ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Médiation académ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1 · Niveau E</text:span></text:p>
            <text:p text:style-name="P3"><text:span text:style-name="T2">Transmettre en français le contenu d’un texte savant allema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nsmettre en français un texte de vulgarisation allemand</text:span></text:p>
              </text:list-item>
              <text:list-item>
                <text:p text:style-name="P6"><text:span text:style-name="T2">Préserver termes techniques, chiffres et sources</text:span></text:p>
              </text:list-item>
              <text:list-item>
                <text:p text:style-name="P6"><text:span text:style-name="T2">Restituer la structure argumentative</text:span></text:p>
              </text:list-item>
              <text:list-item>
                <text:p text:style-name="P6"><text:span text:style-name="T2">Distinguer médiation académique et journalistique</text:span></text:p>
              </text:list-item>
              <text:list-item>
                <text:p text:style-name="P6"><text:span text:style-name="T2">Rendre compte de son travai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veut publier un article scientifique allemand dans le journal du lycée.</text:span></text:p>
            <text:p text:style-name="P3"><text:span text:style-name="T2">Yanis : « On ne te demande pas de traduire. Il faut </text:span><text:span text:style-name="T3">transmettre</text:span><text:span text:style-name="T2"> : dire l’essentiel en français. »</text:span></text:p>
            <text:p text:style-name="P3"><text:span text:style-name="T2">Léa : « Je garde les chiffres et les noms, je reformule les explications ? »</text:span></text:p>
            <text:p text:style-name="P3"><text:span text:style-name="T2">Yanis : « Exactement. Et on ne rajoute pas son avi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duire ou transmettre : quelle différence ?</text:span></text:p>
              </text:list-item>
              <text:list-item>
                <text:p text:style-name="P6"><text:span text:style-name="T2">Qu’est-ce qui est plus difficile dans un texte scientifique ?</text:span></text:p>
              </text:list-item>
              <text:list-item>
                <text:p text:style-name="P6"><text:span text:style-name="T2">À qui s’adresse une revue de vulgarisation ?</text:span></text:p>
              </text:list-item>
              <text:list-item>
                <text:p text:style-name="P6"><text:span text:style-name="T2">Trois mots « savants » que vous connaissez déjà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Allemand</text:span></text:p>
              </table:table-cell>
              <table:table-cell>
                <text:p text:style-name="P7"><text:span text:style-name="T4">Françai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die Studie</text:span></text:p>
              </table:table-cell>
              <table:table-cell>
                <text:p text:style-name="P7"><text:span text:style-name="T5">l’étud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nachweisen</text:span></text:p>
              </table:table-cell>
              <table:table-cell>
                <text:p text:style-name="P7"><text:span text:style-name="T5">démontrer, établi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vermuten</text:span></text:p>
              </table:table-cell>
              <table:table-cell>
                <text:p text:style-name="P7"><text:span text:style-name="T5">supposer, suggére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die Quelle</text:span></text:p>
              </table:table-cell>
              <table:table-cell>
                <text:p text:style-name="P7"><text:span text:style-name="T5">la sour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aut (+ Dat.)</text:span></text:p>
              </table:table-cell>
              <table:table-cell>
                <text:p text:style-name="P7"><text:span text:style-name="T5">selon, d’aprè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rapporter sans jug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rapporter sans jug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Fait établi :</text:span><text:span text:style-name="T2"> l’étude </text:span><text:span text:style-name="T3">démontre / établit</text:span><text:span text:style-name="T2"> que…</text:span></text:p>
              </text:list-item>
              <text:list-item>
                <text:p text:style-name="P6"><text:span text:style-name="T6">Probable :</text:span><text:span text:style-name="T2"> les données </text:span><text:span text:style-name="T3">indiquent / montrent</text:span><text:span text:style-name="T2"> que…</text:span></text:p>
              </text:list-item>
              <text:list-item>
                <text:p text:style-name="P6"><text:span text:style-name="T6">Hypothèse :</text:span><text:span text:style-name="T2"> les auteurs </text:span><text:span text:style-name="T3">suggèrent</text:span><text:span text:style-name="T2"> que…</text:span></text:p>
              </text:list-item>
              <text:list-item>
                <text:p text:style-name="P6"><text:span text:style-name="T6">Doute + subjonctif :</text:span><text:span text:style-name="T2"> </text:span><text:span text:style-name="T3">il semble que</text:span><text:span text:style-name="T2"> l’IA </text:span><text:span text:style-name="T3">produise</text:span><text:span text:style-name="T2"> des erreur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de trava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de trava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s modèles de langage produisent parfois des réponses fausses mais crédibles : une « hallucination ».</text:span></text:p>
            <text:p text:style-name="P3"><text:span text:style-name="T2">Ces erreurs seraient plus fréquentes dans les domaines précis (médecine, droit).</text:span></text:p>
            <text:p text:style-name="P3"><text:span text:style-name="T2">Les auteurs suggèrent une vérification systématique des sources. Conclusion pruden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CECR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CECR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Cadre européen ajoute une quatrième activité aux trois classiques : la </text:span><text:span text:style-name="T6">médiation</text:span><text:span text:style-name="T2">.</text:span></text:p>
            <text:p text:style-name="P3"><text:span text:style-name="T2">Médier = rendre un contenu accessible à qui n’y aurait pas accès, en reformulant.</text:span></text:p>
            <text:p text:style-name="P3"><text:span text:style-name="T2">C’est le cœur de l’épreuve de </text:span><text:span text:style-name="T3">Sprachmittlung</text:span><text:span text:style-name="T2">.</text:span></text:p>
            <text:p text:style-name="P3"><text:span text:style-name="T3">(D’après Wikipédia, CC BY-SA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6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Verbes du discours savant (degré de certitude)</text:span></text:p>
              </text:list-item>
              <text:list-item>
                <text:p text:style-name="P6"><text:span text:style-name="T2">Précision lexicale (termes, chiffres, sources)</text:span></text:p>
              </text:list-item>
              <text:list-item>
                <text:p text:style-name="P6"><text:span text:style-name="T2">Médiation courte DE → FR</text:span></text:p>
              </text:list-item>
            </text:list>
            <text:p text:style-name="P3"><text:span text:style-name="T2">Différenciation : (G) amorces · (M) boîte à outils · (E) modalisation + neutral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ubrique « science » du journal du lycée (~250 mots) :</text:span></text:p>
            <text:list text:style-name="L3">
              <text:list-item>
                <text:p text:style-name="P3"><text:span text:style-name="T2">situer la source</text:span></text:p>
              </text:list-item>
              <text:list-item>
                <text:p text:style-name="P3"><text:span text:style-name="T2">trois chiffres exacts</text:span></text:p>
              </text:list-item>
              <text:list-item>
                <text:p text:style-name="P3"><text:span text:style-name="T2">quatre verbes de constat</text:span></text:p>
              </text:list-item>
              <text:list-item>
                <text:p text:style-name="P3"><text:span text:style-name="T2">aucune opinion personnelle</text:span></text:p>
              </text:list-item>
              <text:list-item>
                <text:p text:style-name="P3"><text:span text:style-name="T2">conclusion nuanc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traduire et médier</text:span></text:p>
              </text:list-item>
              <text:list-item>
                <text:p text:style-name="P6"><text:span text:style-name="T2">Je situe une source en une phrase</text:span></text:p>
              </text:list-item>
              <text:list-item>
                <text:p text:style-name="P6"><text:span text:style-name="T2">J’adapte le verbe au degré de certitude</text:span></text:p>
              </text:list-item>
              <text:list-item>
                <text:p text:style-name="P6"><text:span text:style-name="T2">Je conserve chiffres et termes techniques</text:span></text:p>
              </text:list-item>
              <text:list-item>
                <text:p text:style-name="P6"><text:span text:style-name="T2">Je n’ajoute pas mon opin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Content_20_with_20_Caption">
        <draw:frame draw:name="Title 1" presentation:style-name="pr4" draw:text-style-name="P8" draw:layer="layout" svg:width="8.355cm" svg:height="2.42cm" svg:x="1.27cm" svg:y="0.569cm" presentation:class="title" presentation:user-transformed="true">
          <draw:text-box>
            <text:p text:style-name="P7"><text:span text:style-name="T7">Évaluation</text:span></text:p>
          </draw:text-box>
        </draw:frame>
        <draw:frame draw:name="Text Placeholder 3" presentation:style-name="pr5" draw:text-style-name="P10" draw:layer="layout" svg:width="8.355cm" svg:height="9.772cm" svg:x="1.27cm" svg:y="2.99cm" presentation:class="outline" presentation:user-transformed="true">
          <draw:text-box>
            <text:p text:style-name="P9"><text:span text:style-name="T8">Médiation </text:span><text:span text:style-name="T9">Sprachmittlung</text:span><text:span text:style-name="T8"> DE → FR (~180–220 mots)</text:span></text:p>
          </draw:text-box>
        </draw:frame>
        <draw:frame draw:name="Content Placeholder 5" draw:style-name="gr2" draw:layer="layout" svg:width="14.179cm" svg:height="5.009cm" svg:x="9.913cm" svg:y="0.564cm">
          <table:table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<text:span text:style-name="T4">Partie</text:span></text:p>
              </table:table-cell>
              <table:table-cell>
                <text:p text:style-name="P7"><text:span text:style-name="T4">Point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Contenu / fidélité</text:span></text:p>
              </table:table-cell>
              <table:table-cell>
                <text:p text:style-name="P7"><text:span text:style-name="T5">12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Précision académique</text:span></text:p>
              </table:table-cell>
              <table:table-cell>
                <text:p text:style-name="P7"><text:span text:style-name="T5">6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Reformulation</text:span></text:p>
              </table:table-cell>
              <table:table-cell>
                <text:p text:style-name="P7"><text:span text:style-name="T5">5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Neutralité</text:span></text:p>
              </table:table-cell>
              <table:table-cell>
                <text:p text:style-name="P7"><text:span text:style-name="T5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angue</text:span></text:p>
              </table:table-cell>
              <table:table-cell>
                <text:p text:style-name="P7"><text:span text:style-name="T5">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6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</text:span></text:p>
              </text:list-item>
              <text:list-item>
                <text:p text:style-name="P6"><text:span text:style-name="T2">Hallucination (IA) — Wikipédia, CC BY-SA</text:span></text:p>
              </text:list-item>
              <text:list-item>
                <text:p text:style-name="P6"><text:span text:style-name="T2">Pour aller plus loin : </text:span><text:span text:style-name="T3">Pour la Science</text:span><text:span text:style-name="T2">, </text:span><text:span text:style-name="T3">CNRS Le Journal</text:span><text:span text:style-name="T2"> (non affilié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34</meta:creation-date>
    <dc:date>2026-07-21T16:29:34</dc:date>
    <meta:document-statistic meta:object-count="189"/>
    <meta:generator>LibreOffice/24.2.7.2$Linux_X86_64 LibreOffice_project/420$Build-2</meta:generator>
  </office:meta>
</office:document-meta>
</file>