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1.43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5 — Médiation FR↔D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5 — Médiation FR↔D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12 · Niveau E Épreuve finale : </text:span><text:span text:style-name="T3">Sprachmittlung</text:span><text:span text:style-name="T2"> / médiation linguistiqu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estituer en français l’essentiel d’un dossier allemand (~350 mots)</text:span></text:p>
              </text:list-item>
              <text:list-item>
                <text:p text:style-name="P6"><text:span text:style-name="T2">Médier brièvement FR → DE si besoin</text:span></text:p>
              </text:list-item>
              <text:list-item>
                <text:p text:style-name="P6"><text:span text:style-name="T2">Employer des verbes introducteurs (souligner, expliquer, comparer, conclure)</text:span></text:p>
              </text:list-item>
              <text:list-item>
                <text:p text:style-name="P6"><text:span text:style-name="T2">Adapter le registre au destinataire + lien interculturel</text:span></text:p>
              </text:list-item>
              <text:list-item>
                <text:p text:style-name="P6"><text:span text:style-name="T2">Relire à l’aide d’une grille de critèr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nouk passe une épreuve blanche de médiation.</text:span></text:p>
            <text:p text:style-name="P3"><text:span text:style-name="T2">Consigne : « Résumez à Léo, en français, l’essentiel de ce dossier allemand. Il ne lit pas l’allemand. »</text:span></text:p>
            <text:p text:style-name="P3"><text:span text:style-name="T2">Médier ≠ traduire : sélectionner · reformuler · expliquer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Médiation à l’épreuve finale : combien de temps ?</text:span></text:p>
              </text:list-item>
              <text:list-item>
                <text:p text:style-name="P6"><text:span text:style-name="T2">Dossier vs texte unique : quel plan ?</text:span></text:p>
              </text:list-item>
              <text:list-item>
                <text:p text:style-name="P6"><text:span text:style-name="T2">Trois verbes introducteurs français ?</text:span></text:p>
              </text:list-item>
              <text:list-item>
                <text:p text:style-name="P6"><text:span text:style-name="T2">Quand garder un mot allemand (+ traduction)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5" draw:style-name="gr2" draw:layer="layout" svg:width="22.859cm" svg:height="5.009cm" svg:x="1.27cm" svg:y="3.31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4">Français</text:span></text:p>
              </table:table-cell>
              <table:table-cell>
                <text:p text:style-name="P7"><text:span text:style-name="T4">Allemand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le frein à l’endettement</text:span></text:p>
              </table:table-cell>
              <table:table-cell>
                <text:p text:style-name="P7"><text:span text:style-name="T5">die Schuldenbremse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5">le déficit annuel</text:span></text:p>
              </table:table-cell>
              <table:table-cell>
                <text:p text:style-name="P7"><text:span text:style-name="T5">die Neuverschuldung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assouplir / maintenir</text:span></text:p>
              </table:table-cell>
              <table:table-cell>
                <text:p text:style-name="P7"><text:span text:style-name="T5">lockern / beibehalten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5">l’investissement</text:span></text:p>
              </table:table-cell>
              <table:table-cell>
                <text:p text:style-name="P7"><text:span text:style-name="T5">die Investition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souligner que</text:span></text:p>
              </table:table-cell>
              <table:table-cell>
                <text:p text:style-name="P7"><text:span text:style-name="T5">betonen, das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rapporter une sourc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rapporter une sourc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Verbe introducteur + </text:span><text:span text:style-name="T3">que</text:span><text:span text:style-name="T2"> + indicatif :</text:span></text:p>
            <text:list text:style-name="L3">
              <text:list-item>
                <text:p text:style-name="P3"><text:span text:style-name="T3">L’auteur souligne que…</text:span></text:p>
              </text:list-item>
              <text:list-item>
                <text:p text:style-name="P3"><text:span text:style-name="T3">Le texte explique que…</text:span></text:p>
              </text:list-item>
              <text:list-item>
                <text:p text:style-name="P3"><text:span text:style-name="T3">Les critiques estiment que…</text:span></text:p>
              </text:list-item>
            </text:list>
            <text:p text:style-name="P3"><text:span text:style-name="T2">Distance : </text:span><text:span text:style-name="T3">selon le texte…</text:span><text:span text:style-name="T2">, </text:span><text:span text:style-name="T3">d’après l’article…</text:span></text:p>
            <text:p text:style-name="P3"><text:span text:style-name="T2">Piège : </text:span><text:span text:style-name="T3">betonen</text:span><text:span text:style-name="T2"> ≠ « bétonner » → souligner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source (allemand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source (allemand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Schuldenbremse : inscrite dans le Grundgesetz en </text:span><text:span text:style-name="T6">2009</text:span><text:span text:style-name="T2">, limite le déficit du Bund à </text:span><text:span text:style-name="T6">0,35 % du PIB</text:span><text:span text:style-name="T2">.</text:span></text:p>
            <text:p text:style-name="P3"><text:span text:style-name="T2">Aujourd’hui remise en question : climat, infrastructures, numérisation exigent des investissements.</text:span></text:p>
            <text:p text:style-name="P3"><text:span text:style-name="T2">Deux camps : assouplir vs maintenir → compromis modéré possibl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édiation modèle (français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édiation modèle (français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ujet : le frein à l’endettement (2009 ; 0,35 % du PIB)</text:span></text:p>
              </text:list-item>
              <text:list-item>
                <text:p text:style-name="P6"><text:span text:style-name="T2">Pour l’assouplir : investissements d’avenir</text:span></text:p>
              </text:list-item>
              <text:list-item>
                <text:p text:style-name="P6"><text:span text:style-name="T2">Contre : dette publique croissante</text:span></text:p>
              </text:list-item>
              <text:list-item>
                <text:p text:style-name="P6"><text:span text:style-name="T2">Lien interculturel : les 3 % de Maastricht</text:span></text:p>
              </text:list-item>
              <text:list-item>
                <text:p text:style-name="P6"><text:span text:style-name="T2">Conclusion : rigueur vs transition écologiqu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Compréhension du dossier</text:span></text:p>
              </text:list-item>
              <text:list-item>
                <text:p text:style-name="P6"><text:span text:style-name="T2">Ex. 2 — Verbes introducteurs</text:span></text:p>
              </text:list-item>
              <text:list-item>
                <text:p text:style-name="P6"><text:span text:style-name="T2">Ex. 3 — Éviter le mot-à-mot</text:span></text:p>
              </text:list-item>
              <text:list-item>
                <text:p text:style-name="P6"><text:span text:style-name="T2">Ex. 4 — Lien interculturel (production courte)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édiation DE → FR (~350 mots) pour un correspondant qui ne lit pas l’allemand.</text:span></text:p>
            <text:list text:style-name="L3">
              <text:list-item>
                <text:p text:style-name="P3"><text:span text:style-name="T2">4 paragraphes</text:span></text:p>
              </text:list-item>
              <text:list-item>
                <text:p text:style-name="P3"><text:span text:style-name="T2">4 verbes introducteurs</text:span></text:p>
              </text:list-item>
              <text:list-item>
                <text:p text:style-name="P3"><text:span text:style-name="T2">1 donnée chiffrée</text:span></text:p>
              </text:list-item>
              <text:list-item>
                <text:p text:style-name="P3"><text:span text:style-name="T2">1 lien interculturel</text:span></text:p>
              </text:list-item>
            </text:list>
            <text:p text:style-name="P3"><text:span text:style-name="T2">Critères : fidélité · adaptation · reformulation · structure · langu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distingue médier et traduire</text:span></text:p>
              </text:list-item>
              <text:list-item>
                <text:p text:style-name="P6"><text:span text:style-name="T2">J’adapte au destinataire</text:span></text:p>
              </text:list-item>
              <text:list-item>
                <text:p text:style-name="P6"><text:span text:style-name="T2">J’emploie 4 verbes introducteurs</text:span></text:p>
              </text:list-item>
              <text:list-item>
                <text:p text:style-name="P6"><text:span text:style-name="T2">J’explicite les termes allemands</text:span></text:p>
              </text:list-item>
              <text:list-item>
                <text:p text:style-name="P6"><text:span text:style-name="T2">J’ajoute lien interculturel + conclusion nuancé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ts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ts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(8 pts)</text:span></text:p>
              </text:list-item>
              <text:list-item>
                <text:p text:style-name="P6"><text:span text:style-name="T2">Tâche 2 — Verbes / reformulation (8 pts)</text:span></text:p>
              </text:list-item>
              <text:list-item>
                <text:p text:style-name="P6"><text:span text:style-name="T2">Tâche 3 — Médiation DE → FR ~350 mots (14 pt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chuldenbremse (Deutschland) — Wikipedia, CC BY-SA 4.0</text:span></text:p>
              </text:list-item>
              <text:list-item>
                <text:p text:style-name="P6"><text:span text:style-name="T2">CECRL — Wikipédia, CC BY-SA 4.0</text:span></text:p>
              </text:list-item>
              <text:list-item>
                <text:p text:style-name="P6"><text:span text:style-name="T2">Critères de convergence (3 %) — Wikipédia, CC BY-SA 4.0</text:span></text:p>
              </text:list-item>
              <text:list-item>
                <text:p text:style-name="P6"><text:span text:style-name="T2">Bildungsplan 2016 Französisch — Baden-Württemberg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30:11</meta:creation-date>
    <dc:date>2026-07-21T16:30:11</dc:date>
    <meta:document-statistic meta:object-count="185"/>
    <meta:generator>LibreOffice/24.2.7.2$Linux_X86_64 LibreOffice_project/420$Build-2</meta:generator>
  </office:meta>
</office:document-meta>
</file>