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5 — Première analyse : un poèm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5 — Première analyse : un poèm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0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epérer la forme : vers, strophe, rime</text:span></text:p>
              </text:list-item>
              <text:list-item>
                <text:p text:style-name="P6"><text:span text:style-name="T2">Reconnaître une comparaison et une métaphore</text:span></text:p>
              </text:list-item>
              <text:list-item>
                <text:p text:style-name="P6"><text:span text:style-name="T2">Dégager le thème et l’atmosphère</text:span></text:p>
              </text:list-item>
              <text:list-item>
                <text:p text:style-name="P6"><text:span text:style-name="T2">Citer un vers correctement</text:span></text:p>
              </text:list-item>
              <text:list-item>
                <text:p text:style-name="P6"><text:span text:style-name="T2">Rédiger une mini-analyse (~120 mo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ours de français, lundi matin. - Léa : « Un poème entier ? Je ne comprends jamais tout. » - Tom : « Ça sonne bien, mais je ne sais pas l’expliquer. » - Mme Ferrand : « Analyser, c’est observer, repérer, puis dire l’effet — étape par étape. » → On observe d’abord, on interprète ensuit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poème que tu connais, même un seul vers ?</text:span></text:p>
              </text:list-item>
              <text:list-item>
                <text:p text:style-name="P6"><text:span text:style-name="T2">Rime / vers / strophe : quelle différence ?</text:span></text:p>
              </text:list-item>
              <text:list-item>
                <text:p text:style-name="P6"><text:span text:style-name="T2">Le mot </text:span><text:span text:style-name="T3">automne</text:span><text:span text:style-name="T2"> : quelle saison, quelles couleurs, quelle émotion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vers = une ligne</text:span></text:p>
              </text:list-item>
              <text:list-item>
                <text:p text:style-name="P6"><text:span text:style-name="T2">une strophe = un groupe de vers</text:span></text:p>
              </text:list-item>
              <text:list-item>
                <text:p text:style-name="P6"><text:span text:style-name="T2">la rime = mêmes sons en fin de vers</text:span></text:p>
              </text:list-item>
              <text:list-item>
                <text:p text:style-name="P6"><text:span text:style-name="T2">comparaison (avec </text:span><text:span text:style-name="T3">comme</text:span><text:span text:style-name="T2">) ≠ métaphore (sans </text:span><text:span text:style-name="T3">comme</text:span><text:span text:style-name="T2">)</text:span></text:p>
              </text:list-item>
              <text:list-item>
                <text:p text:style-name="P6"><text:span text:style-name="T2">le thème = ce dont on parle ; l’atmosphère = l’ambianc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écrire l’analys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écrire l’analys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n commente au présent : « le poète évoque… »</text:span></text:p>
              </text:list-item>
              <text:list-item>
                <text:p text:style-name="P6"><text:span text:style-name="T2">On cite entre guillemets « … »</text:span></text:p>
              </text:list-item>
              <text:list-item>
                <text:p text:style-name="P6"><text:span text:style-name="T2">On relie : d’abord, ensuite, ainsi, enfin</text:span></text:p>
              </text:list-item>
              <text:list-item>
                <text:p text:style-name="P6"><text:span text:style-name="T2">Verbes : évoquer, suggérer, exprimer, soulign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poèm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poèm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Chanson d’automne</text:span><text:span text:style-name="T2"> (Verlaine, 1866, extrait) « Les sanglots longs / Des violons / De l’automne / Blessent mon cœur… » - Vers très courts → lecture lente, comme un soupir - Rime : longs / violons (a-a), automne (b) - Métaphore : l’automne « pleure » - Thème : le temps qui passe ; atmosphère mélancoliqu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Verlaine (1844-1896), poète du Symbolisme</text:span></text:p>
              </text:list-item>
              <text:list-item>
                <text:p text:style-name="P6"><text:span text:style-name="T2">Recherche de la musicalité du vers</text:span></text:p>
              </text:list-item>
              <text:list-item>
                <text:p text:style-name="P6"><text:span text:style-name="T2">Juin 1944 : les premiers vers servirent de message codé à la Résistance (BBC)</text:span></text:p>
              </text:list-item>
              <text:list-item>
                <text:p text:style-name="P6"><text:span text:style-name="T2">Source : Wikipédia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Compréhension : auteur, saison, instrument, émotion</text:span></text:p>
              </text:list-item>
              <text:list-item>
                <text:p text:style-name="P6"><text:span text:style-name="T2">Ex. 2 Forme : strophes, longueur des vers, une rime</text:span></text:p>
              </text:list-item>
              <text:list-item>
                <text:p text:style-name="P6"><text:span text:style-name="T2">Ex. 3 Image : comparaison ou métaphore ?</text:span></text:p>
              </text:list-item>
              <text:list-item>
                <text:p text:style-name="P6"><text:span text:style-name="T2">Ex. 4 Écriture : mini-analyse de la 2ᵉ strophe Différenciation : G (Ex. 1-2) · M (Ex. 1-3) · E (les 4 + atmosphèr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ini-analyse (~120 mots), 4 étapes : 1. Forme (strophes, vers, une rime) 2. Une image citée 3. Thème et atmosphère 4. Conclusion personnelle Barème : 3 + 3 + 2 + 2 = 1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nomme vers, strophe, rime</text:span></text:p>
              </text:list-item>
              <text:list-item>
                <text:p text:style-name="P6"><text:span text:style-name="T2">☐ </text:span><text:span text:style-name="T2">Je distingue comparaison et métaphore</text:span></text:p>
              </text:list-item>
              <text:list-item>
                <text:p text:style-name="P6"><text:span text:style-name="T2">☐ </text:span><text:span text:style-name="T2">Je cite un vers entre guillemets</text:span></text:p>
              </text:list-item>
              <text:list-item>
                <text:p text:style-name="P6"><text:span text:style-name="T2">☐ </text:span><text:span text:style-name="T2">Je dégage thème et atmosphère</text:span></text:p>
              </text:list-item>
              <text:list-item>
                <text:p text:style-name="P6"><text:span text:style-name="T2">☐ </text:span><text:span text:style-name="T2">J’écris une mini-analyse structuré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Leseverstehen (10 P.) : 5 questions</text:span></text:p>
              </text:list-item>
              <text:list-item>
                <text:p text:style-name="P6"><text:span text:style-name="T2">Tâche 2 — Outils (8 P.) : métaphore, rime, strophes, thème</text:span></text:p>
              </text:list-item>
              <text:list-item>
                <text:p text:style-name="P6"><text:span text:style-name="T2">Tâche 3 — Schreiben (12 P.) : mini-analyse ~120 mots Total : 3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Chanson d’automne » — Wikipédia, CC BY-SA</text:span></text:p>
              </text:list-item>
              <text:list-item>
                <text:p text:style-name="P6"><text:span text:style-name="T2">« Paul Verlaine » — Wikipédia, CC BY-SA</text:span></text:p>
              </text:list-item>
              <text:list-item>
                <text:p text:style-name="P6"><text:span text:style-name="T2">« Poèmes saturniens » — Wikipédia, CC BY-SA</text:span></text:p>
              </text:list-item>
              <text:list-item>
                <text:p text:style-name="P6"><text:span text:style-name="T2">Verlaine, </text:span><text:span text:style-name="T3">Poèmes saturniens</text:span><text:span text:style-name="T2"> (1866) — domaine publi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8:37</meta:creation-date>
    <dc:date>2026-07-21T16:28:37</dc:date>
    <meta:document-statistic meta:object-count="185"/>
    <meta:generator>LibreOffice/24.2.7.2$Linux_X86_64 LibreOffice_project/420$Build-2</meta:generator>
  </office:meta>
</office:document-meta>
</file>