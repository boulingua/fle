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Raconter une histoire vrai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aconter une histoire vrai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5 · Parcours G+M · Classe 10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stinguer </text:span><text:span text:style-name="T3">passé composé</text:span><text:span text:style-name="T2"> (action) et </text:span><text:span text:style-name="T3">imparfait</text:span><text:span text:style-name="T2"> (décor, habitude)</text:span></text:p>
              </text:list-item>
              <text:list-item>
                <text:p text:style-name="P6"><text:span text:style-name="T2">Structurer un récit : </text:span><text:span text:style-name="T3">introduction – développement – conclusion</text:span></text:p>
              </text:list-item>
              <text:list-item>
                <text:p text:style-name="P6"><text:span text:style-name="T2">Raconter une histoire vraie à l’</text:span><text:span text:style-name="T3">écrit</text:span><text:span text:style-name="T2"> (~200 mots)</text:span></text:p>
              </text:list-item>
              <text:list-item>
                <text:p text:style-name="P6"><text:span text:style-name="T2">Raconter à l’</text:span><text:span text:style-name="T3">oral en continu</text:span><text:span text:style-name="T2"> (~2 min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me Lefèvre : « Racontez une </text:span><text:span text:style-name="T3">histoire vraie</text:span><text:span text:style-name="T2"> — un moment que vous avez vraiment vécu. »</text:span></text:p>
            <text:p text:style-name="P3"><text:span text:style-name="T2">Yanis : « Le jour où on a retrouvé mon chat perdu ! »</text:span></text:p>
            <text:p text:style-name="P3"><text:span text:style-name="T4">« C’</text:span><text:span text:style-name="T5">était</text:span><text:span text:style-name="T4"> un dimanche, il </text:span><text:span text:style-name="T5">pleuvait</text:span><text:span text:style-name="T4">… puis, tout à coup, on l’</text:span><text:span text:style-name="T5">a entendu</text:span><text:span text:style-name="T4"> miauler. »</text:span></text:p>
            <text:p text:style-name="P3"><text:span text:style-name="T2">→ </text:span><text:span text:style-name="T2">Deux temps du passé : lesquels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le histoire vraie vous a le plus marqué·e ?</text:span></text:p>
              </text:list-item>
              <text:list-item>
                <text:p text:style-name="P6"><text:span text:style-name="T2">Qui l’a vécue ? Qui vous l’a racontée ?</text:span></text:p>
              </text:list-item>
              <text:list-item>
                <text:p text:style-name="P6"><text:span text:style-name="T2">Pourquoi est-elle importante ?</text:span></text:p>
              </text:list-item>
              <text:list-item>
                <text:p text:style-name="P6"><text:span text:style-name="T4">Präteritum / Perfekt</text:span><text:span text:style-name="T2"> → imparfait / passé composé : quelle différenc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histoire vraie · un souvenir · un événement</text:span></text:p>
              </text:list-item>
              <text:list-item>
                <text:p text:style-name="P6"><text:span text:style-name="T2">le décor / le cadre</text:span></text:p>
              </text:list-item>
              <text:list-item>
                <text:p text:style-name="P6"><text:span text:style-name="T2">d’abord · ensuite / puis · tout à coup · enfin</text:span></text:p>
              </text:list-item>
              <text:list-item>
                <text:p text:style-name="P6"><text:span text:style-name="T2">se passer / arriver · se souvenir de · raconter</text:span></text:p>
              </text:list-item>
              <text:list-item>
                <text:p text:style-name="P6"><text:span text:style-name="T2">émouvant·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deux temp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deux temp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Imparfait</text:span><text:span text:style-name="T2"> = décor, description, habitude </text:span><text:span text:style-name="T4">Il pleuvait. J’avais peur. Nous habitions à Lille.</text:span></text:p>
            <text:p text:style-name="P3"><text:span text:style-name="T3">Passé composé</text:span><text:span text:style-name="T2"> = action ponctuelle, événement </text:span><text:span text:style-name="T4">J’ai vu un éclair. Le train est parti.</text:span></text:p>
            <text:p text:style-name="P3"><text:span text:style-name="T2">Astuce : </text:span><text:span text:style-name="T4">il y avait / c’était</text:span><text:span text:style-name="T2"> → imparfait · </text:span><text:span text:style-name="T4">il y a eu / ç’a été</text:span><text:span text:style-name="T2"> → passé compos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Structure du réci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Structure du réci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3">Introduction</text:span><text:span text:style-name="T2"> : qui, quand, où → imparfait (décor)</text:span></text:p>
              </text:list-item>
              <text:list-item>
                <text:p text:style-name="P6"><text:span text:style-name="T3">Développement</text:span><text:span text:style-name="T2"> : l’événement → passé composé (actions)</text:span></text:p>
              </text:list-item>
              <text:list-item>
                <text:p text:style-name="P6"><text:span text:style-name="T3">Conclusion</text:span><text:span text:style-name="T2"> : conséquence, sentiment, leç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 récit vrai de sa vie = un </text:span><text:span text:style-name="T3">récit de vie</text:span><text:span text:style-name="T2">, proche de l’</text:span><text:span text:style-name="T3">autobiographie</text:span><text:span text:style-name="T2">.</text:span></text:p>
            <text:p text:style-name="P3"><text:span text:style-name="T2">Le narrateur et le personnage sont une même personne, avec un </text:span><text:span text:style-name="T3">engagement de sincérité</text:span><text:span text:style-name="T2">.</text:span></text:p>
            <text:p text:style-name="P3"><text:span text:style-name="T2">La mémoire reconstruit : un récit vrai reste un </text:span><text:span text:style-name="T3">point de vue</text:span><text:span text:style-name="T2">.</text:span></text:p>
            <text:p text:style-name="P3"><text:span text:style-name="T4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Ex. 1</text:span><text:span text:style-name="T2"> Compréhension du texte modèle</text:span></text:p>
              </text:list-item>
              <text:list-item>
                <text:p text:style-name="P6"><text:span text:style-name="T3">Ex. 2</text:span><text:span text:style-name="T2"> Passé composé ou imparfait ?</text:span></text:p>
              </text:list-item>
              <text:list-item>
                <text:p text:style-name="P6"><text:span text:style-name="T3">Ex. 3</text:span><text:span text:style-name="T2"> Décor ou action ?</text:span></text:p>
              </text:list-item>
              <text:list-item>
                <text:p text:style-name="P6"><text:span text:style-name="T3">Ex. 4</text:span><text:span text:style-name="T2"> Connecteurs : </text:span><text:span text:style-name="T4">d’abord, ensuite, tout à coup, enfin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Écrit (~200 mots)</text:span><text:span text:style-name="T2"> — 3 paragraphes 5 verbes au passé composé · 5 à l’imparfait · 3 connecteurs</text:span></text:p>
            <text:p text:style-name="P3"><text:span text:style-name="T3">Oral (~2 min)</text:span><text:span text:style-name="T2"> — en continu, sans tout lire</text:span></text:p>
            <text:p text:style-name="P3"><text:span text:style-name="T2">Critères : structure · temps · connecteurs · vocabulaire · (oral : fluidité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distingue PC / imparfait</text:span></text:p>
              </text:list-item>
              <text:list-item>
                <text:p text:style-name="P6"><text:span text:style-name="T2">☐ </text:span><text:span text:style-name="T2">Décor à l’imparfait, action au passé composé</text:span></text:p>
              </text:list-item>
              <text:list-item>
                <text:p text:style-name="P6"><text:span text:style-name="T2">☐ </text:span><text:span text:style-name="T2">Récit en 3 parties</text:span></text:p>
              </text:list-item>
              <text:list-item>
                <text:p text:style-name="P6"><text:span text:style-name="T2">☐ </text:span><text:span text:style-name="T2">Connecteurs variés</text:span></text:p>
              </text:list-item>
              <text:list-item>
                <text:p text:style-name="P6"><text:span text:style-name="T2">☐ </text:span><text:span text:style-name="T2">Je raconte à l’oral en contin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4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4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1 Compréhension écrite — 8 P.</text:span></text:p>
              </text:list-item>
              <text:list-item>
                <text:p text:style-name="P6"><text:span text:style-name="T2">T2 Conjugaison — 10 P.</text:span></text:p>
              </text:list-item>
              <text:list-item>
                <text:p text:style-name="P6"><text:span text:style-name="T2">T3 Expression écrite (~200 mots) — 12 P.</text:span></text:p>
              </text:list-item>
              <text:list-item>
                <text:p text:style-name="P6"><text:span text:style-name="T2">T4 Expression orale en continu — 1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6:31</meta:creation-date>
    <dc:date>2026-07-21T15:46:31</dc:date>
    <meta:document-statistic meta:object-count="181"/>
    <meta:generator>LibreOffice/24.2.7.2$Linux_X86_64 LibreOffice_project/420$Build-2</meta:generator>
  </office:meta>
</office:document-meta>
</file>