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5 — Médiation : résumer un texte allemand en françai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5 — Médiation : résumer un texte allemand en françai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· Classe 8 · Niveau E 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mprendre l’essentiel d’un court texte allemand</text:span></text:p>
              </text:list-item>
              <text:list-item>
                <text:p text:style-name="P6"><text:span text:style-name="T2">Le résumer en français (~80 mots)</text:span></text:p>
              </text:list-item>
              <text:list-item>
                <text:p text:style-name="P6"><text:span text:style-name="T2">Distinguer traduire et médier</text:span></text:p>
              </text:list-item>
              <text:list-item>
                <text:p text:style-name="P6"><text:span text:style-name="T2">Employer les tournures de médiation</text:span></text:p>
              </text:list-item>
              <text:list-item>
                <text:p text:style-name="P6"><text:span text:style-name="T2">Adapter mon résumé au destinatair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Karim (à Lyon, sans allemand) reçoit une annonce allemande sur un festival. Anouk ne traduit pas : elle </text:span><text:span text:style-name="T3">résume</text:span><text:span text:style-name="T2"> l’essentiel en français.</text:span></text:p>
            <text:p text:style-name="P3"><text:span text:style-name="T2">« Tu ne m’as pas tout traduit, mais j’ai compris l’important ! »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raduire ou résumer : quelle différence ?</text:span></text:p>
              </text:list-item>
              <text:list-item>
                <text:p text:style-name="P6"><text:span text:style-name="T2">Vous arrive-t-il de raconter à un proche un message dans une autre langue ?</text:span></text:p>
              </text:list-item>
              <text:list-item>
                <text:p text:style-name="P6"><text:span text:style-name="T2">Faut-il tout garder quand on résume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les outil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les outil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il s’agit de… · l’article explique que… · on apprend que… l’auteur présente / mentionne… · avoir lieu · se produire · en résumé</text:span></text:p>
            <text:p text:style-name="P3"><text:span text:style-name="T2">Point de langue : </text:span><text:span text:style-name="T3">il s’agit de</text:span><text:span text:style-name="T2"> est invariable (toujours </text:span><text:span text:style-name="T4">il</text:span><text:span text:style-name="T2">)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méthode en 4 étap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méthode en 4 étap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4">
              <text:list-item>
                <text:p text:style-name="P6"><text:span text:style-name="T2">Lire deux fois le texte allemand</text:span></text:p>
              </text:list-item>
              <text:list-item>
                <text:p text:style-name="P6"><text:span text:style-name="T2">Repérer : sujet, lieu, date, faits, chiffres</text:span></text:p>
              </text:list-item>
              <text:list-item>
                <text:p text:style-name="P6"><text:span text:style-name="T2">Reformuler avec ses propres mots</text:span></text:p>
              </text:list-item>
              <text:list-item>
                <text:p text:style-name="P6"><text:span text:style-name="T2">Vérifier : ~80 mots, rien d’inventé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le modèle d’Anouk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le modèle d’Anouk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Dans cette annonce, il s’agit du Zeltmusikfestival à Fribourg. On apprend qu’il se déroule du 12 au 21 juillet au Mundenhof. L’article explique que plus de 50 artistes se produisent sous de grandes tentes.</text:span></text:p>
            <text:p text:style-name="P3"><text:span text:style-name="T2">Noms propres gardés · Freiburg → Fribourg (exonyme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note culture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note culturel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Le CECRL (Conseil de l’Europe) décrit la </text:span><text:span text:style-name="T3">médiation</text:span><text:span text:style-name="T2"> : reformuler un contenu pour le rendre accessible à quelqu’un. Le volume de 2018 a renforcé sa place. </text:span><text:span text:style-name="T4">(D’après Wikipédia, CC BY-SA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: comprendre le modèle</text:span></text:p>
              </text:list-item>
              <text:list-item>
                <text:p text:style-name="P6"><text:span text:style-name="T2">Ex. 2 : compléter avec les tournures</text:span></text:p>
              </text:list-item>
              <text:list-item>
                <text:p text:style-name="P6"><text:span text:style-name="T2">Ex. 3 : reformuler (pas mot à mot)</text:span></text:p>
              </text:list-item>
              <text:list-item>
                <text:p text:style-name="P6"><text:span text:style-name="T2">Ex. 4 : mini-médiation (marché de quartier)</text:span></text:p>
              </text:list-item>
            </text:list>
            <text:p text:style-name="P3"><text:span text:style-name="T2">Différenciation : G résumé à trous · M standard · E + commentaire personnel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Résumé français (~80 mots) de l’annonce du </text:span><text:span text:style-name="T3">Stadtfest</text:span><text:span text:style-name="T2"> de Fribourg. Sujet + lieu + dates + 2 faits + conclusion · 3 tournures · pas de traduction littérale</text:span></text:p>
            <text:p text:style-name="P3"><text:span text:style-name="T2">Critères : fidélité /4 · médiation /3 · langue /2 · destinataire /1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☐ </text:span><text:span text:style-name="T2">Je distingue résumer et traduire</text:span></text:p>
              </text:list-item>
              <text:list-item>
                <text:p text:style-name="P6"><text:span text:style-name="T2">☐ </text:span><text:span text:style-name="T2">Je repère sujet, lieu, date, faits</text:span></text:p>
              </text:list-item>
              <text:list-item>
                <text:p text:style-name="P6"><text:span text:style-name="T2">☐ </text:span><text:span text:style-name="T2">J’emploie 3 tournures de médiation</text:span></text:p>
              </text:list-item>
              <text:list-item>
                <text:p text:style-name="P6"><text:span text:style-name="T2">☐ </text:span><text:span text:style-name="T2">Je rédige ~80 mots corrects</text:span></text:p>
              </text:list-item>
              <text:list-item>
                <text:p text:style-name="P6"><text:span text:style-name="T2">☐ </text:span><text:span text:style-name="T2">Je n’invente rie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 (30 points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 (30 points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— Compréhension (8)</text:span></text:p>
              </text:list-item>
              <text:list-item>
                <text:p text:style-name="P6"><text:span text:style-name="T2">Tâche 2 — Tournures de médiation (8)</text:span></text:p>
              </text:list-item>
              <text:list-item>
                <text:p text:style-name="P6"><text:span text:style-name="T2">Tâche 3 — Médiation : résumé FR ~80 mots (14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ECRL — Wikipédia (fr), CC BY-SA</text:span></text:p>
              </text:list-item>
              <text:list-item>
                <text:p text:style-name="P6"><text:span text:style-name="T2">Zeltmusikfestival — Wikipedia (de), CC BY-SA</text:span></text:p>
              </text:list-item>
              <text:list-item>
                <text:p text:style-name="P6"><text:span text:style-name="T2">KMK — Bildungsstandards fortgeführte Fremdsprach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11:11</meta:creation-date>
    <dc:date>2026-07-21T16:11:11</dc:date>
    <meta:document-statistic meta:object-count="185"/>
    <meta:generator>LibreOffice/24.2.7.2$Linux_X86_64 LibreOffice_project/420$Build-2</meta:generator>
  </office:meta>
</office:document-meta>
</file>