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édiation linguistique DE → résumé F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diation linguistique DE → résumé F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5 · Parcours G+M · classe 8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 texte allemand court</text:span></text:p>
              </text:list-item>
              <text:list-item>
                <text:p text:style-name="P6"><text:span text:style-name="T2">Restituer les informations principales en français</text:span></text:p>
              </text:list-item>
              <text:list-item>
                <text:p text:style-name="P6"><text:span text:style-name="T2">Rédiger un résumé de 5 à 6 phrases fidèle au sens</text:span></text:p>
              </text:list-item>
              <text:list-item>
                <text:p text:style-name="P6"><text:span text:style-name="T2">Distinguer médiation et tra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(Montréal) ne lit pas l’allemand. Léa lui explique le message de Hanna « en gros ».</text:span></text:p>
            <text:list text:style-name="L3">
              <text:list-item>
                <text:p text:style-name="P3"><text:span text:style-name="T2">A-t-elle traduit ou résumé ?</text:span></text:p>
              </text:list-item>
              <text:list-item>
                <text:p text:style-name="P3"><text:span text:style-name="T2">Qu’a-t-elle gardé ? Qu’a-t-elle laissé de côté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diation ≠ traduc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diation ≠ traduc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Traduire :</text:span><text:span text:style-name="T2"> rendre chaque mot.</text:span></text:p>
            <text:p text:style-name="P3"><text:span text:style-name="T3">Médiatiser :</text:span><text:span text:style-name="T2"> transmettre le sens, l’essentiel.</text:span></text:p>
            <text:p text:style-name="P3"><text:span text:style-name="T2">Un pont, pas un mur de mot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W-Frage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W-Frage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Qui ? · Quoi ? · Où ? · Quand ? · Combien ? · Pourquoi ?</text:span></text:p>
            <text:p text:style-name="P3"><text:span text:style-name="T2">Repérer l’essentiel avant de résum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de la méd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de la méd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l s’agit de… (es geht um…)</text:span></text:p>
              </text:list-item>
              <text:list-item>
                <text:p text:style-name="P6"><text:span text:style-name="T2">d’après le texte… (laut Text…)</text:span></text:p>
              </text:list-item>
              <text:list-item>
                <text:p text:style-name="P6"><text:span text:style-name="T2">l’auteur·rice explique que…</text:span></text:p>
              </text:list-item>
              <text:list-item>
                <text:p text:style-name="P6"><text:span text:style-name="T2">la majorité des… (die Mehrheit der…)</text:span></text:p>
              </text:list-item>
              <text:list-item>
                <text:p text:style-name="P6"><text:span text:style-name="T2">l’école envisage de… (die Schule plant…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 réflex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ois réflex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Garder les noms propres (Karlsruhe, Lille)</text:span></text:p>
              </text:list-item>
              <text:list-item>
                <text:p text:style-name="P6"><text:span text:style-name="T2">Ne pas traduire mot à mot : </text:span><text:span text:style-name="T4">Schüleraustausch</text:span><text:span text:style-name="T2"> → échange scolaire</text:span></text:p>
              </text:list-item>
              <text:list-item>
                <text:p text:style-name="P6"><text:span text:style-name="T2">Réduire : 4 à 6 idées principa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OFAJ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OFAJ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Office franco-allemand pour la jeunesse, créé en 1963 (traité de l’Élysée).</text:span></text:p>
            <text:p text:style-name="P3"><text:span text:style-name="T2">Mission : rapprocher les jeunes des deux pays.</text:span></text:p>
            <text:p text:style-name="P3"><text:span text:style-name="T2">Plusieurs millions de rencontres depuis 1963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Repérer les W-Fragen</text:span></text:p>
              </text:list-item>
              <text:list-item>
                <text:p text:style-name="P6"><text:span text:style-name="T2">Reformuler sans mot à mot</text:span></text:p>
              </text:list-item>
              <text:list-item>
                <text:p text:style-name="P6"><text:span text:style-name="T2">Compléter avec une expression de médiation</text:span></text:p>
              </text:list-item>
              <text:list-item>
                <text:p text:style-name="P6"><text:span text:style-name="T2">Trier l’essentiel des détail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sumez le texte pour Inès : 5 à 6 phrases, en français.</text:span></text:p>
            <text:p text:style-name="P3"><text:span text:style-name="T2">Au moins </text:span><text:span text:style-name="T3">trois</text:span><text:span text:style-name="T2"> expressions de médiation. Pas de mot à mo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traduire et résumer</text:span></text:p>
              </text:list-item>
              <text:list-item>
                <text:p text:style-name="P6"><text:span text:style-name="T2">Je repère l’essentiel (W-Fragen)</text:span></text:p>
              </text:list-item>
              <text:list-item>
                <text:p text:style-name="P6"><text:span text:style-name="T2">Je résume fidèlement au sens</text:span></text:p>
              </text:list-item>
              <text:list-item>
                <text:p text:style-name="P6"><text:span text:style-name="T2">J’emploie trois expressions de méd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médiation linguistique (30 points)</text:span></text:p>
            <text:list text:style-name="L3">
              <text:list-item>
                <text:p text:style-name="P3"><text:span text:style-name="T2">Contenu : 12</text:span></text:p>
              </text:list-item>
              <text:list-item>
                <text:p text:style-name="P3"><text:span text:style-name="T2">Langue : 10</text:span></text:p>
              </text:list-item>
              <text:list-item>
                <text:p text:style-name="P3"><text:span text:style-name="T2">Sens fidèle : 8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48</meta:creation-date>
    <dc:date>2026-07-21T15:33:48</dc:date>
    <meta:document-statistic meta:object-count="181"/>
    <meta:generator>LibreOffice/24.2.7.2$Linux_X86_64 LibreOffice_project/420$Build-2</meta:generator>
  </office:meta>
</office:document-meta>
</file>