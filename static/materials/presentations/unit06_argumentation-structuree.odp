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Argumentation structur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Argumentation structur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1 · Niveau E</text:span></text:p>
            <text:p text:style-name="P3"><text:span text:style-name="T2">Thèse · Arguments · Connecteurs · Pl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ormuler une thèse claire et la défendre</text:span></text:p>
              </text:list-item>
              <text:list-item>
                <text:p text:style-name="P6"><text:span text:style-name="T2">Construire un plan en trois temps</text:span></text:p>
              </text:list-item>
              <text:list-item>
                <text:p text:style-name="P6"><text:span text:style-name="T2">Relier ses idées par des connecteurs</text:span></text:p>
              </text:list-item>
              <text:list-item>
                <text:p text:style-name="P6"><text:span text:style-name="T2">Rédiger un texte argumenté (~400 mots)</text:span></text:p>
              </text:list-item>
              <text:list-item>
                <text:p text:style-name="P6"><text:span text:style-name="T2">Présenter oralement (4 minut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« Faut-il interdire les téléphones au lycée ? »</text:span></text:p>
            <text:list text:style-name="L3">
              <text:list-item>
                <text:p text:style-name="P3"><text:span text:style-name="T2">Anouk : « Le téléphone nuit à la concentration. »</text:span></text:p>
              </text:list-item>
              <text:list-item>
                <text:p text:style-name="P3"><text:span text:style-name="T2">Malik : « Où sont tes arguments et ton exemple ? »</text:span></text:p>
              </text:list-item>
              <text:list-item>
                <text:p text:style-name="P3"><text:span text:style-name="T2">Anouk : « Certes il peut aider, toutefois la tablette suffit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rgumenter, est-ce donner son avis ?</text:span></text:p>
              </text:list-item>
              <text:list-item>
                <text:p text:style-name="P6"><text:span text:style-name="T2">Thèse / argument / exemple : quelles différences ?</text:span></text:p>
              </text:list-item>
              <text:list-item>
                <text:p text:style-name="P6"><text:span text:style-name="T2">Quels mots relient deux idées opposées ?</text:span></text:p>
              </text:list-item>
              <text:list-item>
                <text:p text:style-name="P6"><text:span text:style-name="T2">Quel sujet aimeriez-vous défend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hèse</text:span><text:span text:style-name="T2"> : l’idée défendue</text:span></text:p>
              </text:list-item>
              <text:list-item>
                <text:p text:style-name="P6"><text:span text:style-name="T4">argument</text:span><text:span text:style-name="T2"> : une raison qui l’appuie</text:span></text:p>
              </text:list-item>
              <text:list-item>
                <text:p text:style-name="P6"><text:span text:style-name="T4">exemple</text:span><text:span text:style-name="T2"> : un fait concret</text:span></text:p>
              </text:list-item>
              <text:list-item>
                <text:p text:style-name="P6"><text:span text:style-name="T4">objection</text:span><text:span text:style-name="T2"> : une idée contraire</text:span></text:p>
              </text:list-item>
              <text:list-item>
                <text:p text:style-name="P6"><text:span text:style-name="T4">concession</text:span><text:span text:style-name="T2"> : reconnaître en partie</text:span></text:p>
              </text:list-item>
              <text:list-item>
                <text:p text:style-name="P6"><text:span text:style-name="T4">synthèse</text:span><text:span text:style-name="T2"> : dépasser les deux posit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jouter :</text:span><text:span text:style-name="T2"> de plus · en outre · par ailleurs</text:span></text:p>
              </text:list-item>
              <text:list-item>
                <text:p text:style-name="P6"><text:span text:style-name="T4">Illustrer :</text:span><text:span text:style-name="T2"> par exemple · ainsi · notamment</text:span></text:p>
              </text:list-item>
              <text:list-item>
                <text:p text:style-name="P6"><text:span text:style-name="T4">Opposer :</text:span><text:span text:style-name="T2"> cependant · toutefois · en revanche</text:span></text:p>
              </text:list-item>
              <text:list-item>
                <text:p text:style-name="P6"><text:span text:style-name="T4">Concéder :</text:span><text:span text:style-name="T2"> certes … mais · bien que + subj.</text:span></text:p>
              </text:list-item>
              <text:list-item>
                <text:p text:style-name="P6"><text:span text:style-name="T4">Conclure :</text:span><text:span text:style-name="T2"> donc · par conséquent · final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plan dialect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plan dialect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4">Thèse</text:span><text:span text:style-name="T2"> — 2 arguments + 2 exemples</text:span></text:p>
              </text:list-item>
              <text:list-item>
                <text:p text:style-name="P6"><text:span text:style-name="T4">Antithèse</text:span><text:span text:style-name="T2"> — les objections, honnêtement</text:span></text:p>
              </text:list-item>
              <text:list-item>
                <text:p text:style-name="P6"><text:span text:style-name="T4">Synthèse</text:span><text:span text:style-name="T2"> — dépasser l’opposition, nuancer</text:span></text:p>
              </text:list-item>
            </text:list>
            <text:p text:style-name="P3"><text:span text:style-name="T3">La synthèse n’est pas un compromis mou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</text:span><text:span text:style-name="T4">dissertation</text:span><text:span text:style-name="T2"> est centrale à l’école française</text:span></text:p>
              </text:list-item>
              <text:list-item>
                <text:p text:style-name="P6"><text:span text:style-name="T2">Plan dialectique hérité de la pensée philosophique</text:span></text:p>
              </text:list-item>
              <text:list-item>
                <text:p text:style-name="P6"><text:span text:style-name="T2">On valorise la </text:span><text:span text:style-name="T4">rigueur du plan</text:span><text:span text:style-name="T2"> autant que les idées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plan</text:span></text:p>
              </text:list-item>
              <text:list-item>
                <text:p text:style-name="P6"><text:span text:style-name="T2">Ex. 2 — Choisir le bon connecteur</text:span></text:p>
              </text:list-item>
              <text:list-item>
                <text:p text:style-name="P6"><text:span text:style-name="T2">Ex. 3 — Thèse / argument / exemple</text:span></text:p>
              </text:list-item>
              <text:list-item>
                <text:p text:style-name="P6"><text:span text:style-name="T2">Ex. 4 — Construire un mini-plan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exte argumenté (~400 mots), plan dialectique</text:span></text:p>
            <text:list text:style-name="L3">
              <text:list-item>
                <text:p text:style-name="P3"><text:span text:style-name="T2">Sujets : écrans · sport noté · voyages scolaires</text:span></text:p>
              </text:list-item>
              <text:list-item>
                <text:p text:style-name="P3"><text:span text:style-name="T2">6 connecteurs minimum · conclusion nuancée</text:span></text:p>
              </text:list-item>
              <text:list-item>
                <text:p text:style-name="P3"><text:span text:style-name="T2">Variante orale : 4 minu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Thèse claire</text:span></text:p>
              </text:list-item>
              <text:list-item>
                <text:p text:style-name="P6"><text:span text:style-name="T2">☐ </text:span><text:span text:style-name="T2">Argument ≠ exemple</text:span></text:p>
              </text:list-item>
              <text:list-item>
                <text:p text:style-name="P6"><text:span text:style-name="T2">☐ </text:span><text:span text:style-name="T2">Plan en trois temps</text:span></text:p>
              </text:list-item>
              <text:list-item>
                <text:p text:style-name="P6"><text:span text:style-name="T2">☐ </text:span><text:span text:style-name="T2">Six connecteurs variés</text:span></text:p>
              </text:list-item>
              <text:list-item>
                <text:p text:style-name="P6"><text:span text:style-name="T2">☐ </text:span><text:span text:style-name="T2">Synthèse nuanc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(8 pts)</text:span></text:p>
              </text:list-item>
              <text:list-item>
                <text:p text:style-name="P6"><text:span text:style-name="T2">Tâche 2 — Connecteurs (7 pts)</text:span></text:p>
              </text:list-item>
              <text:list-item>
                <text:p text:style-name="P6"><text:span text:style-name="T2">Tâche 3 — Expression écrite (15 pts)</text:span></text:p>
              </text:list-item>
            </text:list>
            <text:p text:style-name="P3"><text:span text:style-name="T4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Dissertation » — CC BY-SA</text:span></text:p>
              </text:list-item>
              <text:list-item>
                <text:p text:style-name="P6"><text:span text:style-name="T2">Wikipédia, « Connecteur logique » — CC BY-SA</text:span></text:p>
              </text:list-item>
              <text:list-item>
                <text:p text:style-name="P6"><text:span text:style-name="T2">Déclaration de 1789, art. 11 — domaine public</text:span></text:p>
              </text:list-item>
              <text:list-item>
                <text:p text:style-name="P6"><text:span text:style-name="T2">Beaumarchais, </text:span><text:span text:style-name="T3">Le Mariage de Figaro</text:span><text:span text:style-name="T2"> (1784) — domaine pub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37</meta:creation-date>
    <dc:date>2026-07-21T16:29:37</dc:date>
    <meta:document-statistic meta:object-count="185"/>
    <meta:generator>LibreOffice/24.2.7.2$Linux_X86_64 LibreOffice_project/420$Build-2</meta:generator>
  </office:meta>
</office:document-meta>
</file>