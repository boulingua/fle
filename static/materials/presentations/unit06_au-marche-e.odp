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Au march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Au march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6 · Niveau E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dialogue simple au marché</text:span></text:p>
              </text:list-item>
              <text:list-item>
                <text:p text:style-name="P6"><text:span text:style-name="T2">Nommer une dizaine de fruits et légumes</text:span></text:p>
              </text:list-item>
              <text:list-item>
                <text:p text:style-name="P6"><text:span text:style-name="T2">Utiliser les articles partitifs (du, de la, de l’, des)</text:span></text:p>
              </text:list-item>
              <text:list-item>
                <text:p text:style-name="P6"><text:span text:style-name="T2">Employer </text:span><text:span text:style-name="T3">de</text:span><text:span text:style-name="T2"> après une quantité</text:span></text:p>
              </text:list-item>
              <text:list-item>
                <text:p text:style-name="P6"><text:span text:style-name="T2">Jouer un dialogue d’achat poli (8 répliqu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amedi matin, place du marché. Léa et son oncle Marc. - La marchande : « Qu’est-ce qu’il vous faut ? » - Léa : « Une barquette de fraises et un kilo de tomates. » - « Et avec ceci ? » — « C’est tout, merci. Ça fait combien ?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Y a-t-il un marché près de chez toi ? Quel jour ?</text:span></text:p>
              </text:list-item>
              <text:list-item>
                <text:p text:style-name="P6"><text:span text:style-name="T2">Quels fruits et légumes aimes-tu ?</text:span></text:p>
              </text:list-item>
              <text:list-item>
                <text:p text:style-name="P6"><text:span text:style-name="T2">Comment demander poliment un produit ?</text:span></text:p>
              </text:list-item>
              <text:list-item>
                <text:p text:style-name="P6"><text:span text:style-name="T2">Trie : pomme, carotte, fraise, salade, banane, tomat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pomme · la fraise · l’orange · le melon · la tomate</text:span></text:p>
              </text:list-item>
              <text:list-item>
                <text:p text:style-name="P6"><text:span text:style-name="T2">la carotte · la courgette · la salade · la pomme de terre · l’oignon</text:span></text:p>
              </text:list-item>
              <text:list-item>
                <text:p text:style-name="P6"><text:span text:style-name="T2">un kilo de… · une barquette de… · une botte de…</text:span></text:p>
              </text:list-item>
              <text:list-item>
                <text:p text:style-name="P6"><text:span text:style-name="T2">Ça fait combien ? · Et avec ceci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’article partitif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’article partitif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du</text:span><text:span text:style-name="T2"> + masculin : du raisin</text:span></text:p>
              </text:list-item>
              <text:list-item>
                <text:p text:style-name="P6"><text:span text:style-name="T4">de la</text:span><text:span text:style-name="T2"> + féminin : de la salade</text:span></text:p>
              </text:list-item>
              <text:list-item>
                <text:p text:style-name="P6"><text:span text:style-name="T4">de l’</text:span><text:span text:style-name="T2"> + voyelle : de l’ail</text:span></text:p>
              </text:list-item>
              <text:list-item>
                <text:p text:style-name="P6"><text:span text:style-name="T4">des</text:span><text:span text:style-name="T2"> + pluriel : des fraises</text:span></text:p>
              </text:list-item>
              <text:list-item>
                <text:p text:style-name="P6"><text:span text:style-name="T2">Après une quantité → </text:span><text:span text:style-name="T4">de / d’</text:span><text:span text:style-name="T2"> : un kilo </text:span><text:span text:style-name="T4">de</text:span><text:span text:style-name="T2"> pomm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anier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anier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achète </text:span><text:span text:style-name="T4">des</text:span><text:span text:style-name="T2"> fruits : </text:span><text:span text:style-name="T4">du</text:span><text:span text:style-name="T2"> raisin, </text:span><text:span text:style-name="T4">des</text:span><text:span text:style-name="T2"> pommes, </text:span><text:span text:style-name="T4">de la</text:span><text:span text:style-name="T2"> rhubarbe pour le gâteau de sa grand-mère. Elle prend aussi </text:span><text:span text:style-name="T4">un kilo de</text:span><text:span text:style-name="T2"> carottes et </text:span><text:span text:style-name="T4">une botte de</text:span><text:span text:style-name="T2"> radis. « Le marché, c’est le meilleur moment du week-end !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s marché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s marché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arché de plein air : tradition ancienne, jours fixes</text:span></text:p>
              </text:list-item>
              <text:list-item>
                <text:p text:style-name="P6"><text:span text:style-name="T2">Surtout des produits alimentaires locaux</text:span></text:p>
              </text:list-item>
              <text:list-item>
                <text:p text:style-name="P6"><text:span text:style-name="T2">Rungis (sud de Paris) : l’un des plus grands marchés de gros au monde</text:span></text:p>
              </text:list-item>
              <text:list-item>
                <text:p text:style-name="P6"><text:span text:style-name="T3">(D’après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orale (4 questions)</text:span></text:p>
              </text:list-item>
              <text:list-item>
                <text:p text:style-name="P6"><text:span text:style-name="T2">Ex. 2 : article partitif (du / de la / de l’ / des)</text:span></text:p>
              </text:list-item>
              <text:list-item>
                <text:p text:style-name="P6"><text:span text:style-name="T2">Ex. 3 : quantités (de / d’)</text:span></text:p>
              </text:list-item>
              <text:list-item>
                <text:p text:style-name="P6"><text:span text:style-name="T2">Ex. 4 : calcul et prix en toutes lettres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jeu de rô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jeu de rô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binôme, ≥ 8 répliques : - salutation et accueil - 3 produits + quantités - au moins un article partitif - prix total + monnaie - politesse pour conclu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mprends un dialogue au marché</text:span></text:p>
              </text:list-item>
              <text:list-item>
                <text:p text:style-name="P6"><text:span text:style-name="T2">☐ </text:span><text:span text:style-name="T2">Je nomme 10 fruits et légumes</text:span></text:p>
              </text:list-item>
              <text:list-item>
                <text:p text:style-name="P6"><text:span text:style-name="T2">☐ </text:span><text:span text:style-name="T2">Je choisis le bon partitif</text:span></text:p>
              </text:list-item>
              <text:list-item>
                <text:p text:style-name="P6"><text:span text:style-name="T2">☐ </text:span><text:span text:style-name="T2">J’emploie </text:span><text:span text:style-name="T3">de</text:span><text:span text:style-name="T2"> après une quantité</text:span></text:p>
              </text:list-item>
              <text:list-item>
                <text:p text:style-name="P6"><text:span text:style-name="T2">☐ </text:span><text:span text:style-name="T2">Je joue un dialogue de 8 répliqu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orale : 10 P.</text:span></text:p>
              </text:list-item>
              <text:list-item>
                <text:p text:style-name="P6"><text:span text:style-name="T2">Tâche 2 — Partitifs et quantités : 8 P.</text:span></text:p>
              </text:list-item>
              <text:list-item>
                <text:p text:style-name="P6"><text:span text:style-name="T2">Tâche 3 — Dialogue d’achat (8 répliques) :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« Marché » — CC BY-SA 4.0</text:span></text:p>
              </text:list-item>
              <text:list-item>
                <text:p text:style-name="P6"><text:span text:style-name="T2">Wikipédia « Rungis » — CC BY-SA 4.0</text:span></text:p>
              </text:list-item>
              <text:list-item>
                <text:p text:style-name="P6"><text:span text:style-name="T2">Wikiversité « Les articles en français » — CC BY-SA 4.0</text:span></text:p>
              </text:list-item>
              <text:list-item>
                <text:p text:style-name="P6"><text:span text:style-name="T2">Plateforme indépendante, sans affili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11</meta:creation-date>
    <dc:date>2026-07-21T15:47:11</dc:date>
    <meta:document-statistic meta:object-count="185"/>
    <meta:generator>LibreOffice/24.2.7.2$Linux_X86_64 LibreOffice_project/420$Build-2</meta:generator>
  </office:meta>
</office:document-meta>
</file>