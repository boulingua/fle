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6 — Au marché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6 — Au marché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6 · Niveau M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dialogue simple au marché</text:span></text:p>
              </text:list-item>
              <text:list-item>
                <text:p text:style-name="P6"><text:span text:style-name="T2">Demander un produit : </text:span><text:span text:style-name="T3">Je voudrais…</text:span></text:p>
              </text:list-item>
              <text:list-item>
                <text:p text:style-name="P6"><text:span text:style-name="T2">Demander et dire un prix</text:span></text:p>
              </text:list-item>
              <text:list-item>
                <text:p text:style-name="P6"><text:span text:style-name="T2">Nommer 8 fruits et légumes</text:span></text:p>
              </text:list-item>
              <text:list-item>
                <text:p text:style-name="P6"><text:span text:style-name="T2">Utiliser les articles partitifs de bas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Samedi matin, place du marché. Léa et son père font les courses.</text:span></text:p>
            <text:p text:style-name="P3"><text:span text:style-name="T2">— </text:span><text:span text:style-name="T2">Bonjour monsieur ! Je voudrais des pommes, s’il vous plaît. — Combien en voulez-vous ? — Un kilo, et de la salade aussi. — Et avec ça ? — C’est tout. Ça fait combien ? — Ça fait 4 euros 50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llez-vous parfois au marché ? Avec qui ?</text:span></text:p>
              </text:list-item>
              <text:list-item>
                <text:p text:style-name="P6"><text:span text:style-name="T2">Citez 3 fruits et 3 légumes.</text:span></text:p>
              </text:list-item>
              <text:list-item>
                <text:p text:style-name="P6"><text:span text:style-name="T3">Was kostet das?</text:span><text:span text:style-name="T2"> → ?</text:span></text:p>
              </text:list-item>
              <text:list-item>
                <text:p text:style-name="P6"><text:span text:style-name="T2">Qu’achète-t-on sur un marché français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Fruits :</text:span><text:span text:style-name="T2"> la pomme, la banane, la fraise, l’orange, le raisin, la poire</text:span></text:p>
              </text:list-item>
              <text:list-item>
                <text:p text:style-name="P6"><text:span text:style-name="T4">Légumes :</text:span><text:span text:style-name="T2"> la tomate, la carotte, la pomme de terre, la salade, le poivron, le concombre</text:span></text:p>
              </text:list-item>
              <text:list-item>
                <text:p text:style-name="P6"><text:span text:style-name="T4">Au marché :</text:span><text:span text:style-name="T2"> le marchand, l’étal, un kilo, une livre, une barquette, l’euro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es articles parti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es articles parti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du</text:span><text:span text:style-name="T2"> + masculin : </text:span><text:span text:style-name="T3">du pain</text:span></text:p>
              </text:list-item>
              <text:list-item>
                <text:p text:style-name="P6"><text:span text:style-name="T4">de la</text:span><text:span text:style-name="T2"> + féminin : </text:span><text:span text:style-name="T3">de la salade</text:span></text:p>
              </text:list-item>
              <text:list-item>
                <text:p text:style-name="P6"><text:span text:style-name="T4">de l’</text:span><text:span text:style-name="T2"> + voyelle : </text:span><text:span text:style-name="T3">de l’eau</text:span></text:p>
              </text:list-item>
              <text:list-item>
                <text:p text:style-name="P6"><text:span text:style-name="T4">des</text:span><text:span text:style-name="T2"> + pluriel : </text:span><text:span text:style-name="T3">des pommes</text:span></text:p>
              </text:list-item>
            </text:list>
            <text:p text:style-name="P3"><text:span text:style-name="T2">Après une quantité → </text:span><text:span text:style-name="T4">de / d’</text:span><text:span text:style-name="T2"> : </text:span><text:span text:style-name="T3">un kilo </text:span><text:span text:style-name="T5">de</text:span><text:span text:style-name="T3"> pomm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hrases-clé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hrases-clé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Je voudrais…, s’il vous plaît.</text:span></text:p>
              </text:list-item>
              <text:list-item>
                <text:p text:style-name="P6"><text:span text:style-name="T3">Combien ça coûte ? · Ça fait combien ?</text:span></text:p>
              </text:list-item>
              <text:list-item>
                <text:p text:style-name="P6"><text:span text:style-name="T3">Un kilo de…, s’il vous plaît.</text:span></text:p>
              </text:list-item>
              <text:list-item>
                <text:p text:style-name="P6"><text:span text:style-name="T3">Et avec ça ? · C’est tout, merci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es marchés en Franc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es marchés en Franc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adition depuis la fin du Moyen Âge</text:span></text:p>
              </text:list-item>
              <text:list-item>
                <text:p text:style-name="P6"><text:span text:style-name="T2">Marchés de plein air (</text:span><text:span text:style-name="T3">forains</text:span><text:span text:style-name="T2">) et marchés couverts (</text:span><text:span text:style-name="T4">halles</text:span><text:span text:style-name="T2">)</text:span></text:p>
              </text:list-item>
              <text:list-item>
                <text:p text:style-name="P6"><text:span text:style-name="T2">Yvetot : marché du mercredi depuis 1498</text:span></text:p>
              </text:list-item>
              <text:list-item>
                <text:p text:style-name="P6"><text:span text:style-name="T2">Une pétition veut les inscrire au patrimoine immatériel</text:span></text:p>
              </text:list-item>
              <text:list-item>
                <text:p text:style-name="P6"><text:span text:style-name="T2">(Source : Wikipédia, CC BY-SA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Compréhension : réponds aux questions</text:span></text:p>
              </text:list-item>
              <text:list-item>
                <text:p text:style-name="P6"><text:span text:style-name="T2">Fruit ou légume ? Classe les mots</text:span></text:p>
              </text:list-item>
              <text:list-item>
                <text:p text:style-name="P6"><text:span text:style-name="T2">Articles partitifs : du / de la / de l’ / des</text:span></text:p>
              </text:list-item>
              <text:list-item>
                <text:p text:style-name="P6"><text:span text:style-name="T2">Complète le mini-dialogue au march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 — « À l’étal »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 — « À l’étal »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En binôme (~2 min) :</text:span></text:p>
            <text:list text:style-name="L3">
              <text:list-item>
                <text:p text:style-name="P3"><text:span text:style-name="T2">A = client·e, B = marchand·e</text:span></text:p>
              </text:list-item>
              <text:list-item>
                <text:p text:style-name="P3"><text:span text:style-name="T2">A demande 3 produits avec une quantité</text:span></text:p>
              </text:list-item>
              <text:list-item>
                <text:p text:style-name="P3"><text:span text:style-name="T2">A demande le prix ; B répond</text:span></text:p>
              </text:list-item>
              <text:list-item>
                <text:p text:style-name="P3"><text:span text:style-name="T2">Puis on échange les rôl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connais 8 fruits et légumes</text:span></text:p>
              </text:list-item>
              <text:list-item>
                <text:p text:style-name="P6"><text:span text:style-name="T2">J’utilise </text:span><text:span text:style-name="T3">je voudrais / combien / s’il vous plaît</text:span></text:p>
              </text:list-item>
              <text:list-item>
                <text:p text:style-name="P6"><text:span text:style-name="T2">Je choisis le bon article partitif</text:span></text:p>
              </text:list-item>
              <text:list-item>
                <text:p text:style-name="P6"><text:span text:style-name="T2">Je peux jouer un achat au march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orale (10 P.)</text:span></text:p>
              </text:list-item>
              <text:list-item>
                <text:p text:style-name="P6"><text:span text:style-name="T2">Tâche 2 — Vocabulaire, 8 mots (10 P.)</text:span></text:p>
              </text:list-item>
              <text:list-item>
                <text:p text:style-name="P6"><text:span text:style-name="T2">Tâche 3 — Expression orale, achat simulé (10 P.)</text:span></text:p>
              </text:list-item>
              <text:list-item>
                <text:p text:style-name="P6"><text:span text:style-name="T4">Total : 30 poin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07:55</meta:creation-date>
    <dc:date>2026-07-21T15:07:55</dc:date>
    <meta:document-statistic meta:object-count="181"/>
    <meta:generator>LibreOffice/24.2.7.2$Linux_X86_64 LibreOffice_project/420$Build-2</meta:generator>
  </office:meta>
</office:document-meta>
</file>