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Étude de roman comple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Étude de roman comple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2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pérer les éléments d’un roman (incipit, intrigue, cadre)</text:span></text:p>
              </text:list-item>
              <text:list-item>
                <text:p text:style-name="P6"><text:span text:style-name="T2">Identifier le point de vue (focalisation zéro / interne / externe)</text:span></text:p>
              </text:list-item>
              <text:list-item>
                <text:p text:style-name="P6"><text:span text:style-name="T2">Reconstituer le schéma narratif</text:span></text:p>
              </text:list-item>
              <text:list-item>
                <text:p text:style-name="P6"><text:span text:style-name="T2">Rédiger une analyse structurée (~350–400 mots)</text:span></text:p>
              </text:list-item>
              <text:list-item>
                <text:p text:style-name="P6"><text:span text:style-name="T2">Discuter un roman contemporain par référ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: « On commence par quoi ? » Sofiane : « Par une méthode : qui raconte, d’où l’on voit, comment l’histoire avance. »</text:span></text:p>
            <text:p text:style-name="P3"><text:span text:style-name="T2">Trois questions : narrateur · point de vue · structu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genres de roman ?</text:span></text:p>
              </text:list-item>
              <text:list-item>
                <text:p text:style-name="P6"><text:span text:style-name="T2">Auteur ou narrateur : qui parle ?</text:span></text:p>
              </text:list-item>
              <text:list-item>
                <text:p text:style-name="P6"><text:span text:style-name="T2">Qu’est-ce que l’incipit ?</text:span></text:p>
              </text:list-item>
              <text:list-item>
                <text:p text:style-name="P6"><text:span text:style-name="T2">Ordre : situation initiale → élément perturbateur → péripéties → dénou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incipit · narrateur · focalisation</text:span></text:p>
              </text:list-item>
              <text:list-item>
                <text:p text:style-name="P6"><text:span text:style-name="T2">schéma narratif · élément perturbateur</text:span></text:p>
              </text:list-item>
              <text:list-item>
                <text:p text:style-name="P6"><text:span text:style-name="T2">intrigue · protagoniste · dénouement</text:span></text:p>
              </text:list-item>
              <text:list-item>
                <text:p text:style-name="P6"><text:span text:style-name="T2">champ lexical · tonal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s temps du réci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s temps du réci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ssé simple = premier plan (il sortit, elle répondit)</text:span></text:p>
              </text:list-item>
              <text:list-item>
                <text:p text:style-name="P6"><text:span text:style-name="T2">Imparfait = arrière-plan (la rue était déserte)</text:span></text:p>
              </text:list-item>
              <text:list-item>
                <text:p text:style-name="P6"><text:span text:style-name="T2">Présent = temps de l’analyse (le narrateur adopte…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x textes d’appui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eux textes d’appui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aupassant, Bel-Ami (1885, domaine public) : « … Georges Duroy sortit du restaurant. »</text:span></text:p>
            <text:p text:style-name="P3"><text:span text:style-name="T2">Exemple original « Camille » : imparfait (attente) + passé simple final (« on frappa ») = élément perturbateu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focalisation (Genett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focalisation (Genett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Zéro : narrateur omniscient</text:span></text:p>
              </text:list-item>
              <text:list-item>
                <text:p text:style-name="P6"><text:span text:style-name="T2">Interne : le regard d’un seul personnage</text:span></text:p>
              </text:list-item>
              <text:list-item>
                <text:p text:style-name="P6"><text:span text:style-name="T2">Externe : seulement le visible, comme une caméra</text:span></text:p>
              </text:list-item>
            </text:list>
            <text:p text:style-name="P3"><text:span text:style-name="T2">Indice : verbes de perception et de pensé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écrite (texte original)</text:span></text:p>
              </text:list-item>
              <text:list-item>
                <text:p text:style-name="P6"><text:span text:style-name="T2">Vocabulaire à compléter</text:span></text:p>
              </text:list-item>
              <text:list-item>
                <text:p text:style-name="P6"><text:span text:style-name="T2">Schéma narratif à ordonner</text:span></text:p>
              </text:list-item>
              <text:list-item>
                <text:p text:style-name="P6"><text:span text:style-name="T2">Passé simple / imparfait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alyse littéraire (~350–400 mots) : introduction + thèse · point de vue et temps · mise en place de l’intrigue · conclusion.</text:span></text:p>
            <text:p text:style-name="P3"><text:span text:style-name="T2">Roman contemporain : par référence, sans cit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uteur ≠ narrateur</text:span></text:p>
              </text:list-item>
              <text:list-item>
                <text:p text:style-name="P6"><text:span text:style-name="T2">Trois focalisations justifiées</text:span></text:p>
              </text:list-item>
              <text:list-item>
                <text:p text:style-name="P6"><text:span text:style-name="T2">Schéma narratif complet</text:span></text:p>
              </text:list-item>
              <text:list-item>
                <text:p text:style-name="P6"><text:span text:style-name="T2">Temps du récit maîtris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 — Compréhension écrite (12 pts) : focalisation, temps, atmosphère</text:span></text:p>
              </text:list-item>
              <text:list-item>
                <text:p text:style-name="P6"><text:span text:style-name="T2">B — Expression écrite (18 pts) : analyse ~300 mots + référ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« Focalisation » (CC BY-SA)</text:span></text:p>
              </text:list-item>
              <text:list-item>
                <text:p text:style-name="P6"><text:span text:style-name="T2">Wikipédia « Schéma narratif » (CC BY-SA)</text:span></text:p>
              </text:list-item>
              <text:list-item>
                <text:p text:style-name="P6"><text:span text:style-name="T2">Maupassant, Bel-Ami (Wikisource, domaine public)</text:span></text:p>
              </text:list-item>
              <text:list-item>
                <text:p text:style-name="P6"><text:span text:style-name="T2">Textes « Camille » : originau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14</meta:creation-date>
    <dc:date>2026-07-21T16:30:14</dc:date>
    <meta:document-statistic meta:object-count="185"/>
    <meta:generator>LibreOffice/24.2.7.2$Linux_X86_64 LibreOffice_project/420$Build-2</meta:generator>
  </office:meta>
</office:document-meta>
</file>