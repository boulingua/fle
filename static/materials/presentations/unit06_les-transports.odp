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Les transpor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Les transpor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 Se déplacer : demander le chemin, acheter un bill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Nommer 8 moyens de transport</text:span></text:p>
              </text:list-item>
              <text:list-item>
                <text:p text:style-name="P6"><text:span text:style-name="T2">Comprendre une annonce de gare</text:span></text:p>
              </text:list-item>
              <text:list-item>
                <text:p text:style-name="P6"><text:span text:style-name="T2">Demander et indiquer un chemin</text:span></text:p>
              </text:list-item>
              <text:list-item>
                <text:p text:style-name="P6"><text:span text:style-name="T2">Acheter un billet au guichet</text:span></text:p>
              </text:list-item>
              <text:list-item>
                <text:p text:style-name="P6"><text:span text:style-name="T2">Employer </text:span><text:span text:style-name="T3">en / à</text:span><text:span text:style-name="T2"> + transpor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Gare de Strasbourg, 9 h. — Pardon, où est la voie 4 ? — Tout droit, puis à gauche. — Le TGV pour Paris part à 9 h 22 ? — Oui, dépêchez-vous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venez-vous à l’école ?</text:span></text:p>
              </text:list-item>
              <text:list-item>
                <text:p text:style-name="P6"><text:span text:style-name="T2">Avez-vous déjà pris le train ?</text:span></text:p>
              </text:list-item>
              <text:list-item>
                <text:p text:style-name="P6"><text:span text:style-name="T2">Bus, tram, métro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train / le TGV · la voiture · le bus</text:span></text:p>
              </text:list-item>
              <text:list-item>
                <text:p text:style-name="P6"><text:span text:style-name="T2">le tram · le métro · le vélo · l’avion · à pied</text:span></text:p>
              </text:list-item>
              <text:list-item>
                <text:p text:style-name="P6"><text:span text:style-name="T2">la gare · la voie / le quai</text:span></text:p>
              </text:list-item>
              <text:list-item>
                <text:p text:style-name="P6"><text:span text:style-name="T2">le billet (aller-retour)</text:span></text:p>
              </text:list-item>
              <text:list-item>
                <text:p text:style-name="P6"><text:span text:style-name="T2">tout droit · à gauche · à droi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« en » ou « à »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« en » ou « à »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n</text:span><text:span text:style-name="T2"> + véhicule fermé : en train, en voiture, en avion</text:span></text:p>
              </text:list-item>
              <text:list-item>
                <text:p text:style-name="P6"><text:span text:style-name="T4">à</text:span><text:span text:style-name="T2"> + moyen ouvert : à vélo, à pied</text:span></text:p>
              </text:list-item>
              <text:list-item>
                <text:p text:style-name="P6"><text:span text:style-name="T2">Indiquer le chemin : </text:span><text:span text:style-name="T3">tout droit, puis à gauche / à droi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logue au guiche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alogue au guiche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— </text:span><text:span text:style-name="T2">Je voudrais un billet pour Paris. — Aller simple ou aller-retour ? — Aller-retour. — Voilà, 45 euros. TGV de 9 h 22, voie 4. — Bon voyage 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TGV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TGV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in à Grande Vitesse, exploité par la SNCF</text:span></text:p>
              </text:list-item>
              <text:list-item>
                <text:p text:style-name="P6"><text:span text:style-name="T2">Première ligne Paris–Lyon en 1981</text:span></text:p>
              </text:list-item>
              <text:list-item>
                <text:p text:style-name="P6"><text:span text:style-name="T2">Le tramway revient dans les villes dès les années 1980 (Nantes, 1985)</text:span></text:p>
              </text:list-item>
              <text:list-item>
                <text:p text:style-name="P6"><text:span text:style-name="T3">(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annonce de gare (vrai/faux)</text:span></text:p>
              </text:list-item>
              <text:list-item>
                <text:p text:style-name="P6"><text:span text:style-name="T2">Ex. 2 : relier français / allemand</text:span></text:p>
              </text:list-item>
              <text:list-item>
                <text:p text:style-name="P6"><text:span text:style-name="T2">Ex. 3 : </text:span><text:span text:style-name="T3">en</text:span><text:span text:style-name="T2"> ou </text:span><text:span text:style-name="T3">à</text:span><text:span text:style-name="T2"> ?</text:span></text:p>
              </text:list-item>
              <text:list-item>
                <text:p text:style-name="P6"><text:span text:style-name="T2">Ex. 4 : remettre le dialogue dans l’ordre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Jeu de rôle au guichet (à deux, ~8 répliques) Acheter un billet + demander le chemin Employer </text:span><text:span text:style-name="T3">en / à</text:span><text:span text:style-name="T2"> deux fois Critères : tâche · vocabulaire · </text:span><text:span text:style-name="T3">en/à</text:span><text:span text:style-name="T2"> · fluidité (/10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8 moyens de transport</text:span></text:p>
              </text:list-item>
              <text:list-item>
                <text:p text:style-name="P6"><text:span text:style-name="T2">☐ </text:span><text:span text:style-name="T3">en</text:span><text:span text:style-name="T2"> / </text:span><text:span text:style-name="T3">à</text:span></text:p>
              </text:list-item>
              <text:list-item>
                <text:p text:style-name="P6"><text:span text:style-name="T2">☐ </text:span><text:span text:style-name="T2">annonce de gare</text:span></text:p>
              </text:list-item>
              <text:list-item>
                <text:p text:style-name="P6"><text:span text:style-name="T2">☐ </text:span><text:span text:style-name="T2">demander / indiquer le chemin</text:span></text:p>
              </text:list-item>
              <text:list-item>
                <text:p text:style-name="P6"><text:span text:style-name="T2">☐ </text:span><text:span text:style-name="T2">acheter un bille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orale (10 P.)</text:span></text:p>
              </text:list-item>
              <text:list-item>
                <text:p text:style-name="P6"><text:span text:style-name="T2">Tâche 2 : vocabulaire (12 P.)</text:span></text:p>
              </text:list-item>
              <text:list-item>
                <text:p text:style-name="P6"><text:span text:style-name="T2">Tâche 3 : mini-production écrite (8 P.)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GV — Wikipédia, CC BY-SA 4.0</text:span></text:p>
              </text:list-item>
              <text:list-item>
                <text:p text:style-name="P6"><text:span text:style-name="T2">Tramway en France — Wikipédia, CC BY-SA 4.0</text:span></text:p>
              </text:list-item>
              <text:list-item>
                <text:p text:style-name="P6"><text:span text:style-name="T2">Plateforme indépendante, sans affiliation à la SNCF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4:07</meta:creation-date>
    <dc:date>2026-07-21T15:44:07</dc:date>
    <meta:document-statistic meta:object-count="185"/>
    <meta:generator>LibreOffice/24.2.7.2$Linux_X86_64 LibreOffice_project/420$Build-2</meta:generator>
  </office:meta>
</office:document-meta>
</file>