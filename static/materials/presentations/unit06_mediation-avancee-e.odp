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Médiation avancée DE↔F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Médiation avancée DE↔F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0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édier un texte argumentatif DE → FR (~200 mots)</text:span></text:p>
              </text:list-item>
              <text:list-item>
                <text:p text:style-name="P6"><text:span text:style-name="T2">Inverser le sens : FR → DE, en bref</text:span></text:p>
              </text:list-item>
              <text:list-item>
                <text:p text:style-name="P6"><text:span text:style-name="T2">Mobiliser six stratégies de médiation</text:span></text:p>
              </text:list-item>
              <text:list-item>
                <text:p text:style-name="P6"><text:span text:style-name="T2">Choisir des verbes introducteurs précis</text:span></text:p>
              </text:list-item>
              <text:list-item>
                <text:p text:style-name="P6"><text:span text:style-name="T2">Évaluer et corriger ma méd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, en stage à l’Institut français, doit résumer en français un éditorial allemand sur les transports — puis faire l’inverse pour des collègues de Munich.</text:span></text:p>
            <text:p text:style-name="P3"><text:span text:style-name="T3">On y réfléchit :</text:span><text:span text:style-name="T2"> traduire, résumer, médier — quelle différence ? Pour qui écrit-on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expliqué un texte d’une autre langue ?</text:span></text:p>
              </text:list-item>
              <text:list-item>
                <text:p text:style-name="P6"><text:span text:style-name="T2">Que garder, que laisser de côté ?</text:span></text:p>
              </text:list-item>
              <text:list-item>
                <text:p text:style-name="P6"><text:span text:style-name="T2">Faut-il donner son avis quand on médie ?</text:span></text:p>
              </text:list-item>
              <text:list-item>
                <text:p text:style-name="P6"><text:span text:style-name="T2">Trois verbes pour introduire l’opinion d’un auteu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outenir / affirmer — behaupten</text:span></text:p>
              </text:list-item>
              <text:list-item>
                <text:p text:style-name="P6"><text:span text:style-name="T2">plaider pour — plädieren für</text:span></text:p>
              </text:list-item>
              <text:list-item>
                <text:p text:style-name="P6"><text:span text:style-name="T2">mettre en garde contre — warnen vor</text:span></text:p>
              </text:list-item>
              <text:list-item>
                <text:p text:style-name="P6"><text:span text:style-name="T2">nuancer — differenzieren</text:span></text:p>
              </text:list-item>
              <text:list-item>
                <text:p text:style-name="P6"><text:span text:style-name="T2">constater — feststellen</text:span></text:p>
              </text:list-item>
              <text:list-item>
                <text:p text:style-name="P6"><text:span text:style-name="T2">réclamer / exiger — forder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laider pour</text:span><text:span text:style-name="T2"> + nom (jamais </text:span><text:span text:style-name="T4">plaider que…</text:span><text:span text:style-name="T2">)</text:span></text:p>
              </text:list-item>
              <text:list-item>
                <text:p text:style-name="P6"><text:span text:style-name="T3">mettre en garde contre</text:span><text:span text:style-name="T2"> + nom</text:span></text:p>
              </text:list-item>
              <text:list-item>
                <text:p text:style-name="P6"><text:span text:style-name="T2">Discours rapporté au passé : concordance des temp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l a affirmé que la situation s’aggrava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x stratégi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x stratégi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Repérer la thèse</text:span></text:p>
              </text:list-item>
              <text:list-item>
                <text:p text:style-name="P6"><text:span text:style-name="T2">Compresser (ratio ~1/3)</text:span></text:p>
              </text:list-item>
              <text:list-item>
                <text:p text:style-name="P6"><text:span text:style-name="T2">Préserver les nuances</text:span></text:p>
              </text:list-item>
              <text:list-item>
                <text:p text:style-name="P6"><text:span text:style-name="T2">Adapter le registre</text:span></text:p>
              </text:list-item>
              <text:list-item>
                <text:p text:style-name="P6"><text:span text:style-name="T2">Citer brièvement</text:span></text:p>
              </text:list-item>
              <text:list-item>
                <text:p text:style-name="P6"><text:span text:style-name="T2">Nommer l’énonciateu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de travail (DE → FR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de travail (DE → FR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DE :</text:span><text:span text:style-name="T2"> </text:span><text:span text:style-name="T4">Unsere Innenstädte ersticken im Verkehr…</text:span></text:p>
            <text:p text:style-name="P3"><text:span text:style-name="T3">FR (~75 mots) :</text:span><text:span text:style-name="T2"> L’auteur constate la saturation des centres-villes, plaide pour les transports en commun, le vélo et la marche, soutient que ces villes sont plus agréables, et met en garde contre l’attentism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</text:span><text:span text:style-name="T3">CECRL</text:span><text:span text:style-name="T2"> (Conseil de l’Europe, 2001 ; volume complémentaire 2018) place la médiation aux côtés de la réception, production et interaction.</text:span></text:p>
              </text:list-item>
              <text:list-item>
                <text:p text:style-name="P6"><text:span text:style-name="T2">L’</text:span><text:span text:style-name="T3">OFAJ</text:span><text:span text:style-name="T2">, créé par le traité de l’Élysée (1963), a rapproché des millions de jeunes des deux pays.</text:span></text:p>
              </text:list-item>
            </text:list>
            <text:p text:style-name="P3"><text:span text:style-name="T4">(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</text:span></text:p>
              </text:list-item>
              <text:list-item>
                <text:p text:style-name="P6"><text:span text:style-name="T2">Ex. 2 — Verbes introducteurs (a–d)</text:span></text:p>
              </text:list-item>
              <text:list-item>
                <text:p text:style-name="P6"><text:span text:style-name="T2">Ex. 3 — Compression au ratio 1/3</text:span></text:p>
              </text:list-item>
              <text:list-item>
                <text:p text:style-name="P6"><text:span text:style-name="T2">Ex. 4 — Médiation inversée FR → DE</text:span></text:p>
              </text:list-item>
            </text:list>
            <text:p text:style-name="P3"><text:span text:style-name="T3">Différenciation :</text:span><text:span text:style-name="T2"> G (1–2) · M (1–3) · E (1–4 + justification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édier un éditorial allemand (~250 mots) en français (~200 mots) :</text:span></text:p>
            <text:list text:style-name="L3">
              <text:list-item>
                <text:p text:style-name="P3"><text:span text:style-name="T2">six stratégies</text:span></text:p>
              </text:list-item>
              <text:list-item>
                <text:p text:style-name="P3"><text:span text:style-name="T2">≥ </text:span><text:span text:style-name="T2">1 citation directe</text:span></text:p>
              </text:list-item>
              <text:list-item>
                <text:p text:style-name="P3"><text:span text:style-name="T2">≥ </text:span><text:span text:style-name="T2">4 verbes introducteurs</text:span></text:p>
              </text:list-item>
              <text:list-item>
                <text:p text:style-name="P3"><text:span text:style-name="T2">une phrase de synthèse fina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repère la thèse</text:span></text:p>
              </text:list-item>
              <text:list-item>
                <text:p text:style-name="P6"><text:span text:style-name="T2">J’emploie six stratégies</text:span></text:p>
              </text:list-item>
              <text:list-item>
                <text:p text:style-name="P6"><text:span text:style-name="T2">Je varie les verbes introducteurs</text:span></text:p>
              </text:list-item>
              <text:list-item>
                <text:p text:style-name="P6"><text:span text:style-name="T2">Je conserve citation et nuances</text:span></text:p>
              </text:list-item>
              <text:list-item>
                <text:p text:style-name="P6"><text:span text:style-name="T2">Je médie aussi FR → 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(8 pts)</text:span></text:p>
              </text:list-item>
              <text:list-item>
                <text:p text:style-name="P6"><text:span text:style-name="T2">Tâche 2 — Verbes (8 pts)</text:span></text:p>
              </text:list-item>
              <text:list-item>
                <text:p text:style-name="P6"><text:span text:style-name="T2">Tâche 3 — Sprachmittlung, ~200 mots (14 pts)</text:span></text:p>
              </text:list-item>
            </text:list>
            <text:p text:style-name="P3"><text:span text:style-name="T3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</text:span></text:p>
              </text:list-item>
              <text:list-item>
                <text:p text:style-name="P6"><text:span text:style-name="T2">Office franco-allemand pour la jeunesse — Wikipédia, CC BY-SA</text:span></text:p>
              </text:list-item>
              <text:list-item>
                <text:p text:style-name="P6"><text:span text:style-name="T2">Traité de l’Élysée —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40</meta:creation-date>
    <dc:date>2026-07-21T16:28:40</dc:date>
    <meta:document-statistic meta:object-count="189"/>
    <meta:generator>LibreOffice/24.2.7.2$Linux_X86_64 LibreOffice_project/420$Build-2</meta:generator>
  </office:meta>
</office:document-meta>
</file>