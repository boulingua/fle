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1.43cm" style:use-optimal-column-width="false"/>
    </style:style>
    <style:style style:name="ro1" style:family="table-row">
      <style:table-row-properties style:row-height="0cm" style:use-optimal-row-height="true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italic" style:text-underline-style="none" fo:font-weight="normal" fo:background-color="transparent" style:font-size-asian="13.5pt" style:font-style-asian="italic" style:font-weight-asian="normal" style:font-size-complex="13.5pt" style:font-style-complex="italic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6 — Médiation avancée DE↔F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6 — Médiation avancée DE↔F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G+M · Classe 10 · Niveau M Transmettre le contenu d’un texte allemand plus long — en français.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ransmettre en français l’essentiel d’un texte allemand plus long</text:span></text:p>
              </text:list-item>
              <text:list-item>
                <text:p text:style-name="P6"><text:span text:style-name="T2">Sélectionner et hiérarchiser les informations</text:span></text:p>
              </text:list-item>
              <text:list-item>
                <text:p text:style-name="P6"><text:span text:style-name="T2">Reformuler avec ses propres mots (pas de mot-à-mot)</text:span></text:p>
              </text:list-item>
              <text:list-item>
                <text:p text:style-name="P6"><text:span text:style-name="T2">Adapter le registre au destinataire</text:span></text:p>
              </text:list-item>
              <text:list-item>
                <text:p text:style-name="P6"><text:span text:style-name="T2">Citer sa source (</text:span><text:span text:style-name="T3">selon le texte…</text:span><text:span text:style-name="T2">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Au foyer du lycée franco-allemand :</text:span></text:p>
            <text:list text:style-name="L3">
              <text:list-item>
                <text:p text:style-name="P3"><text:span text:style-name="T4">Chloé :</text:span><text:span text:style-name="T2"> Ça parle de quoi, ton article ? Je vois « Repair-Café » partout…</text:span></text:p>
              </text:list-item>
              <text:list-item>
                <text:p text:style-name="P3"><text:span text:style-name="T4">Naïm :</text:span><text:span text:style-name="T2"> Je te résume l’essentiel : des ateliers gratuits où on répare au lieu de jeter.</text:span></text:p>
              </text:list-item>
              <text:list-item>
                <text:p text:style-name="P3"><text:span text:style-name="T4">Chloé :</text:span><text:span text:style-name="T2"> Tu ne traduis pas tout ?</text:span></text:p>
              </text:list-item>
              <text:list-item>
                <text:p text:style-name="P3"><text:span text:style-name="T4">Naïm :</text:span><text:span text:style-name="T2"> Non — je te donne ce qui compte pour toi. C’est ça, la médiation !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raduire (mot à mot) ≠ médier (transmettre le sens)</text:span></text:p>
              </text:list-item>
              <text:list-item>
                <text:p text:style-name="P6"><text:span text:style-name="T2">Faut-il tout rendre en français ? De quoi cela dépend-il ?</text:span></text:p>
              </text:list-item>
              <text:list-item>
                <text:p text:style-name="P6"><text:span text:style-name="T2">Quels mots pour introduire une source ? </text:span><text:span text:style-name="T3">selon…, d’après…, il s’agit de…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5" draw:style-name="gr2" draw:layer="layout" svg:width="22.859cm" svg:height="5.009cm" svg:x="1.27cm" svg:y="3.316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7"><text:span text:style-name="T5">Allemand</text:span></text:p>
              </table:table-cell>
              <table:table-cell>
                <text:p text:style-name="P7"><text:span text:style-name="T5">Français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6">In dem Text geht es um…</text:span></text:p>
              </table:table-cell>
              <table:table-cell>
                <text:p text:style-name="P7"><text:span text:style-name="T7">Il s’agit de…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6">Laut dem Text…</text:span></text:p>
              </table:table-cell>
              <table:table-cell>
                <text:p text:style-name="P7"><text:span text:style-name="T7">Selon le texte…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6">das Ziel ist…</text:span></text:p>
              </table:table-cell>
              <table:table-cell>
                <text:p text:style-name="P7"><text:span text:style-name="T7">l’objectif est de…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6">Ressourcen schonen</text:span></text:p>
              </table:table-cell>
              <table:table-cell>
                <text:p text:style-name="P7"><text:span text:style-name="T7">préserver les ressources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6">reparieren statt wegwerfen</text:span></text:p>
              </table:table-cell>
              <table:table-cell>
                <text:p text:style-name="P7"><text:span text:style-name="T7">réparer au lieu de jet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rapporter le contenu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rapporter le contenu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6">
              <text:list-item>
                <text:p text:style-name="P6"><text:span text:style-name="T4">Introduire la source</text:span><text:span text:style-name="T2"> : </text:span><text:span text:style-name="T3">Selon le texte… / L’auteur explique que…</text:span></text:p>
              </text:list-item>
              <text:list-item>
                <text:p text:style-name="P6"><text:span text:style-name="T4">Discours indirect</text:span><text:span text:style-name="T2"> : subordonnant </text:span><text:span text:style-name="T4">« que »</text:span><text:span text:style-name="T2"> + verbe conjugué</text:span></text:p>
              </text:list-item>
              <text:list-item>
                <text:p text:style-name="P6"><text:span text:style-name="T4">Reformuler, ne pas décalquer</text:span><text:span text:style-name="T2"> : </text:span><text:span text:style-name="T3">Mit freundlichen Grüßen</text:span><text:span text:style-name="T2"> → </text:span><text:span text:style-name="T3">Cordialement</text:span></text:p>
              </text:list-item>
            </text:list>
            <text:p text:style-name="P3"><text:span text:style-name="T2">Garder tels quels : noms propres, chiffres, dates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xte source (allemand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exte source (allemand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4">Reparieren statt wegwerfen — Repair-Cafés in Deutschland</text:span></text:p>
            <text:p text:style-name="P3"><text:span text:style-name="T2">Offene Treffpunkte, kostenlose Reparatur, freiwillige Helfer. Erstes Café : </text:span><text:span text:style-name="T4">Amsterdam, 2009</text:span><text:span text:style-name="T2"> → in ganz Europa verbreitet. Ziele : weniger Müll · Ressourcen schonen · Wissen bewahren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édiation modèle (français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édiation modèle (français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Salut Chloé, voici l’essentiel : dans beaucoup de villes allemandes, des « Repair-Cafés » — des lieux gratuits où des bénévoles t’aident à réparer tes appareils. D’après le texte, le premier a ouvert à Amsterdam en 2009. Le but : moins de déchets, économiser les ressources. Bref : mieux vaut un objet réparé qu’un neuf !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la médi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la médi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Sprachmittlung</text:span><text:span text:style-name="T2"> = médiation, décrite par le </text:span><text:span text:style-name="T4">CECRL</text:span><text:span text:style-name="T2"> (Conseil de l’Europe)</text:span></text:p>
              </text:list-item>
              <text:list-item>
                <text:p text:style-name="P6"><text:span text:style-name="T2">Volume complémentaire 2018/2020 : 4e activité langagière</text:span></text:p>
              </text:list-item>
              <text:list-item>
                <text:p text:style-name="P6"><text:span text:style-name="T2">Le médiateur </text:span><text:span text:style-name="T4">rend un contenu accessible</text:span><text:span text:style-name="T2"> à qui n’y aurait pas accès</text:span></text:p>
              </text:list-item>
              <text:list-item>
                <text:p text:style-name="P6"><text:span text:style-name="T2">(Paraphrasé d’après Wikipédia, CC BY-SA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Ex. 1</text:span><text:span text:style-name="T2"> Comprendre la source (4 questions)</text:span></text:p>
              </text:list-item>
              <text:list-item>
                <text:p text:style-name="P6"><text:span text:style-name="T4">Ex. 2</text:span><text:span text:style-name="T2"> Trouver l’équivalent (relier)</text:span></text:p>
              </text:list-item>
              <text:list-item>
                <text:p text:style-name="P6"><text:span text:style-name="T4">Ex. 3</text:span><text:span text:style-name="T2"> Rapporter au discours indirect</text:span></text:p>
              </text:list-item>
              <text:list-item>
                <text:p text:style-name="P6"><text:span text:style-name="T4">Ex. 4</text:span><text:span text:style-name="T2"> Médiation guidée (~50 mots)</text:span></text:p>
              </text:list-item>
            </text:list>
            <text:p text:style-name="P3"><text:span text:style-name="T2">Différenciation : G amorces fournies · M complet · E adaptation formelle/familièr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4">Médiation écrite (~120–140 mots)</text:span></text:p>
            <text:list text:style-name="L3">
              <text:list-item>
                <text:p text:style-name="P3"><text:span text:style-name="T2">Annoncer : destinataire · registre · objectif</text:span></text:p>
              </text:list-item>
              <text:list-item>
                <text:p text:style-name="P3"><text:span text:style-name="T2">Médier : thème, fonctionnement, Amsterdam 2009, 2 objectifs, message final</text:span></text:p>
              </text:list-item>
              <text:list-item>
                <text:p text:style-name="P3"><text:span text:style-name="T2">Critères : contenu 4 · sélection 3 · reformulation 3 · registre &amp; source 3 · langue 2 (</text:span><text:span text:style-name="T4">/15</text:span><text:span text:style-name="T2">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Je transmets l’essentiel sans traduire mot à mot</text:span></text:p>
              </text:list-item>
              <text:list-item>
                <text:p text:style-name="P6"><text:span text:style-name="T2">☐ </text:span><text:span text:style-name="T2">Je sélectionne les infos utiles au destinataire</text:span></text:p>
              </text:list-item>
              <text:list-item>
                <text:p text:style-name="P6"><text:span text:style-name="T2">☐ </text:span><text:span text:style-name="T2">Je reformule avec mes mots</text:span></text:p>
              </text:list-item>
              <text:list-item>
                <text:p text:style-name="P6"><text:span text:style-name="T2">☐ </text:span><text:span text:style-name="T2">Je cite ma source</text:span></text:p>
              </text:list-item>
              <text:list-item>
                <text:p text:style-name="P6"><text:span text:style-name="T2">☐ </text:span><text:span text:style-name="T2">J’adapte le registr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(30 P.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(30 P.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Tâche 1</text:span><text:span text:style-name="T2"> Médiation DE→FR, ~120 mots (18 P.)</text:span></text:p>
              </text:list-item>
              <text:list-item>
                <text:p text:style-name="P6"><text:span text:style-name="T4">Tâche 2</text:span><text:span text:style-name="T2"> Adapter à un destinataire formel + justifier (7 P.)</text:span></text:p>
              </text:list-item>
              <text:list-item>
                <text:p text:style-name="P6"><text:span text:style-name="T4">Tâche 3</text:span><text:span text:style-name="T2"> Réflexion : traduire vs médier (5 P.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adre européen commun de référence pour les langues — Wikipédia (CC BY-SA)</text:span></text:p>
              </text:list-item>
              <text:list-item>
                <text:p text:style-name="P6"><text:span text:style-name="T2">Repair Café — Wikipédia (CC BY-SA)</text:span></text:p>
              </text:list-item>
              <text:list-item>
                <text:p text:style-name="P6"><text:span text:style-name="T2">Bildungsplan BW — Französisch, Sprachmittlung, niveau M — bildungsplaene-bw.d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46:34</meta:creation-date>
    <dc:date>2026-07-21T15:46:34</dc:date>
    <meta:document-statistic meta:object-count="189"/>
    <meta:generator>LibreOffice/24.2.7.2$Linux_X86_64 LibreOffice_project/420$Build-2</meta:generator>
  </office:meta>
</office:document-meta>
</file>