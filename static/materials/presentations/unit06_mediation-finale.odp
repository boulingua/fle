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Médiation FR↔DE (final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Médiation FR↔DE (final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3 · Niveau E Médiation linguistique (Sprachmittlung)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nsmettre l’essentiel d’un document sans traduire mot à mot</text:span></text:p>
              </text:list-item>
              <text:list-item>
                <text:p text:style-name="P6"><text:span text:style-name="T2">Adapter le registre et le destinataire</text:span></text:p>
              </text:list-item>
              <text:list-item>
                <text:p text:style-name="P6"><text:span text:style-name="T2">Repérer et éviter faux amis, calques, ruptures de registre</text:span></text:p>
              </text:list-item>
              <text:list-item>
                <text:p text:style-name="P6"><text:span text:style-name="T2">Médier dans les deux sens (DE → FR et FR → DE)</text:span></text:p>
              </text:list-item>
              <text:list-item>
                <text:p text:style-name="P6"><text:span text:style-name="T2">Relire et corriger avec une grille de critèr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Gare de Strasbourg — Frau Weber ne comprend pas l’annonce.</text:span></text:p>
            <text:p text:style-name="P3"><text:span text:style-name="T2">Léo transmet l’essentiel : quai, retard, validation du billet.</text:span></text:p>
            <text:p text:style-name="P3"><text:span text:style-name="T2">Il ne traduit pas mot à mot — il adapte à son destinatai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travaillé le sens FR → DE ?</text:span></text:p>
              </text:list-item>
              <text:list-item>
                <text:p text:style-name="P6"><text:span text:style-name="T2">Tableau vs texte suivi : quelle différence pour médier ?</text:span></text:p>
              </text:list-item>
              <text:list-item>
                <text:p text:style-name="P6"><text:span text:style-name="T2">Trois pièges classiques ? (indice : les mots qui se ressemblent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nsmettre l’essentiel · das Wesentliche wiedergeben</text:span></text:p>
              </text:list-item>
              <text:list-item>
                <text:p text:style-name="P6"><text:span text:style-name="T2">reformuler · umformulieren</text:span></text:p>
              </text:list-item>
              <text:list-item>
                <text:p text:style-name="P6"><text:span text:style-name="T2">le destinataire · der Adressat</text:span></text:p>
              </text:list-item>
              <text:list-item>
                <text:p text:style-name="P6"><text:span text:style-name="T2">adapter le registre · das Sprachregister anpassen</text:span></text:p>
              </text:list-item>
              <text:list-item>
                <text:p text:style-name="P6"><text:span text:style-name="T2">un faux ami · ein falscher Freund</text:span></text:p>
              </text:list-item>
              <text:list-item>
                <text:p text:style-name="P6"><text:span text:style-name="T2">un calque · eine Lehnübersetzun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discours indirec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discours indirec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emps : futur → conditionnel ; présent → imparfait</text:span></text:p>
              </text:list-item>
              <text:list-item>
                <text:p text:style-name="P6"><text:span text:style-name="T2">Pronoms : je → il/elle ; ton → son</text:span></text:p>
              </text:list-item>
              <text:list-item>
                <text:p text:style-name="P6"><text:span text:style-name="T2">Questions : est-ce que → si ; qu’est-ce que → ce que</text:span></text:p>
              </text:list-item>
            </text:list>
            <text:p text:style-name="P3"><text:span text:style-name="T2">Médier, c’est souvent rapport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nq faux am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inq faux am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ventuell → peut-être (pas « éventuellement »)</text:span></text:p>
              </text:list-item>
              <text:list-item>
                <text:p text:style-name="P6"><text:span text:style-name="T2">das Lokal → le bar (pas « local »)</text:span></text:p>
              </text:list-item>
              <text:list-item>
                <text:p text:style-name="P6"><text:span text:style-name="T2">die Konferenz → une réunion</text:span></text:p>
              </text:list-item>
              <text:list-item>
                <text:p text:style-name="P6"><text:span text:style-name="T2">sensibel → sensible / fragile</text:span></text:p>
              </text:list-item>
              <text:list-item>
                <text:p text:style-name="P6"><text:span text:style-name="T2">die Direktion → la direction (les cadr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à médier (D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à médier (D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lettre d’Anouk : Europatag, concours bilingue, transmettre l’essentiel.</text:span></text:p>
            <text:p text:style-name="P3"><text:span text:style-name="T2">« nicht Wort für Wort, sondern nur das Wichtigste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CECR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CECR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ception · Production · Interaction · </text:span><text:span text:style-name="T3">Médiation</text:span></text:p>
            <text:p text:style-name="P3"><text:span text:style-name="T2">Volume complémentaire (2018) : médier = rendre un contenu accessible à un destinataire, pas traduire mot à mot.</text:span></text:p>
            <text:p text:style-name="P3"><text:span text:style-name="T2">Source : Wikipédia « CECRL », CC BY-SA 4.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 d’Anouk</text:span></text:p>
              </text:list-item>
              <text:list-item>
                <text:p text:style-name="P6"><text:span text:style-name="T2">Ex. 2 : sens des cinq faux amis</text:span></text:p>
              </text:list-item>
              <text:list-item>
                <text:p text:style-name="P6"><text:span text:style-name="T2">Ex. 3 : discours indirect</text:span></text:p>
              </text:list-item>
              <text:list-item>
                <text:p text:style-name="P6"><text:span text:style-name="T2">Ex. 4 : médiation FR → DE (2–3 phrases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essage FR → DE (~180 mots) pour un ami germanophone :</text:span></text:p>
            <text:list text:style-name="L5">
              <text:list-item>
                <text:p text:style-name="P3"><text:span text:style-name="T2">Ce qu’est la médiation (CECRL)</text:span></text:p>
              </text:list-item>
              <text:list-item>
                <text:p text:style-name="P3"><text:span text:style-name="T2">Comment Anouk l’a pratiquée</text:span></text:p>
              </text:list-item>
            </text:list>
            <text:p text:style-name="P3"><text:span text:style-name="T2">Critères : fidélité · adaptation · langue · cohérenc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Médier ≠ traduire mot à mot</text:span></text:p>
              </text:list-item>
              <text:list-item>
                <text:p text:style-name="P6"><text:span text:style-name="T2">☐ </text:span><text:span text:style-name="T2">Cinq faux amis maîtrisés</text:span></text:p>
              </text:list-item>
              <text:list-item>
                <text:p text:style-name="P6"><text:span text:style-name="T2">☐ </text:span><text:span text:style-name="T2">Destinataire et registre adaptés</text:span></text:p>
              </text:list-item>
              <text:list-item>
                <text:p text:style-name="P6"><text:span text:style-name="T2">☐ </text:span><text:span text:style-name="T2">Discours indirect employé</text:span></text:p>
              </text:list-item>
              <text:list-item>
                <text:p text:style-name="P6"><text:span text:style-name="T2">☐ </text:span><text:span text:style-name="T2">FR → DE et DE → F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épreuve typ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épreuve typ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(8 pts)</text:span></text:p>
              </text:list-item>
              <text:list-item>
                <text:p text:style-name="P6"><text:span text:style-name="T2">Tâche 2 : faux amis (6 pts)</text:span></text:p>
              </text:list-item>
              <text:list-item>
                <text:p text:style-name="P6"><text:span text:style-name="T2">Tâche 3 : médiation dirigée FR → DE, ~150 mots (16 pts)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s enseignant·e (45 min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s enseignant·e (45 min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ctiver 4’ · Apporter 13’ · S’entraîner 13’ · Produire 11’ · Réfléchir 2’ · Bilan 2’</text:span></text:p>
            <text:p text:style-name="P3"><text:span text:style-name="T2">Binômes pour Ex. 3–4 · projeter le tableau des faux amis · amorces DE pour G, justification orale pour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51</meta:creation-date>
    <dc:date>2026-07-21T16:30:51</dc:date>
    <meta:document-statistic meta:object-count="189"/>
    <meta:generator>LibreOffice/24.2.7.2$Linux_X86_64 LibreOffice_project/420$Build-2</meta:generator>
  </office:meta>
</office:document-meta>
</file>