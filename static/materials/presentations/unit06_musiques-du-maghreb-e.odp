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usiques du Maghreb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usiques du Maghreb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8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ituer le Maghreb et nommer trois genres musicaux</text:span></text:p>
              </text:list-item>
              <text:list-item>
                <text:p text:style-name="P6"><text:span text:style-name="T2">Comprendre une fiche d’artiste à l’oral</text:span></text:p>
              </text:list-item>
              <text:list-item>
                <text:p text:style-name="P6"><text:span text:style-name="T2">Utiliser dix mots du champ « musique »</text:span></text:p>
              </text:list-item>
              <text:list-item>
                <text:p text:style-name="P6"><text:span text:style-name="T2">Raconter une carrière au passé composé</text:span></text:p>
              </text:list-item>
              <text:list-item>
                <text:p text:style-name="P6"><text:span text:style-name="T2">Rédiger un portrait d’artiste avec une opin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nouk montre sa playlist à Karim :</text:span></text:p>
            <text:list text:style-name="L3">
              <text:list-item>
                <text:p text:style-name="P3"><text:span text:style-name="T2">« Ma tante m’a envoyé de la musique du Maghreb ! »</text:span></text:p>
              </text:list-item>
              <text:list-item>
                <text:p text:style-name="P3"><text:span text:style-name="T2">« J’entends de la guitare… et elle passe de l’arabe au français ! »</text:span></text:p>
              </text:list-item>
              <text:list-item>
                <text:p text:style-name="P3"><text:span text:style-name="T2">« Elle s’appelle Souad Massi, née à Alger, elle chante en trois langues. »</text:span></text:p>
              </text:list-item>
            </text:list>
            <text:p text:style-name="P3"><text:span text:style-name="T2">Questions : quelle région ? quelles langues ? quel instrument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s·les artistes francophones connaissez-vous ?</text:span></text:p>
              </text:list-item>
              <text:list-item>
                <text:p text:style-name="P6"><text:span text:style-name="T2">Pourquoi chanter en plusieurs langues ?</text:span></text:p>
              </text:list-item>
              <text:list-item>
                <text:p text:style-name="P6"><text:span text:style-name="T2">Le Maghreb : quels pays ?</text:span></text:p>
              </text:list-item>
              <text:list-item>
                <text:p text:style-name="P6"><text:span text:style-name="T2">Trois mots qui évoquent une chanson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single · un clip · un album</text:span></text:p>
              </text:list-item>
              <text:list-item>
                <text:p text:style-name="P6"><text:span text:style-name="T2">une mélodie · un refrain · les paroles</text:span></text:p>
              </text:list-item>
              <text:list-item>
                <text:p text:style-name="P6"><text:span text:style-name="T2">une voix · un featuring</text:span></text:p>
              </text:list-item>
              <text:list-item>
                <text:p text:style-name="P6"><text:span text:style-name="T2">une tournée · un métissag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passé compos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passé compos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xiliaire (avoir / être) au présent + participe passé</text:span></text:p>
            <text:list text:style-name="L3">
              <text:list-item>
                <text:p text:style-name="P3"><text:span text:style-name="T2">Elle </text:span><text:span text:style-name="T3">a sorti</text:span><text:span text:style-name="T2"> son premier album en 2001.</text:span></text:p>
              </text:list-item>
              <text:list-item>
                <text:p text:style-name="P3"><text:span text:style-name="T2">Il </text:span><text:span text:style-name="T3">a fait</text:span><text:span text:style-name="T2"> une tournée en Europe.</text:span></text:p>
              </text:list-item>
              <text:list-item>
                <text:p text:style-name="P3"><text:span text:style-name="T2">Elle </text:span><text:span text:style-name="T3">est née</text:span><text:span text:style-name="T2"> à Alger. (être → accord : </text:span><text:span text:style-name="T4">née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ois genres du Maghreb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rois genres du Maghreb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Raï</text:span><text:span text:style-name="T2"> : né près d’Oran (Algérie) ; « raï » ≈ « opinion »</text:span></text:p>
              </text:list-item>
              <text:list-item>
                <text:p text:style-name="P6"><text:span text:style-name="T3">Chaâbi</text:span><text:span text:style-name="T2"> : musique populaire d’Alger ; « du peuple »</text:span></text:p>
              </text:list-item>
              <text:list-item>
                <text:p text:style-name="P6"><text:span text:style-name="T3">Métissage</text:span><text:span text:style-name="T2"> : folk, pop, flamenco + arabe / français / kaby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Souad Massi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Souad Massi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ée en 1972 à Alger</text:span></text:p>
              </text:list-item>
              <text:list-item>
                <text:p text:style-name="P6"><text:span text:style-name="T2">Folk, chaâbi, raï et autres influences</text:span></text:p>
              </text:list-item>
              <text:list-item>
                <text:p text:style-name="P6"><text:span text:style-name="T2">Installée en France à la fin des années 1990</text:span></text:p>
              </text:list-item>
              <text:list-item>
                <text:p text:style-name="P6"><text:span text:style-name="T2">Album </text:span><text:span text:style-name="T4">Raoui</text:span><text:span text:style-name="T2"> (2001)</text:span></text:p>
              </text:list-item>
              <text:list-item>
                <text:p text:style-name="P6"><text:span text:style-name="T2">Chante en arabe, français et kabyle</text:span></text:p>
              </text:list-item>
            </text:list>
            <text:p text:style-name="P3"><text:span text:style-name="T4">(Paraphrase de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du texte</text:span></text:p>
              </text:list-item>
              <text:list-item>
                <text:p text:style-name="P6"><text:span text:style-name="T2">Ex. 2 — Vocabulaire : relier</text:span></text:p>
              </text:list-item>
              <text:list-item>
                <text:p text:style-name="P6"><text:span text:style-name="T2">Ex. 3 — Passé composé</text:span></text:p>
              </text:list-item>
              <text:list-item>
                <text:p text:style-name="P6"><text:span text:style-name="T2">Ex. 4 — Capitales du Maghreb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ésentez un·e artiste (≈ 90 s) :</text:span></text:p>
            <text:list text:style-name="L3">
              <text:list-item>
                <text:p text:style-name="P3"><text:span text:style-name="T2">pays + style</text:span></text:p>
              </text:list-item>
              <text:list-item>
                <text:p text:style-name="P3"><text:span text:style-name="T2">une étape de carrière au passé composé</text:span></text:p>
              </text:list-item>
              <text:list-item>
                <text:p text:style-name="P3"><text:span text:style-name="T2">cinq mots de vocabulaire musical</text:span></text:p>
              </text:list-item>
              <text:list-item>
                <text:p text:style-name="P3"><text:span text:style-name="T2">une phrase d’opinion</text:span></text:p>
              </text:list-item>
            </text:list>
            <text:p text:style-name="P3"><text:span text:style-name="T2">Barème sur 1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situe le Maghreb</text:span></text:p>
              </text:list-item>
              <text:list-item>
                <text:p text:style-name="P6"><text:span text:style-name="T2">☐ </text:span><text:span text:style-name="T2">Je comprends une fiche d’artiste</text:span></text:p>
              </text:list-item>
              <text:list-item>
                <text:p text:style-name="P6"><text:span text:style-name="T2">☐ </text:span><text:span text:style-name="T2">J’utilise dix mots de musique</text:span></text:p>
              </text:list-item>
              <text:list-item>
                <text:p text:style-name="P6"><text:span text:style-name="T2">☐ </text:span><text:span text:style-name="T2">Je raconte au passé composé</text:span></text:p>
              </text:list-item>
              <text:list-item>
                <text:p text:style-name="P6"><text:span text:style-name="T2">☐ </text:span><text:span text:style-name="T2">Je présente un·e artiste en 90 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orale (10 P.)</text:span></text:p>
              </text:list-item>
              <text:list-item>
                <text:p text:style-name="P6"><text:span text:style-name="T2">Tâche 2 — Vocabulaire + langue (8 P.)</text:span></text:p>
              </text:list-item>
              <text:list-item>
                <text:p text:style-name="P6"><text:span text:style-name="T2">Tâche 3 — Expression écrite ≈ 120 mots (12 P.)</text:span></text:p>
              </text:list-item>
            </text:list>
            <text:p text:style-name="P3"><text:span text:style-name="T2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ouad Massi — Wikipédia, CC BY-SA 4.0</text:span></text:p>
              </text:list-item>
              <text:list-item>
                <text:p text:style-name="P6"><text:span text:style-name="T2">Raï — Wikipédia, CC BY-SA 4.0</text:span></text:p>
              </text:list-item>
              <text:list-item>
                <text:p text:style-name="P6"><text:span text:style-name="T2">Chaâbi (Algérie) — Wikipédia, CC BY-SA 4.0</text:span></text:p>
              </text:list-item>
              <text:list-item>
                <text:p text:style-name="P6"><text:span text:style-name="T2">Maghreb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1:15</meta:creation-date>
    <dc:date>2026-07-21T16:11:15</dc:date>
    <meta:document-statistic meta:object-count="185"/>
    <meta:generator>LibreOffice/24.2.7.2$Linux_X86_64 LibreOffice_project/420$Build-2</meta:generator>
  </office:meta>
</office:document-meta>
</file>