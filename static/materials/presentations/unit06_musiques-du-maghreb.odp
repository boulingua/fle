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iques du Maghreb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usiques du Maghreb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6 · Parcours G+M · Classe 8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t extrait audio/vidéo sur une musique du Maghreb</text:span></text:p>
              </text:list-item>
              <text:list-item>
                <text:p text:style-name="P6"><text:span text:style-name="T2">Distinguer raï, chaâbi et rap maghrébin</text:span></text:p>
              </text:list-item>
              <text:list-item>
                <text:p text:style-name="P6"><text:span text:style-name="T2">Repérer les informations clés d’un texte médiatique</text:span></text:p>
              </text:list-item>
              <text:list-item>
                <text:p text:style-name="P6"><text:span text:style-name="T2">Définir un genre avec </text:span><text:span text:style-name="T3">qui</text:span><text:span text:style-name="T2"> / </text:span><text:span text:style-name="T3">que</text:span></text:p>
              </text:list-item>
              <text:list-item>
                <text:p text:style-name="P6"><text:span text:style-name="T2">Présenter une chanson et dire pourquo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lle de musique, vendredi.</text:span></text:p>
            <text:list text:style-name="L3">
              <text:list-item>
                <text:p text:style-name="P3"><text:span text:style-name="T2">Karim : « Je peux vous faire écouter du raï ? »</text:span></text:p>
              </text:list-item>
              <text:list-item>
                <text:p text:style-name="P3"><text:span text:style-name="T2">Mme Renault : « Avant l’écoute, explique : le raï, c’est quoi ? »</text:span></text:p>
              </text:list-item>
              <text:list-item>
                <text:p text:style-name="P3"><text:span text:style-name="T2">Karim : « Une musique qui parle de la vie, entre deux pays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s artistes francophones d’origine maghrébine ?</text:span></text:p>
              </text:list-item>
              <text:list-item>
                <text:p text:style-name="P6"><text:span text:style-name="T2">Le mot </text:span><text:span text:style-name="T4">raï</text:span><text:span text:style-name="T2"> vient de l’arabe : quel sens ?</text:span></text:p>
              </text:list-item>
              <text:list-item>
                <text:p text:style-name="P6"><text:span text:style-name="T2">Quels instruments imaginez-vous ?</text:span></text:p>
              </text:list-item>
              <text:list-item>
                <text:p text:style-name="P6"><text:span text:style-name="T2">Une musique qui « voyage » entre deux culture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Maghreb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Maghreb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is pays principaux :</text:span></text:p>
            <text:list text:style-name="L3">
              <text:list-item>
                <text:p text:style-name="P3"><text:span text:style-name="T2">Maroc</text:span></text:p>
              </text:list-item>
              <text:list-item>
                <text:p text:style-name="P3"><text:span text:style-name="T2">Algérie</text:span></text:p>
              </text:list-item>
              <text:list-item>
                <text:p text:style-name="P3"><text:span text:style-name="T2">Tunisie</text:span></text:p>
              </text:list-item>
            </text:list>
            <text:p text:style-name="P3"><text:span text:style-name="T2">« Maghreb » = « le couchant » (l’ouest) en arab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 gen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ois gen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Raï</text:span><text:span text:style-name="T2"> — région d’Oran ; connu en Europe dans les années 1980</text:span></text:p>
              </text:list-item>
              <text:list-item>
                <text:p text:style-name="P6"><text:span text:style-name="T4">Chaâbi</text:span><text:span text:style-name="T2"> — Alger ; mariages et cafés ; oud, violon, derbouka</text:span></text:p>
              </text:list-item>
              <text:list-item>
                <text:p text:style-name="P6"><text:span text:style-name="T4">Rap maghrébin</text:span><text:span text:style-name="T2"> — français + arabe + argot ; quartier, double ident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: qui / 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: qui / 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qui</text:span><text:span text:style-name="T2"> + verbe : </text:span><text:span text:style-name="T3">une musique </text:span><text:span text:style-name="T5">qui</text:span><text:span text:style-name="T3"> vient d’Oran</text:span></text:p>
              </text:list-item>
              <text:list-item>
                <text:p text:style-name="P6"><text:span text:style-name="T4">que</text:span><text:span text:style-name="T2"> + sujet : </text:span><text:span text:style-name="T3">une chanson </text:span><text:span text:style-name="T5">que</text:span><text:span text:style-name="T3"> j’écoute</text:span></text:p>
              </text:list-item>
            </text:list>
            <text:p text:style-name="P3"><text:span text:style-name="T2">Astuce : après </text:span><text:span text:style-name="T3">qui</text:span><text:span text:style-name="T2"> → un verbe ; après </text:span><text:span text:style-name="T3">que</text:span><text:span text:style-name="T2"> → un suje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’où viennent les mots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’où viennent les mots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raï</text:span><text:span text:style-name="T2"> = opinion, point de vue, « manière de voir » (arabe)</text:span></text:p>
              </text:list-item>
              <text:list-item>
                <text:p text:style-name="P6"><text:span text:style-name="T4">chaâbi</text:span><text:span text:style-name="T2"> = de </text:span><text:span text:style-name="T3">chaâb</text:span><text:span text:style-name="T2">, « le peuple » → musique « populaire »</text:span></text:p>
              </text:list-item>
            </text:list>
            <text:p text:style-name="P3"><text:span text:style-name="T3">Paraphrasé de Wikipédia (fr), « Raï » et « Chaâbi (Algérie) », CC BY-SA 4.0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ain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frain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6">Entre Marseille et Oran, entre l’écran et le vent, je chante dans deux pays — et aucun n’est vraiment fini.</text:span></text:p>
            <text:p text:style-name="P3"><text:span text:style-name="T3">(Texte didactique original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Reconnaître le genre</text:span></text:p>
              </text:list-item>
              <text:list-item>
                <text:p text:style-name="P6"><text:span text:style-name="T3">qui</text:span><text:span text:style-name="T2"> ou </text:span><text:span text:style-name="T3">que</text:span><text:span text:style-name="T2"> ?</text:span></text:p>
              </text:list-item>
              <text:list-item>
                <text:p text:style-name="P6"><text:span text:style-name="T2">Vrai / faux sur le refrain</text:span></text:p>
              </text:list-item>
              <text:list-item>
                <text:p text:style-name="P6"><text:span text:style-name="T2">Relier vocabulaire et définition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une chanson francophone (2-3 phrases) :</text:span></text:p>
            <text:list text:style-name="L5">
              <text:list-item>
                <text:p text:style-name="P3"><text:span text:style-name="T2">Genre + artiste</text:span></text:p>
              </text:list-item>
              <text:list-item>
                <text:p text:style-name="P3"><text:span text:style-name="T2">Une définition avec </text:span><text:span text:style-name="T3">qui</text:span><text:span text:style-name="T2"> / </text:span><text:span text:style-name="T3">que</text:span></text:p>
              </text:list-item>
              <text:list-item>
                <text:p text:style-name="P3"><text:span text:style-name="T2">Pourquoi vous l’avez chois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les trois genres</text:span></text:p>
              </text:list-item>
              <text:list-item>
                <text:p text:style-name="P6"><text:span text:style-name="T2">Je comprends un court extrait</text:span></text:p>
              </text:list-item>
              <text:list-item>
                <text:p text:style-name="P6"><text:span text:style-name="T2">Je repère les infos d’un texte</text:span></text:p>
              </text:list-item>
              <text:list-item>
                <text:p text:style-name="P6"><text:span text:style-name="T2">J’utilise </text:span><text:span text:style-name="T3">qui</text:span><text:span text:style-name="T2"> / </text:span><text:span text:style-name="T3">que</text:span></text:p>
              </text:list-item>
              <text:list-item>
                <text:p text:style-name="P6"><text:span text:style-name="T2">Je présente une chans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orale — 14 P.</text:span></text:p>
              </text:list-item>
              <text:list-item>
                <text:p text:style-name="P6"><text:span text:style-name="T2">T2 Texte / médias — 10 P.</text:span></text:p>
              </text:list-item>
              <text:list-item>
                <text:p text:style-name="P6"><text:span text:style-name="T2">T3 Expression écrite — 6 P.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(fr), « Raï », CC BY-SA 4.0</text:span></text:p>
              </text:list-item>
              <text:list-item>
                <text:p text:style-name="P6"><text:span text:style-name="T2">Wikipédia (fr), « Chaâbi (Algérie) », CC BY-SA 4.0</text:span></text:p>
              </text:list-item>
              <text:list-item>
                <text:p text:style-name="P6"><text:span text:style-name="T2">Textes et refrain : originaux (aucune parole protégée reproduit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51</meta:creation-date>
    <dc:date>2026-07-21T15:33:51</dc:date>
    <meta:document-statistic meta:object-count="189"/>
    <meta:generator>LibreOffice/24.2.7.2$Linux_X86_64 LibreOffice_project/420$Build-2</meta:generator>
  </office:meta>
</office:document-meta>
</file>