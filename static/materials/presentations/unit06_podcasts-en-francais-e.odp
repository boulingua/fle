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6 — Podcasts en françai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6 — Podcasts en françai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E · classe 9 · Niveau E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l’essentiel d’un court épisode de podcast</text:span></text:p>
              </text:list-item>
              <text:list-item>
                <text:p text:style-name="P6"><text:span text:style-name="T2">Prendre des notes en six questions (qui/quoi/où/quand/pourquoi/comment)</text:span></text:p>
              </text:list-item>
              <text:list-item>
                <text:p text:style-name="P6"><text:span text:style-name="T2">Résumer un épisode (~140 mots)</text:span></text:p>
              </text:list-item>
              <text:list-item>
                <text:p text:style-name="P6"><text:span text:style-name="T2">Décrire ses habitudes d’écoute et justifier une préférence</text:span></text:p>
              </text:list-item>
              <text:list-item>
                <text:p text:style-name="P6"><text:span text:style-name="T2">Rapporter un propos : « il/elle dit que… »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Léa et Malik au bus : - Malik → podcast d’Histoire, 15 min, pendant le trajet - Léa → podcast d’actualité, 10 min, le matin - Léa note trois ou quatre mots-clés, puis réécoute</text:span></text:p>
            <text:p text:style-name="P3"><text:span text:style-name="T2">Qui écoute quoi ? Quand ? Comment retenir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Écoutez-vous des podcasts ? En quelle langue ?</text:span></text:p>
              </text:list-item>
              <text:list-item>
                <text:p text:style-name="P6"><text:span text:style-name="T2">D’où vient le mot </text:span><text:span text:style-name="T3">podcast</text:span><text:span text:style-name="T2"> ?</text:span></text:p>
              </text:list-item>
              <text:list-item>
                <text:p text:style-name="P6"><text:span text:style-name="T2">Quand écoute-t-on un podcast plutôt qu’une vidéo ?</text:span></text:p>
              </text:list-item>
              <text:list-item>
                <text:p text:style-name="P6"><text:span text:style-name="T2">Champ lexical : écouter, un épisode, s’abonner, la voix…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un podcast / une baladodiffusion</text:span></text:p>
              </text:list-item>
              <text:list-item>
                <text:p text:style-name="P6"><text:span text:style-name="T2">un épisode · un extrait</text:span></text:p>
              </text:list-item>
              <text:list-item>
                <text:p text:style-name="P6"><text:span text:style-name="T2">l’animateur·rice · l’invité·e</text:span></text:p>
              </text:list-item>
              <text:list-item>
                <text:p text:style-name="P6"><text:span text:style-name="T2">s’abonner · la transcription</text:span></text:p>
              </text:list-item>
              <text:list-item>
                <text:p text:style-name="P6"><text:span text:style-name="T2">résumer · un mot-cl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discours rapporté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discours rapporté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irect : « Je vois des merveilles. » Rapporté : Carter dit </text:span><text:span text:style-name="T4">qu’il voit</text:span><text:span text:style-name="T2"> des merveilles.</text:span></text:p>
            <text:list text:style-name="L3">
              <text:list-item>
                <text:p text:style-name="P3"><text:span text:style-name="T2">« que » introduit la phrase</text:span></text:p>
              </text:list-item>
              <text:list-item>
                <text:p text:style-name="P3"><text:span text:style-name="T2">les pronoms s’adaptent (je → il/elle)</text:span></text:p>
              </text:list-item>
              <text:list-item>
                <text:p text:style-name="P3"><text:span text:style-name="T2">après </text:span><text:span text:style-name="T3">dire que</text:span><text:span text:style-name="T2"> → indicatif (jamais subjonctif)</text:span></text:p>
              </text:list-item>
            </text:list>
            <text:p text:style-name="P3"><text:span text:style-name="T2">Verbes : dire, expliquer, ajouter, préciser, répondre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trait à écouter (texte C)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Extrait à écouter (texte C)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3">Les récits du jeudi</text:span><text:span text:style-name="T2"> — l’Égypte, 1922 : - un archéologue cherche une tombe oubliée - en novembre : une marche en pierre, on creuse - « Vous voyez quelque chose ? — Oui, des merveilles ! » - une tombe fermée depuis plus de 3 000 an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e mot « podcast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e mot « podcast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mot-valise : </text:span><text:span text:style-name="T3">iPod</text:span><text:span text:style-name="T2"> + </text:span><text:span text:style-name="T3">broadcast</text:span></text:p>
              </text:list-item>
              <text:list-item>
                <text:p text:style-name="P6"><text:span text:style-name="T2">proposé en anglais vers 2004 dans la presse</text:span></text:p>
              </text:list-item>
              <text:list-item>
                <text:p text:style-name="P6"><text:span text:style-name="T2">en français : </text:span><text:span text:style-name="T3">podcast</text:span><text:span text:style-name="T2"> (usage courant)</text:span></text:p>
              </text:list-item>
              <text:list-item>
                <text:p text:style-name="P6"><text:span text:style-name="T2">au Québec : </text:span><text:span text:style-name="T3">baladodiffusion</text:span><text:span text:style-name="T2"> / </text:span><text:span text:style-name="T3">balado</text:span></text:p>
              </text:list-item>
            </text:list>
            <text:p text:style-name="P3"><text:span text:style-name="T2">Source paraphrasée : Wikipédia « Podcasting », CC BY-SA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: six questions sur le texte C</text:span></text:p>
              </text:list-item>
              <text:list-item>
                <text:p text:style-name="P6"><text:span text:style-name="T2">Ex. 2 — Vocabulaire : associations</text:span></text:p>
              </text:list-item>
              <text:list-item>
                <text:p text:style-name="P6"><text:span text:style-name="T2">Ex. 3 — Discours rapporté : transformer trois phrases</text:span></text:p>
              </text:list-item>
              <text:list-item>
                <text:p text:style-name="P6"><text:span text:style-name="T2">Ex. 4 — Prise de notes : six mots-clés maximum</text:span></text:p>
              </text:list-item>
            </text:list>
            <text:p text:style-name="P3"><text:span text:style-name="T2">Différenciation G / M / 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Résumé écrit (~140 mots) : - les six questions - une phrase d’opinion (« Je trouve… parce que… ») - un verbe de discours rapporté</text:span></text:p>
            <text:p text:style-name="P3"><text:span text:style-name="T2">Critères : contenu 6 · discours rapporté 3 · opinion 3 · langue 3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comprends un court podcast</text:span></text:p>
              </text:list-item>
              <text:list-item>
                <text:p text:style-name="P6"><text:span text:style-name="T2">Je prends des notes en six questions</text:span></text:p>
              </text:list-item>
              <text:list-item>
                <text:p text:style-name="P6"><text:span text:style-name="T2">Je résume en ~140 mots</text:span></text:p>
              </text:list-item>
              <text:list-item>
                <text:p text:style-name="P6"><text:span text:style-name="T2">J’emploie « il/elle dit que… »</text:span></text:p>
              </text:list-item>
              <text:list-item>
                <text:p text:style-name="P6"><text:span text:style-name="T2">Je dis quel podcast je préfère et pourquoi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— 30 point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 — 30 point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Tâche 1 — Compréhension à l’écoute : 12 P.</text:span></text:p>
              </text:list-item>
              <text:list-item>
                <text:p text:style-name="P6"><text:span text:style-name="T2">Tâche 2 — Vocabulaire : 6 P.</text:span></text:p>
              </text:list-item>
              <text:list-item>
                <text:p text:style-name="P6"><text:span text:style-name="T2">Tâche 3 — Expression écrite (résumé) : 12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Wikipédia, « Podcasting » — CC BY-SA 4.0</text:span></text:p>
              </text:list-item>
              <text:list-item>
                <text:p text:style-name="P6"><text:span text:style-name="T2">Wikipédia / OQLF, « Baladodiffusion » — CC BY-SA 4.0</text:span></text:p>
              </text:list-item>
              <text:list-item>
                <text:p text:style-name="P6"><text:span text:style-name="T2">Radio France — portail podcasts (référence, non affiliée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6:16:17</meta:creation-date>
    <dc:date>2026-07-21T16:16:17</dc:date>
    <meta:document-statistic meta:object-count="185"/>
    <meta:generator>LibreOffice/24.2.7.2$Linux_X86_64 LibreOffice_project/420$Build-2</meta:generator>
  </office:meta>
</office:document-meta>
</file>