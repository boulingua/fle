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6 — Podcasts en françai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6 — Podcasts en françai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9 · Niveau M Compréhension orale et audiovisuel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 podcast court (3–5 min)</text:span></text:p>
              </text:list-item>
              <text:list-item>
                <text:p text:style-name="P6"><text:span text:style-name="T2">Prendre des notes : la grille 3-2-1</text:span></text:p>
              </text:list-item>
              <text:list-item>
                <text:p text:style-name="P6"><text:span text:style-name="T2">Résumer un épisode en 5 phrases</text:span></text:p>
              </text:list-item>
              <text:list-item>
                <text:p text:style-name="P6"><text:span text:style-name="T2">Raconter « par référence » (discours rapporté)</text:span></text:p>
              </text:list-item>
              <text:list-item>
                <text:p text:style-name="P6"><text:span text:style-name="T2">Donner un avis simple et justifi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. Klein, prof d’orientation : « Pour progresser, écoutez des podcasts ! »</text:span></text:p>
            <text:p text:style-name="P3"><text:span text:style-name="T2">Léa découvre </text:span><text:span text:style-name="T3">Les P’tits Bateaux</text:span><text:span text:style-name="T2"> (France Inter) : des enfants posent des questions, des spécialistes répondent.</text:span></text:p>
            <text:p text:style-name="P3"><text:span text:style-name="T2">→ </text:span><text:span text:style-name="T2">Avantage du podcast : à la demande, réécoute possibl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Écoutez-vous des podcasts ? En français ?</text:span></text:p>
              </text:list-item>
              <text:list-item>
                <text:p text:style-name="P6"><text:span text:style-name="T2">Quels sujets vous intéressent ?</text:span></text:p>
              </text:list-item>
              <text:list-item>
                <text:p text:style-name="P6"><text:span text:style-name="T2">Où et quand écoutez-vous ?</text:span></text:p>
              </text:list-item>
              <text:list-item>
                <text:p text:style-name="P6"><text:span text:style-name="T2">Cinq mots associés à « podcast »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 épisode · l’animateur/animatrice · un(e) invité(e)</text:span></text:p>
              </text:list-item>
              <text:list-item>
                <text:p text:style-name="P6"><text:span text:style-name="T2">un extrait · le sujet / le thème</text:span></text:p>
              </text:list-item>
              <text:list-item>
                <text:p text:style-name="P6"><text:span text:style-name="T2">s’abonner · télécharger · diffuser</text:span></text:p>
              </text:list-item>
              <text:list-item>
                <text:p text:style-name="P6"><text:span text:style-name="T2">résumer · une idée-cl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discours rapporté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discours rapporté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Raconter sans rejouer, au présent, avec </text:span><text:span text:style-name="T4">que</text:span><text:span text:style-name="T2"> :</text:span></text:p>
            <text:list text:style-name="L3">
              <text:list-item>
                <text:p text:style-name="P3"><text:span text:style-name="T2">L’animatrice </text:span><text:span text:style-name="T4">dit que</text:span><text:span text:style-name="T2"> le ciel est bleu.</text:span></text:p>
              </text:list-item>
              <text:list-item>
                <text:p text:style-name="P3"><text:span text:style-name="T2">L’invité </text:span><text:span text:style-name="T4">explique qu’</text:span><text:span text:style-name="T2">il faut réécouter.</text:span></text:p>
              </text:list-item>
              <text:list-item>
                <text:p text:style-name="P3"><text:span text:style-name="T2">Le podcast </text:span><text:span text:style-name="T4">montre que</text:span><text:span text:style-name="T2"> les questions sont utiles.</text:span></text:p>
              </text:list-item>
            </text:list>
            <text:p text:style-name="P3"><text:span text:style-name="T3">dire / expliquer / ajouter / montrer / préciser que…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nscription modè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ranscription modè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« Une question par jour » — </text:span><text:span text:style-name="T3">Pourquoi le ciel est-il bleu ?</text:span></text:p>
            <text:list text:style-name="L3">
              <text:list-item>
                <text:p text:style-name="P3"><text:span text:style-name="T2">Le jour : l’air disperse surtout le bleu (onde courte)</text:span></text:p>
              </text:list-item>
              <text:list-item>
                <text:p text:style-name="P3"><text:span text:style-name="T2">Le soir : couche d’air épaisse → rouge et orange dominen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podcast</text:span><text:span text:style-name="T2"> = iPod + broadcasting</text:span></text:p>
              </text:list-item>
              <text:list-item>
                <text:p text:style-name="P6"><text:span text:style-name="T2">Programme audio à la demande, en épisodes, avec abonnement (flux)</text:span></text:p>
              </text:list-item>
              <text:list-item>
                <text:p text:style-name="P6"><text:span text:style-name="T2">Québec : </text:span><text:span text:style-name="T4">baladodiffusion / balado</text:span><text:span text:style-name="T2"> (baladeur + radiodiffusion)</text:span></text:p>
              </text:list-item>
              <text:list-item>
                <text:p text:style-name="P6"><text:span text:style-name="T3">Les P’tits Bateaux</text:span><text:span text:style-name="T2"> (France Inter, depuis 1997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2">Compréhension (texte C) — 4 questions</text:span></text:p>
              </text:list-item>
              <text:list-item>
                <text:p text:style-name="P6"><text:span text:style-name="T2">Grille 3-2-1</text:span></text:p>
              </text:list-item>
              <text:list-item>
                <text:p text:style-name="P6"><text:span text:style-name="T2">Vocabulaire à compléter</text:span></text:p>
              </text:list-item>
              <text:list-item>
                <text:p text:style-name="P6"><text:span text:style-name="T2">Discours rapporté</text:span></text:p>
              </text:list-item>
            </text:list>
            <text:p text:style-name="P3"><text:span text:style-name="T2">Différenciation :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 épisode (3–5 min) → grille 3-2-1 → résumé en 5 phrases</text:span></text:p>
            <text:list text:style-name="L5">
              <text:list-item>
                <text:p text:style-name="P3"><text:span text:style-name="T2">Titre + animateur·rice</text:span></text:p>
              </text:list-item>
              <text:list-item>
                <text:p text:style-name="P3"><text:span text:style-name="T2">Sujet</text:span></text:p>
              </text:list-item>
              <text:list-item>
                <text:p text:style-name="P3"><text:span text:style-name="T2">Idée-clé 1</text:span></text:p>
              </text:list-item>
              <text:list-item>
                <text:p text:style-name="P3"><text:span text:style-name="T2">Idée-clé 2</text:span></text:p>
              </text:list-item>
              <text:list-item>
                <text:p text:style-name="P3"><text:span text:style-name="T2">Avis</text:span></text:p>
              </text:list-item>
            </text:list>
            <text:p text:style-name="P3"><text:span text:style-name="T2">→ </text:span><text:span text:style-name="T2">2 emplois du discours rapporté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comprends un podcast court</text:span></text:p>
              </text:list-item>
              <text:list-item>
                <text:p text:style-name="P6"><text:span text:style-name="T2">J’utilise la grille 3-2-1</text:span></text:p>
              </text:list-item>
              <text:list-item>
                <text:p text:style-name="P6"><text:span text:style-name="T2">Je résume en 5 phrases</text:span></text:p>
              </text:list-item>
              <text:list-item>
                <text:p text:style-name="P6"><text:span text:style-name="T2">J’emploie le discours rapporté</text:span></text:p>
              </text:list-item>
              <text:list-item>
                <text:p text:style-name="P6"><text:span text:style-name="T2">Je donne un avis justifi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orale (15 P.)</text:span></text:p>
              </text:list-item>
              <text:list-item>
                <text:p text:style-name="P6"><text:span text:style-name="T2">Tâche 2 — Vocabulaire (5 P.)</text:span></text:p>
              </text:list-item>
              <text:list-item>
                <text:p text:style-name="P6"><text:span text:style-name="T2">Tâche 3 — Résumé écrit (10 P.)</text:span></text:p>
              </text:list-item>
            </text:list>
            <text:p text:style-name="P3"><text:span text:style-name="T4">Total : 30 P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Podcasting</text:span><text:span text:style-name="T2"> — Wikipédia, CC BY-SA 4.0</text:span></text:p>
              </text:list-item>
              <text:list-item>
                <text:p text:style-name="P6"><text:span text:style-name="T3">Les P’tits Bateaux</text:span><text:span text:style-name="T2"> — Wikipédia, CC BY-SA 4.0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34:29</meta:creation-date>
    <dc:date>2026-07-21T15:34:29</dc:date>
    <meta:document-statistic meta:object-count="185"/>
    <meta:generator>LibreOffice/24.2.7.2$Linux_X86_64 LibreOffice_project/420$Build-2</meta:generator>
  </office:meta>
</office:document-meta>
</file>