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3.528cm" fo:margin-right="0cm" fo:margin-top="0.141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italic" style:text-underline-style="none" fo:font-weight="normal" fo:background-color="transparent" style:font-size-asian="33pt" style:font-style-asian="italic" style:font-weight-asian="normal" style:font-size-complex="33pt" style:font-style-complex="italic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Transports et mobilit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Transports et mobilit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7 · Niveau E</text:span></text:p>
            <text:p text:style-name="P3"><text:span text:style-name="T2">Se déplacer, prendre son billet, voyager autr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les moyens de transport</text:span></text:p>
              </text:list-item>
              <text:list-item>
                <text:p text:style-name="P6"><text:span text:style-name="T2">Comprendre une annonce et un récit de voyage</text:span></text:p>
              </text:list-item>
              <text:list-item>
                <text:p text:style-name="P6"><text:span text:style-name="T2">Utiliser </text:span><text:span text:style-name="T3">en</text:span><text:span text:style-name="T2"> / </text:span><text:span text:style-name="T3">à</text:span><text:span text:style-name="T2"> + transport</text:span></text:p>
              </text:list-item>
              <text:list-item>
                <text:p text:style-name="P6"><text:span text:style-name="T2">Décrire un trajet entre deux villes</text:span></text:p>
              </text:list-item>
              <text:list-item>
                <text:p text:style-name="P6"><text:span text:style-name="T2">Parler de mes habitudes de mobil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Léa</text:span><text:span text:style-name="T2"> — Samedi, je vais chez ma cousine à Lyon. Je prends le TGV. </text:span><text:span text:style-name="T4">Karim</text:span><text:span text:style-name="T2"> — Le train ? Mes parents voulaient y aller en voiture. </text:span><text:span text:style-name="T4">Léa</text:span><text:span text:style-name="T2"> — Le train est plus rapide et plus écologique. En deux heures, je suis à Lyon !</text:span></text:p>
            <text:p text:style-name="P3"><text:span text:style-name="T3">Et vous, comment venez-vous au lycé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ment venez-vous au lycée : à pied, à vélo, en bus, en voiture ?</text:span></text:p>
              </text:list-item>
              <text:list-item>
                <text:p text:style-name="P6"><text:span text:style-name="T2">Avez-vous déjà pris le TGV ou l’avion ?</text:span></text:p>
              </text:list-item>
              <text:list-item>
                <text:p text:style-name="P6"><text:span text:style-name="T2">Quel transport est le plus écologique ? le plus rapide ? le plus che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 (1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 (1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train / le TGV — der Zug</text:span></text:p>
              </text:list-item>
              <text:list-item>
                <text:p text:style-name="P6"><text:span text:style-name="T2">la voiture — das Auto</text:span></text:p>
              </text:list-item>
              <text:list-item>
                <text:p text:style-name="P6"><text:span text:style-name="T2">le bus — der Bus</text:span></text:p>
              </text:list-item>
              <text:list-item>
                <text:p text:style-name="P6"><text:span text:style-name="T2">le tram — die Straßenbahn</text:span></text:p>
              </text:list-item>
              <text:list-item>
                <text:p text:style-name="P6"><text:span text:style-name="T2">le métro — die U-Bahn</text:span></text:p>
              </text:list-item>
              <text:list-item>
                <text:p text:style-name="P6"><text:span text:style-name="T2">le vélo — das Fahrrad</text:span></text:p>
              </text:list-item>
              <text:list-item>
                <text:p text:style-name="P6"><text:span text:style-name="T2">l’avion — das Flugzeug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 (2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 (2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gare — der Bahnhof</text:span></text:p>
              </text:list-item>
              <text:list-item>
                <text:p text:style-name="P6"><text:span text:style-name="T2">le quai — der Bahnsteig</text:span></text:p>
              </text:list-item>
              <text:list-item>
                <text:p text:style-name="P6"><text:span text:style-name="T2">la voie — das Gleis</text:span></text:p>
              </text:list-item>
              <text:list-item>
                <text:p text:style-name="P6"><text:span text:style-name="T2">le billet — die Fahrkarte</text:span></text:p>
              </text:list-item>
              <text:list-item>
                <text:p text:style-name="P6"><text:span text:style-name="T2">le trajet / le voyage — die Fahrt / die Reise</text:span></text:p>
              </text:list-item>
              <text:list-item>
                <text:p text:style-name="P6"><text:span text:style-name="T2">la correspondance — der Anschlus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: en / à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: </text:span><text:span text:style-name="T5">en</text:span><text:span text:style-name="T1"> / </text:span><text:span text:style-name="T5">à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en</text:span><text:span text:style-name="T2"> (on monte dedans) : </text:span><text:span text:style-name="T3">en train, en voiture, en bus, en métro, en avion</text:span></text:p>
            <text:p text:style-name="P3"><text:span text:style-name="T4">à</text:span><text:span text:style-name="T2"> (dessus ou sans véhicule) : </text:span><text:span text:style-name="T3">à pied, à vélo, à moto</text:span></text:p>
            <text:p text:style-name="P3"><text:span text:style-name="T2">Attention : </text:span><text:span text:style-name="T3">à pied</text:span><text:span text:style-name="T2"> et </text:span><text:span text:style-name="T3">en voiture</text:span><text:span text:style-name="T2">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nonce en ga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nnonce en ga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7"><text:span text:style-name="T6">Le TGV numéro 9572 à destination de Lyon Part-Dieu partira à 9 h 22, voie 4. La durée du trajet est de deux heures. Attention à la fermeture des portes. Bon voyage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cit de voyag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cit de voyag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7"><text:span text:style-name="T6">Samedi, je suis allée voir ma cousine à Lyon. J’ai pris le TGV à 9 h 22. Le trajet a duré deux heures. À 11 h 22, je suis arrivée à Lyon. Nous avons pris le métro, puis nous avons marché. C’était rapide et écologique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GV : service commercial depuis </text:span><text:span text:style-name="T4">1981</text:span><text:span text:style-name="T2"> (Paris–Lyon)</text:span></text:p>
              </text:list-item>
              <text:list-item>
                <text:p text:style-name="P6"><text:span text:style-name="T2">Record du monde sur rail : </text:span><text:span text:style-name="T4">574,8 km/h</text:span><text:span text:style-name="T2"> (SNCF, 2007)</text:span></text:p>
              </text:list-item>
              <text:list-item>
                <text:p text:style-name="P6"><text:span text:style-name="T4">Vélib’</text:span><text:span text:style-name="T2"> à Paris depuis 2007 : vélos en libre-service</text:span></text:p>
              </text:list-item>
              <text:list-item>
                <text:p text:style-name="P6"><text:span text:style-name="T2">→ </text:span><text:span text:style-name="T2">symboles de la </text:span><text:span text:style-name="T4">mobilité durable</text:span></text:p>
              </text:list-item>
            </text:list>
            <text:p text:style-name="P3"><text:span text:style-name="T3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écrite (textes C et D)</text:span></text:p>
              </text:list-item>
              <text:list-item>
                <text:p text:style-name="P6"><text:span text:style-name="T2">Ex. 2 — </text:span><text:span text:style-name="T3">en</text:span><text:span text:style-name="T2"> / </text:span><text:span text:style-name="T3">à</text:span><text:span text:style-name="T2"> ?</text:span></text:p>
              </text:list-item>
              <text:list-item>
                <text:p text:style-name="P6"><text:span text:style-name="T2">Ex. 3 — Vocabulaire (reliez)</text:span></text:p>
              </text:list-item>
              <text:list-item>
                <text:p text:style-name="P6"><text:span text:style-name="T2">Ex. 4 — Écrire trois phrases (passé composé)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Présentation orale (~8 phrases, 1–2 min)</text:span></text:p>
            <text:p text:style-name="P3"><text:span text:style-name="T2">Présentez un trajet : départ, arrivée, horaires, transport, durée, votre avis.</text:span></text:p>
            <text:p text:style-name="P3"><text:span text:style-name="T2">Utilisez 3 × </text:span><text:span text:style-name="T3">en</text:span><text:span text:style-name="T2"> / </text:span><text:span text:style-name="T3">à</text:span><text:span text:style-name="T2"> + 2 verbes au passé composé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8 transports</text:span></text:p>
              </text:list-item>
              <text:list-item>
                <text:p text:style-name="P6"><text:span text:style-name="T2">☐ </text:span><text:span text:style-name="T2">J’utilise </text:span><text:span text:style-name="T3">en</text:span><text:span text:style-name="T2"> / </text:span><text:span text:style-name="T3">à</text:span></text:p>
              </text:list-item>
              <text:list-item>
                <text:p text:style-name="P6"><text:span text:style-name="T2">☐ </text:span><text:span text:style-name="T2">Je comprends une annonce et un récit</text:span></text:p>
              </text:list-item>
              <text:list-item>
                <text:p text:style-name="P6"><text:span text:style-name="T2">☐ </text:span><text:span text:style-name="T2">Je décris un trajet</text:span></text:p>
              </text:list-item>
              <text:list-item>
                <text:p text:style-name="P6"><text:span text:style-name="T2">☐ </text:span><text:span text:style-name="T2">Je parle 1–2 minutes de ma mobil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2 P.)</text:span></text:p>
              </text:list-item>
              <text:list-item>
                <text:p text:style-name="P6"><text:span text:style-name="T2">Tâche 2 — </text:span><text:span text:style-name="T3">en</text:span><text:span text:style-name="T2"> / </text:span><text:span text:style-name="T3">à</text:span><text:span text:style-name="T2"> (8 P.)</text:span></text:p>
              </text:list-item>
              <text:list-item>
                <text:p text:style-name="P6"><text:span text:style-name="T2">Tâche 3 — Production orale en continu (10 P.)</text:span></text:p>
              </text:list-item>
            </text:list>
            <text:p text:style-name="P3"><text:span text:style-name="T4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TGV » — Wikipédia, CC BY-SA 4.0</text:span></text:p>
              </text:list-item>
              <text:list-item>
                <text:p text:style-name="P6"><text:span text:style-name="T2">« Vélib’ Métropole » — Wikipédia, CC BY-SA 4.0</text:span></text:p>
              </text:list-item>
              <text:list-item>
                <text:p text:style-name="P6"><text:span text:style-name="T2">Textes : prose originale de l’un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34</meta:creation-date>
    <dc:date>2026-07-21T16:09:34</dc:date>
    <meta:document-statistic meta:object-count="193"/>
    <meta:generator>LibreOffice/24.2.7.2$Linux_X86_64 LibreOffice_project/420$Build-2</meta:generator>
  </office:meta>
</office:document-meta>
</file>