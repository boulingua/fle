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7 — Champs de batai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7 — Champs de batai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Verdun (1916) · Ypres (1917) Mémoire franco-allemande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e page mémoire (dates, chiffres, lieux)</text:span></text:p>
              </text:list-item>
              <text:list-item>
                <text:p text:style-name="P6"><text:span text:style-name="T2">Reconnaître le passé simple, écrire au passé composé</text:span></text:p>
              </text:list-item>
              <text:list-item>
                <text:p text:style-name="P6"><text:span text:style-name="T2">Analyser un lieu de mémoire (monument, cérémonie, symbole)</text:span></text:p>
              </text:list-item>
              <text:list-item>
                <text:p text:style-name="P6"><text:span text:style-name="T2">Rédiger une courte page mémoire respectueuse</text:span></text:p>
              </text:list-item>
              <text:list-item>
                <text:p text:style-name="P6"><text:span text:style-name="T2">Exprimer une opinion sur la réconcili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me Devos annonce le voyage à Verdun.</text:span></text:p>
            <text:p text:style-name="P3"><text:span text:style-name="T2">« Aujourd’hui, Verdun est un lieu de mémoire franco-allemand : Français et Allemands s’y souviennent ensemble. »</text:span></text:p>
            <text:p text:style-name="P3"><text:span text:style-name="T2">Anouk prépare Verdun · Yanis prépare Ypre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ù se trouvent Verdun et Ypres ?</text:span></text:p>
              </text:list-item>
              <text:list-item>
                <text:p text:style-name="P6"><text:span text:style-name="T2">Pourquoi visiter un ancien champ de bataille ?</text:span></text:p>
              </text:list-item>
              <text:list-item>
                <text:p text:style-name="P6"><text:span text:style-name="T2">Histoire (les faits) ≠ mémoire (le souvenir partagé)</text:span></text:p>
              </text:list-item>
              <text:list-item>
                <text:p text:style-name="P6"><text:span text:style-name="T2">Un symbole de paix que vous connaissez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 soldat · une tranchée · une bataille un monument aux morts · un cimetière la mémoire · la paix · la réconciliat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assé simple (lecture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assé simple (lecture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Je lis → j’écris - il combattit → il a combattu - ils tombèrent → ils sont tombés - elle fut blessée → elle a été blessée</text:span></text:p>
            <text:p text:style-name="P3"><text:span text:style-name="T2">Terminaisons -it / -irent / -èrent = passé simpl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erdun (texte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erdun (texte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Février – décembre 1916 : une des plus longues batailles.</text:span></text:p>
            <text:p text:style-name="P3"><text:span text:style-name="T2">Armées française et allemande · des centaines de milliers de victimes.</text:span></text:p>
            <text:p text:style-name="P3"><text:span text:style-name="T2">Ossuaire de Douaumont : soldats inconnus, français et allemands.</text:span></text:p>
            <text:p text:style-name="P3"><text:span text:style-name="T2">1984 : la main tendue devant l’ossuaire = réconciliatio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coquelico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coquelico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Ypres, 1917 : la bataille dans la boue.</text:span></text:p>
            <text:p text:style-name="P3"><text:span text:style-name="T2">John McCrae, poème </text:span><text:span text:style-name="T3">In Flanders Fields</text:span><text:span text:style-name="T2"> (1915).</text:span></text:p>
            <text:p text:style-name="P3"><text:span text:style-name="T2">Le coquelicot rouge = symbole du souvenir.</text:span></text:p>
            <text:p text:style-name="P3"><text:span text:style-name="T2">(Faits d’après Wikipédia, CC BY-SA.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</text:span></text:p>
              </text:list-item>
              <text:list-item>
                <text:p text:style-name="P6"><text:span text:style-name="T2">Ex. 2 : passé simple → passé composé</text:span></text:p>
              </text:list-item>
              <text:list-item>
                <text:p text:style-name="P6"><text:span text:style-name="T2">Ex. 3 : vocabulaire (relier)</text:span></text:p>
              </text:list-item>
              <text:list-item>
                <text:p text:style-name="P6"><text:span text:style-name="T2">Ex. 4 : repérer deux passés simples</text:span></text:p>
              </text:list-item>
            </text:list>
            <text:p text:style-name="P3"><text:span text:style-name="T2">Différenciation : G cocher · M standard · E analyse fin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ge mémoire sur Ypres (≈ 120 mots)</text:span></text:p>
            <text:list text:style-name="L3">
              <text:list-item>
                <text:p text:style-name="P3"><text:span text:style-name="T2">Faits fournis (Menin, Last Post, coquelicot)</text:span></text:p>
              </text:list-item>
              <text:list-item>
                <text:p text:style-name="P3"><text:span text:style-name="T2">Au moins 6 mots de vocabulaire</text:span></text:p>
              </text:list-item>
              <text:list-item>
                <text:p text:style-name="P3"><text:span text:style-name="T2">Une phrase de réflexion sur la paix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mprends une page mémoire</text:span></text:p>
              </text:list-item>
              <text:list-item>
                <text:p text:style-name="P6"><text:span text:style-name="T2">Je reconnais / transforme le passé simple</text:span></text:p>
              </text:list-item>
              <text:list-item>
                <text:p text:style-name="P6"><text:span text:style-name="T2">J’emploie 8 mots de la mémoire</text:span></text:p>
              </text:list-item>
              <text:list-item>
                <text:p text:style-name="P6"><text:span text:style-name="T2">Je rédige 120 mots</text:span></text:p>
              </text:list-item>
              <text:list-item>
                <text:p text:style-name="P6"><text:span text:style-name="T2">J’explique la réconcili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compréhension écrite (12 P.)</text:span></text:p>
              </text:list-item>
              <text:list-item>
                <text:p text:style-name="P6"><text:span text:style-name="T2">Tâche 2 : analyse d’un lieu de mémoire (8 P.)</text:span></text:p>
              </text:list-item>
              <text:list-item>
                <text:p text:style-name="P6"><text:span text:style-name="T2">Tâche 3 : page mémoire sur Ypres (10 P.)</text:span></text:p>
              </text:list-item>
            </text:list>
            <text:p text:style-name="P3"><text:span text:style-name="T2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(CC BY-SA) : Verdun, Douaumont, Passchendaele, Porte de Menin</text:span></text:p>
              </text:list-item>
              <text:list-item>
                <text:p text:style-name="P6"><text:span text:style-name="T2">In Flanders Fields — J. McCrae (1915, domaine public)</text:span></text:p>
              </text:list-item>
              <text:list-item>
                <text:p text:style-name="P6"><text:span text:style-name="T2">Mémorial de Verdun · In Flanders Fields Museum (liens)</text:span></text:p>
              </text:list-item>
            </text:list>
            <text:p text:style-name="P3"><text:span text:style-name="T2">Plateforme non affiliée — usage pédagogiqu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1:18</meta:creation-date>
    <dc:date>2026-07-21T16:11:18</dc:date>
    <meta:document-statistic meta:object-count="185"/>
    <meta:generator>LibreOffice/24.2.7.2$Linux_X86_64 LibreOffice_project/420$Build-2</meta:generator>
  </office:meta>
</office:document-meta>
</file>