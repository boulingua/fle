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Discours et radio (France Inter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Discours et radio (France Inter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Activer → Apporter → S’entraîner → Produire → Réfléchir</text:span></text:p>
            <text:p text:style-name="P3"><text:span text:style-name="T3">Textes originaux et fictifs. Aucun lien avec Radio Fran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 éditorial radio</text:span></text:p>
              </text:list-item>
              <text:list-item>
                <text:p text:style-name="P6"><text:span text:style-name="T2">Repérer les marques de l’oralité et la rhétorique</text:span></text:p>
              </text:list-item>
              <text:list-item>
                <text:p text:style-name="P6"><text:span text:style-name="T2">Distinguer registre écrit et registre radio</text:span></text:p>
              </text:list-item>
              <text:list-item>
                <text:p text:style-name="P6"><text:span text:style-name="T2">Présenter en continu une chronique (~2 min)</text:span></text:p>
              </text:list-item>
              <text:list-item>
                <text:p text:style-name="P6"><text:span text:style-name="T2">S’auto-évaluer avec des critè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héo : « Je dois enregistrer un billet de deux minutes… par où commencer ? »</text:span></text:p>
            <text:p text:style-name="P3"><text:span text:style-name="T2">Nour : « À la radio, on ne lit pas. On </text:span><text:span text:style-name="T4">parle</text:span><text:span text:style-name="T2"> à quelqu’un. On te parle à </text:span><text:span text:style-name="T4">toi</text:span><text:span text:style-name="T2">. »</text:span></text:p>
            <text:p text:style-name="P3"><text:span text:style-name="T2">→ </text:span><text:span text:style-name="T2">Lire un texte / le dire à la radio : quelles différence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émission que vous écoutez : quel </text:span><text:span text:style-name="T4">ton</text:span><text:span text:style-name="T2"> ?</text:span></text:p>
              </text:list-item>
              <text:list-item>
                <text:p text:style-name="P6"><text:span text:style-name="T2">Édito radio ≠ article de journal : quelles différences de langue ?</text:span></text:p>
              </text:list-item>
              <text:list-item>
                <text:p text:style-name="P6"><text:span text:style-name="T2">2 min × 150 mots/min = ? mots</text:span></text:p>
              </text:list-item>
              <text:list-item>
                <text:p text:style-name="P6"><text:span text:style-name="T2">Comment saluer / quitter l’auditeu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éditorial / une chronique</text:span></text:p>
              </text:list-item>
              <text:list-item>
                <text:p text:style-name="P6"><text:span text:style-name="T2">être à l’antenne · le direct</text:span></text:p>
              </text:list-item>
              <text:list-item>
                <text:p text:style-name="P6"><text:span text:style-name="T2">un auditeur / une auditrice</text:span></text:p>
              </text:list-item>
              <text:list-item>
                <text:p text:style-name="P6"><text:span text:style-name="T2">le débit · le registre</text:span></text:p>
              </text:list-item>
              <text:list-item>
                <text:p text:style-name="P6"><text:span text:style-name="T2">la chute · tendre l’orei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arler à l’auditeu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arler à l’auditeu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4">Adresse directe</text:span><text:span text:style-name="T2"> : </text:span><text:span text:style-name="T3">vous / nous</text:span><text:span text:style-name="T2"> + impératif → </text:span><text:span text:style-name="T3">Écoutez.</text:span></text:p>
              </text:list-item>
              <text:list-item>
                <text:p text:style-name="P6"><text:span text:style-name="T4">Présentatif</text:span><text:span text:style-name="T2"> </text:span><text:span text:style-name="T3">c’est … qui / que</text:span><text:span text:style-name="T2"> → </text:span><text:span text:style-name="T3">C’est de la place pour votre pensée.</text:span></text:p>
              </text:list-item>
              <text:list-item>
                <text:p text:style-name="P6"><text:span text:style-name="T4">Connecteurs d’opposition</text:span><text:span text:style-name="T2"> → </text:span><text:span text:style-name="T3">D’un côté … De l’autre …</text:span></text:p>
              </text:list-item>
            </text:list>
            <text:list text:style-name="L3">
              <text:list-item>
                <text:p text:style-name="P6"><text:span text:style-name="T2">phrases courtes, questions rhétoriqu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nique du matin (texte origina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hronique du matin (texte origina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Bonjour à toutes et à tous, ici Camille Da Silva. »</text:span></text:p>
            <text:p text:style-name="P3"><text:span text:style-name="T2">Thème : </text:span><text:span text:style-name="T4">écouter</text:span><text:span text:style-name="T2"> vs entendre.</text:span></text:p>
            <text:p text:style-name="P3"><text:span text:style-name="T2">Le </text:span><text:span text:style-name="T4">silence</text:span><text:span text:style-name="T2"> à l’antenne · </text:span><text:span text:style-name="T3">D’un côté / De l’autre</text:span><text:span text:style-name="T2"> · l’expérience proposée.</text:span></text:p>
            <text:p text:style-name="P3"><text:span text:style-name="T2">Chute : « Belle journée à vous — et surtout, tendez l’oreill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rance Inter : station généraliste du groupe public </text:span><text:span text:style-name="T4">Radio France</text:span><text:span text:style-name="T2">, parmi les plus écoutées.</text:span></text:p>
              </text:list-item>
              <text:list-item>
                <text:p text:style-name="P6"><text:span text:style-name="T4">Éditorial</text:span><text:span text:style-name="T2"> = opinion du/de la journaliste ≠ article d’information (neutre).</text:span></text:p>
              </text:list-item>
            </text:list>
            <text:p text:style-name="P3"><text:span text:style-name="T3">(Paraphrasé de Wikipédia, CC 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/ repérage</text:span></text:p>
              </text:list-item>
              <text:list-item>
                <text:p text:style-name="P6"><text:span text:style-name="T2">Vocabulaire (associations)</text:span></text:p>
              </text:list-item>
              <text:list-item>
                <text:p text:style-name="P6"><text:span text:style-name="T2">Analyse rhétorique (5 procédés)</text:span></text:p>
              </text:list-item>
              <text:list-item>
                <text:p text:style-name="P6"><text:span text:style-name="T2">Du registre écrit au registre radio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Votre chron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Votre chron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dentification (salutation + nom + chronique)</text:span></text:p>
              </text:list-item>
              <text:list-item>
                <text:p text:style-name="P6"><text:span text:style-name="T2">≥ </text:span><text:span text:style-name="T2">3 procédés d’oralité</text:span></text:p>
              </text:list-item>
              <text:list-item>
                <text:p text:style-name="P6"><text:span text:style-name="T2">Phrases courtes, ~300 mots (~2 min)</text:span></text:p>
              </text:list-item>
              <text:list-item>
                <text:p text:style-name="P6"><text:span text:style-name="T2">Chute + signature</text:span></text:p>
              </text:list-item>
            </text:list>
            <text:p text:style-name="P3"><text:span text:style-name="T2">Critères : structure · procédés · registre · fluidité · chute (20 p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repère l’essentiel à l’écoute</text:span></text:p>
              </text:list-item>
              <text:list-item>
                <text:p text:style-name="P6"><text:span text:style-name="T2">☐ </text:span><text:span text:style-name="T2">Je reconnais adresse / présentatif / opposition</text:span></text:p>
              </text:list-item>
              <text:list-item>
                <text:p text:style-name="P6"><text:span text:style-name="T2">☐ </text:span><text:span text:style-name="T2">Je distingue écrit et oral radio</text:span></text:p>
              </text:list-item>
              <text:list-item>
                <text:p text:style-name="P6"><text:span text:style-name="T2">☐ </text:span><text:span text:style-name="T2">Je tiens 2 min en continu</text:span></text:p>
              </text:list-item>
              <text:list-item>
                <text:p text:style-name="P6"><text:span text:style-name="T2">☐ </text:span><text:span text:style-name="T2">J’ai une chute qui reste en tê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24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24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âche A</text:span><text:span text:style-name="T2"> — Compréhension orale : 5 questions (10 P.)</text:span></text:p>
              </text:list-item>
              <text:list-item>
                <text:p text:style-name="P6"><text:span text:style-name="T4">Tâche B</text:span><text:span text:style-name="T2"> — Expression en continu : votre chronique ~2 min (14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France Inter</text:span><text:span text:style-name="T2"> — Wikipédia, CC BY-SA 4.0</text:span></text:p>
              </text:list-item>
              <text:list-item>
                <text:p text:style-name="P6"><text:span text:style-name="T3">Éditorial (presse)</text:span><text:span text:style-name="T2"> — Wikipédia, CC BY-SA 4.0</text:span></text:p>
              </text:list-item>
              <text:list-item>
                <text:p text:style-name="P6"><text:span text:style-name="T2">Textes : originaux, fictifs (© plateforme FL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17</meta:creation-date>
    <dc:date>2026-07-21T16:30:17</dc:date>
    <meta:document-statistic meta:object-count="185"/>
    <meta:generator>LibreOffice/24.2.7.2$Linux_X86_64 LibreOffice_project/420$Build-2</meta:generator>
  </office:meta>
</office:document-meta>
</file>