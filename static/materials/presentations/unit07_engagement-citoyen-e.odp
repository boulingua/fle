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Engagement citoyen des jeun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Engagement citoyen des jeun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5 formes d’engagement des jeunes en France</text:span></text:p>
              </text:list-item>
              <text:list-item>
                <text:p text:style-name="P6"><text:span text:style-name="T2">Dialoguer et réagir aux arguments d’un·e partenaire</text:span></text:p>
              </text:list-item>
              <text:list-item>
                <text:p text:style-name="P6"><text:span text:style-name="T2">Exprimer une opinion (connecteurs + subjonctif)</text:span></text:p>
              </text:list-item>
              <text:list-item>
                <text:p text:style-name="P6"><text:span text:style-name="T2">Rédiger une tribune structurée (~180 mots)</text:span></text:p>
              </text:list-item>
              <text:list-item>
                <text:p text:style-name="P6"><text:span text:style-name="T2">Paraphraser et citer une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foyer, à midi.</text:span></text:p>
            <text:list text:style-name="L3">
              <text:list-item>
                <text:p text:style-name="P3"><text:span text:style-name="T2">Léa : « Le lycée cherche des volontaires pour le repair café. »</text:span></text:p>
              </text:list-item>
              <text:list-item>
                <text:p text:style-name="P3"><text:span text:style-name="T2">Karim : « Ça sert à quoi de donner son temps gratuitement ? »</text:span></text:p>
              </text:list-item>
              <text:list-item>
                <text:p text:style-name="P3"><text:span text:style-name="T2">Léa : « À réparer au lieu de jeter. Deux heures, ça suffit pour voir. »</text:span></text:p>
              </text:list-item>
            </text:list>
            <text:p text:style-name="P3"><text:span text:style-name="T2">Qui est déjà engagé ? Quel est l’argument de Karim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forme d’engagement vous attire ?</text:span></text:p>
              </text:list-item>
              <text:list-item>
                <text:p text:style-name="P6"><text:span text:style-name="T2">À quel âge vote-t-on en France ?</text:span></text:p>
              </text:list-item>
              <text:list-item>
                <text:p text:style-name="P6"><text:span text:style-name="T2">Combien d’heures par mois pour le bénévolat ?</text:span></text:p>
              </text:list-item>
              <text:list-item>
                <text:p text:style-name="P6"><text:span text:style-name="T2">Connaissez-vous une association près de chez vo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’engager · le bénévolat · militer</text:span></text:p>
              </text:list-item>
              <text:list-item>
                <text:p text:style-name="P6"><text:span text:style-name="T2">manifester · une pétition · signer</text:span></text:p>
              </text:list-item>
              <text:list-item>
                <text:p text:style-name="P6"><text:span text:style-name="T2">sensibiliser · le Service Civique</text:span></text:p>
              </text:list-item>
              <text:list-item>
                <text:p text:style-name="P6"><text:span text:style-name="T2">une association · revendiquer · le bien commu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subjonct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subjonct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près opinion négative, volonté, nécessité :</text:span></text:p>
            <text:list text:style-name="L3">
              <text:list-item>
                <text:p text:style-name="P3"><text:span text:style-name="T2">Il faut </text:span><text:span text:style-name="T3">que</text:span><text:span text:style-name="T2"> les jeunes </text:span><text:span text:style-name="T3">prennent</text:span><text:span text:style-name="T2"> la parole.</text:span></text:p>
              </text:list-item>
              <text:list-item>
                <text:p text:style-name="P3"><text:span text:style-name="T2">Je ne pense pas </text:span><text:span text:style-name="T3">qu’</text:span><text:span text:style-name="T2">un geste </text:span><text:span text:style-name="T3">suffise</text:span><text:span text:style-name="T2">.</text:span></text:p>
              </text:list-item>
              <text:list-item>
                <text:p text:style-name="P3"><text:span text:style-name="T2">Pour </text:span><text:span text:style-name="T3">que</text:span><text:span text:style-name="T2"> les choses </text:span><text:span text:style-name="T3">changent</text:span><text:span text:style-name="T2">, il faut agir.</text:span></text:p>
              </text:list-item>
            </text:list>
            <text:p text:style-name="P3"><text:span text:style-name="T2">Connecteurs : d’une part… d’autre part · certes… mais · cependant · en effet · par conséquent · enfi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« Deux heures par semain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« Deux heures par semaine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J’ai seize ans et je ne peux pas encore voter… Je me trompais.</text:span></text:p>
            <text:p text:style-name="P3"><text:span text:style-name="T2">Deux heures par semaine, j’aide des collégiens. Certes, c’est peu ; cependant, pour un enfant qui bloque, cela change tout.</text:span></text:p>
            <text:p text:style-name="P3"><text:span text:style-name="T2">Pour que les choses avancent, il faut que chacun donne un peu de son temp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Service Civ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Service Civ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positif français créé par une loi de 2010</text:span></text:p>
              </text:list-item>
              <text:list-item>
                <text:p text:style-name="P6"><text:span text:style-name="T2">Pour les jeunes de ~16 à 25 ans (30 ans si handicap)</text:span></text:p>
              </text:list-item>
              <text:list-item>
                <text:p text:style-name="P6"><text:span text:style-name="T2">Mission d’intérêt général de 6 à 12 mois</text:span></text:p>
              </text:list-item>
              <text:list-item>
                <text:p text:style-name="P6"><text:span text:style-name="T2">Indemnité mensuelle · aucun diplôme requis</text:span></text:p>
              </text:list-item>
            </text:list>
            <text:p text:style-name="P3"><text:span text:style-name="T4">(Paraphrasé de Wikipédia « Service civique »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vocabulaire à compléter</text:span></text:p>
              </text:list-item>
              <text:list-item>
                <text:p text:style-name="P6"><text:span text:style-name="T2">Ex. 3 : subjonctif</text:span></text:p>
              </text:list-item>
              <text:list-item>
                <text:p text:style-name="P6"><text:span text:style-name="T2">Ex. 4 : argumenter en 3 phras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une tribu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une tribu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viron 180 mots · 4 paragraphes</text:span></text:p>
            <text:list text:style-name="L3">
              <text:list-item>
                <text:p text:style-name="P3"><text:span text:style-name="T2">Accroche · 2 arguments · appel à agir</text:span></text:p>
              </text:list-item>
              <text:list-item>
                <text:p text:style-name="P3"><text:span text:style-name="T2">≥ </text:span><text:span text:style-name="T2">5 connecteurs · 1 subjonctif</text:span></text:p>
              </text:list-item>
              <text:list-item>
                <text:p text:style-name="P3"><text:span text:style-name="T2">≥ </text:span><text:span text:style-name="T2">5 termes de l’engag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5 formes d’engagement</text:span></text:p>
              </text:list-item>
              <text:list-item>
                <text:p text:style-name="P6"><text:span text:style-name="T2">Je dialogue et je réagis</text:span></text:p>
              </text:list-item>
              <text:list-item>
                <text:p text:style-name="P6"><text:span text:style-name="T2">J’emploie le subjonctif</text:span></text:p>
              </text:list-item>
              <text:list-item>
                <text:p text:style-name="P6"><text:span text:style-name="T2">J’utilise 5 connecteurs</text:span></text:p>
              </text:list-item>
              <text:list-item>
                <text:p text:style-name="P6"><text:span text:style-name="T2">Je rédige une tribu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Dialogue (14 pts) : convaincre / hésiter, décision commune</text:span></text:p>
              </text:list-item>
              <text:list-item>
                <text:p text:style-name="P6"><text:span text:style-name="T2">Partie B — Tribune écrite (16 pts) : ~180 mots, structure, subjoncti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« Service civique » — CC BY-SA, fr.wikipedia.org</text:span></text:p>
              </text:list-item>
              <text:list-item>
                <text:p text:style-name="P6"><text:span text:style-name="T2">Agence du Service Civique — service-civique.gouv.f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43</meta:creation-date>
    <dc:date>2026-07-21T16:28:43</dc:date>
    <meta:document-statistic meta:object-count="185"/>
    <meta:generator>LibreOffice/24.2.7.2$Linux_X86_64 LibreOffice_project/420$Build-2</meta:generator>
  </office:meta>
</office:document-meta>
</file>