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Engagement citoyen des jeun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Engagement citoyen des jeun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10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plusieurs formes d’engagement citoyen</text:span></text:p>
              </text:list-item>
              <text:list-item>
                <text:p text:style-name="P6"><text:span text:style-name="T2">Justifier une opinion (cause et but)</text:span></text:p>
              </text:list-item>
              <text:list-item>
                <text:p text:style-name="P6"><text:span text:style-name="T2">Participer à un court débat</text:span></text:p>
              </text:list-item>
              <text:list-item>
                <text:p text:style-name="P6"><text:span text:style-name="T2">Rédiger une lettre de motivation cour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ux affiches au foyer : « Nettoyage du parc, samedi » et « Conseil des élèves, jeudi ».</text:span></text:p>
            <text:list text:style-name="L3">
              <text:list-item>
                <text:p text:style-name="P3"><text:span text:style-name="T2">Nour : « Tu viens ramasser les déchets ? »</text:span></text:p>
              </text:list-item>
              <text:list-item>
                <text:p text:style-name="P3"><text:span text:style-name="T2">Théo : « Pour quoi faire, franchement ? »</text:span></text:p>
              </text:list-item>
              <text:list-item>
                <text:p text:style-name="P3"><text:span text:style-name="T2">Nour : « Parce que personne ne le fait — et c’est une équipe. »</text:span></text:p>
              </text:list-item>
            </text:list>
            <text:p text:style-name="P3"><text:span text:style-name="T2">Qui est déjà engagé ? Quel argument te convainc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ais-tu partie d’un club, d’une association ?</text:span></text:p>
              </text:list-item>
              <text:list-item>
                <text:p text:style-name="P6"><text:span text:style-name="T2">Une action concrète pour ta ville ?</text:span></text:p>
              </text:list-item>
              <text:list-item>
                <text:p text:style-name="P6"><text:span text:style-name="T2">Pourquoi certains jeunes s’engagent-ils ?</text:span></text:p>
              </text:list-item>
              <text:list-item>
                <text:p text:style-name="P6"><text:span text:style-name="T2">« Je m’engagerais volontiers pour… parce que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bénévolat — das Ehrenamt</text:span></text:p>
              </text:list-item>
              <text:list-item>
                <text:p text:style-name="P6"><text:span text:style-name="T2">une association — der Verein</text:span></text:p>
              </text:list-item>
              <text:list-item>
                <text:p text:style-name="P6"><text:span text:style-name="T2">une pétition / une manifestation</text:span></text:p>
              </text:list-item>
              <text:list-item>
                <text:p text:style-name="P6"><text:span text:style-name="T2">s’engager pour une cause</text:span></text:p>
              </text:list-item>
              <text:list-item>
                <text:p text:style-name="P6"><text:span text:style-name="T2">défendre · soutenir · avoir un impac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Cause :</text:span><text:span text:style-name="T2"> parce que · car · comme · grâce à · à cause de</text:span></text:p>
            <text:p text:style-name="P3"><text:span text:style-name="T3">But :</text:span><text:span text:style-name="T2"> pour · afin de + </text:span><text:span text:style-name="T3">infinitif</text:span></text:p>
            <text:p text:style-name="P3"><text:span text:style-name="T4">Je m’engage parce que le climat me concerne, pour protéger la natur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 &amp; cultu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 &amp; cultu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Deux heures par semaine » : Camille, 16 ans, aide des enfants chaque mercredi. « Il suffit d’un peu de temps et d’envie. »</text:span></text:p>
            <text:p text:style-name="P3"><text:span text:style-name="T3">Repère :</text:span><text:span text:style-name="T2"> le Service civique (France, loi de 2010), mission d’intérêt général pour les 16-25 an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texte (G)</text:span></text:p>
              </text:list-item>
              <text:list-item>
                <text:p text:style-name="P6"><text:span text:style-name="T2">Vocabulaire — relie (G/M)</text:span></text:p>
              </text:list-item>
              <text:list-item>
                <text:p text:style-name="P6"><text:span text:style-name="T2">Cause ou but ? (M)</text:span></text:p>
              </text:list-item>
              <text:list-item>
                <text:p text:style-name="P6"><text:span text:style-name="T2">Deux phrases justifiées (M/E)</text:span></text:p>
              </text:list-item>
            </text:list>
            <text:p text:style-name="P3"><text:span text:style-name="T2">Différenciation : G → 1-2 · M → 1-3+4 · E → 3-4 + paragraph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ettre de motivation (~120 mots)</text:span></text:p>
            <text:p text:style-name="P3"><text:span text:style-name="T2">Appel · qui tu es + cause · deux raisons (cause + but) · politesse</text:span></text:p>
            <text:p text:style-name="P3"><text:span text:style-name="T2">Critères : contenu, justification, vocabulaire, correction, regist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5 mots de l’engagement</text:span></text:p>
              </text:list-item>
              <text:list-item>
                <text:p text:style-name="P6"><text:span text:style-name="T2">Justifier avec parce que / car</text:span></text:p>
              </text:list-item>
              <text:list-item>
                <text:p text:style-name="P6"><text:span text:style-name="T2">Exprimer un but avec pour + infinitif</text:span></text:p>
              </text:list-item>
              <text:list-item>
                <text:p text:style-name="P6"><text:span text:style-name="T2">Réagir dans un débat</text:span></text:p>
              </text:list-item>
              <text:list-item>
                <text:p text:style-name="P6"><text:span text:style-name="T2">Écrire une lettre structur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interaction orale, 2-3 min (12 pts)</text:span></text:p>
              </text:list-item>
              <text:list-item>
                <text:p text:style-name="P6"><text:span text:style-name="T2">Tâche 2 — lettre de motivation ~120 mots (12 pts)</text:span></text:p>
              </text:list-item>
              <text:list-item>
                <text:p text:style-name="P6"><text:span text:style-name="T2">Total : 24 po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Service civique », Wikipédia, CC BY-SA 4.0</text:span></text:p>
              </text:list-item>
              <text:list-item>
                <text:p text:style-name="P6"><text:span text:style-name="T2">Textes et exercices : originaux (aucune affiliation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37</meta:creation-date>
    <dc:date>2026-07-21T15:46:37</dc:date>
    <meta:document-statistic meta:object-count="181"/>
    <meta:generator>LibreOffice/24.2.7.2$Linux_X86_64 LibreOffice_project/420$Build-2</meta:generator>
  </office:meta>
</office:document-meta>
</file>