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Harcèlement et respec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Harcèlement et respec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9 · Niveau E Exprimer ses sentiments, demander et proposer de l’ai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nt de commenc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vant de commenc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ujet sensible : le partage personnel n’est </text:span><text:span text:style-name="T3">jamais</text:span><text:span text:style-name="T2"> obligatoire</text:span></text:p>
              </text:list-item>
              <text:list-item>
                <text:p text:style-name="P6"><text:span text:style-name="T2">On peut travailler avec des </text:span><text:span text:style-name="T3">exemples inventés</text:span></text:p>
              </text:list-item>
              <text:list-item>
                <text:p text:style-name="P6"><text:span text:style-name="T2">Besoin de parler ? CPE · infirmerie · psychologue</text:span></text:p>
              </text:list-item>
              <text:list-item>
                <text:p text:style-name="P6"><text:span text:style-name="T2">Numéros : </text:span><text:span text:style-name="T3">3018</text:span><text:span text:style-name="T2"> (FR) · </text:span><text:span text:style-name="T3">116 111</text:span><text:span text:style-name="T2"> (D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 — « Je peux…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 — « Je peux…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les </text:span><text:span text:style-name="T3">3 rôles</text:span><text:span text:style-name="T2"> : auteur·e · victime · témoin</text:span></text:p>
              </text:list-item>
              <text:list-item>
                <text:p text:style-name="P6"><text:span text:style-name="T3">Exprimer des sentiments</text:span><text:span text:style-name="T2"> (peur, honte, solitude, soulagement)</text:span></text:p>
              </text:list-item>
              <text:list-item>
                <text:p text:style-name="P6"><text:span text:style-name="T3">Demander / proposer de l’aide</text:span><text:span text:style-name="T2"> (conditionnel de politesse)</text:span></text:p>
              </text:list-item>
              <text:list-item>
                <text:p text:style-name="P6"><text:span text:style-name="T2">Employer le </text:span><text:span text:style-name="T3">subjonctif</text:span><text:span text:style-name="T2"> du conseil</text:span></text:p>
              </text:list-item>
              <text:list-item>
                <text:p text:style-name="P6"><text:span text:style-name="T3">Rédiger</text:span><text:span text:style-name="T2"> un message de soutien (~15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Dans le couloir, à l’interclasse</text:span><text:span text:style-name="T2"> - Léa remarque que Sofiane va mal - Un groupe se moque de lui sur la messagerie de classe - « C’est pour rigoler », disent-ils - Léa : « Ce n’est pas toi le problème. Tu ne restes pas seul. » → Léa est </text:span><text:span text:style-name="T3">témoin</text:span><text:span text:style-name="T2"> — et elle agi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especter quelqu’un à l’école : 3 exemples concrets</text:span></text:p>
              </text:list-item>
              <text:list-item>
                <text:p text:style-name="P6"><text:span text:style-name="T3">Taquiner</text:span><text:span text:style-name="T2"> (une fois, réciproque) vs </text:span><text:span text:style-name="T3">harceler</text:span><text:span text:style-name="T2"> (répété, à sens unique, ça blesse)</text:span></text:p>
              </text:list-item>
              <text:list-item>
                <text:p text:style-name="P6"><text:span text:style-name="T2">Nuage de mots : </text:span><text:span text:style-name="T4">harcèlement</text:span><text:span text:style-name="T2"> / </text:span><text:span text:style-name="T4">soutien</text:span></text:p>
              </text:list-item>
              <text:list-item>
                <text:p text:style-name="P6"><text:span text:style-name="T2">Un numéro ou une personne à qui s’adresser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entiments : </text:span><text:span text:style-name="T4">avoir honte · avoir peur · se sentir seul·e · être blessé·e · être soulagé·e</text:span></text:p>
              </text:list-item>
              <text:list-item>
                <text:p text:style-name="P6"><text:span text:style-name="T2">Rôles : </text:span><text:span text:style-name="T4">auteur·e · victime · témoin</text:span></text:p>
              </text:list-item>
              <text:list-item>
                <text:p text:style-name="P6"><text:span text:style-name="T2">Actions : </text:span><text:span text:style-name="T4">soutenir · signaler · oser en parler · briser le sile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subjonctif du consei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subjonctif du consei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4">il faut que / il vaut mieux que</text:span><text:span text:style-name="T2"> + </text:span><text:span text:style-name="T3">subjonctif</text:span><text:span text:style-name="T2"> - parler → </text:span><text:span text:style-name="T4">il faut que tu </text:span><text:span text:style-name="T5">parles</text:span><text:span text:style-name="T2"> - être → </text:span><text:span text:style-name="T4">que tu </text:span><text:span text:style-name="T5">sois</text:span><text:span text:style-name="T2"> · avoir → </text:span><text:span text:style-name="T4">que tu </text:span><text:span text:style-name="T5">aies</text:span><text:span text:style-name="T2"> · faire → </text:span><text:span text:style-name="T4">qu’il </text:span><text:span text:style-name="T5">fasse</text:span></text:p>
            <text:p text:style-name="P3"><text:span text:style-name="T3">Proposer de l’aide (conditionnel) :</text:span><text:span text:style-name="T2"> </text:span><text:span text:style-name="T4">Tu </text:span><text:span text:style-name="T5">pourrais</text:span><text:span text:style-name="T4">… · Je </text:span><text:span text:style-name="T5">pourrais</text:span><text:span text:style-name="T4"> t’aider ? · On </text:span><text:span text:style-name="T5">devrait</text:span><text:span text:style-name="T4"> le signale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Texte « Je n’osais rien dire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Texte « Je n’osais rien dire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ur subit des moqueries répétées → </text:span><text:span text:style-name="T3">harcèlement</text:span></text:p>
              </text:list-item>
              <text:list-item>
                <text:p text:style-name="P6"><text:span text:style-name="T2">Elle a honte, se sent seule, croit que se taire suffira</text:span></text:p>
              </text:list-item>
              <text:list-item>
                <text:p text:style-name="P6"><text:span text:style-name="T2">Maël s’assoit près d’elle : « Ce n’est pas ta faute »</text:span></text:p>
              </text:list-item>
              <text:list-item>
                <text:p text:style-name="P6"><text:span text:style-name="T3">Le geste d’un témoin</text:span><text:span text:style-name="T2"> change tou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3018 (note culturelle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3018 (note culturelle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3018</text:span><text:span text:style-name="T2"> : aide contre le harcèlement et le cyberharcèlement (FR)</text:span></text:p>
              </text:list-item>
              <text:list-item>
                <text:p text:style-name="P6"><text:span text:style-name="T3">Gratuit · confidentiel · anonyme</text:span></text:p>
              </text:list-item>
              <text:list-item>
                <text:p text:style-name="P6"><text:span text:style-name="T2">Peut faire </text:span><text:span text:style-name="T3">retirer des contenus</text:span><text:span text:style-name="T2"> en ligne</text:span></text:p>
              </text:list-item>
              <text:list-item>
                <text:p text:style-name="P6"><text:span text:style-name="T2">Programme </text:span><text:span text:style-name="T3">pHARe</text:span><text:span text:style-name="T2"> · Journée nationale (novembre)</text:span></text:p>
              </text:list-item>
              <text:list-item>
                <text:p text:style-name="P6"><text:span text:style-name="T2">Allemagne : </text:span><text:span text:style-name="T3">Nummer gegen Kummer</text:span><text:span text:style-name="T2"> (116 111) </text:span><text:span text:style-name="T4">(D’après Wikipédia, CC BY-SA — paraphrasé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Ex. 1</text:span><text:span text:style-name="T2"> Compréhension du texte</text:span></text:p>
              </text:list-item>
              <text:list-item>
                <text:p text:style-name="P6"><text:span text:style-name="T3">Ex. 2</text:span><text:span text:style-name="T2"> Subjonctif du conseil (5 phrases)</text:span></text:p>
              </text:list-item>
              <text:list-item>
                <text:p text:style-name="P6"><text:span text:style-name="T3">Ex. 3</text:span><text:span text:style-name="T2"> Vocabulaire des sentiments (texte à trous)</text:span></text:p>
              </text:list-item>
              <text:list-item>
                <text:p text:style-name="P6"><text:span text:style-name="T3">Ex. 4</text:span><text:span text:style-name="T2"> Proposer de l’aide au conditionnel → Correction ensemble · </text:span><text:span text:style-name="T3">Différenciation G/M/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Option A — écrit (~150 mots) :</text:span><text:span text:style-name="T2"> message de soutien 1. accueillir les sentiments · 2. deux actions concrètes · 3. encouragement </text:span><text:span text:style-name="T3">Option B — oral en binôme :</text:span><text:span text:style-name="T2"> dialogue de soutien (écouter, rassurer, proposer) Critères : contenu · empathie · langue · cohérenc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3 rôles + rôle du témoin</text:span></text:p>
              </text:list-item>
              <text:list-item>
                <text:p text:style-name="P6"><text:span text:style-name="T2">☐ </text:span><text:span text:style-name="T2">5 sentiments en français</text:span></text:p>
              </text:list-item>
              <text:list-item>
                <text:p text:style-name="P6"><text:span text:style-name="T2">☐ </text:span><text:span text:style-name="T2">Proposer de l’aide poliment</text:span></text:p>
              </text:list-item>
              <text:list-item>
                <text:p text:style-name="P6"><text:span text:style-name="T2">☐ </text:span><text:span text:style-name="T2">Subjonctif après </text:span><text:span text:style-name="T4">il faut que</text:span></text:p>
              </text:list-item>
              <text:list-item>
                <text:p text:style-name="P6"><text:span text:style-name="T2">☐ </text:span><text:span text:style-name="T2">3018 (FR) / 116 111 (DE)</text:span></text:p>
              </text:list-item>
              <text:list-item>
                <text:p text:style-name="P6"><text:span text:style-name="T2">☐ </text:span><text:span text:style-name="T2">Demander de l’aide = </text:span><text:span text:style-name="T3">courage</text:span><text:span text:style-name="T2">, pas faibles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40 points · 45 mi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40 points · 45 mi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Tâche 1</text:span><text:span text:style-name="T2"> Compréhension écrite (12)</text:span></text:p>
              </text:list-item>
              <text:list-item>
                <text:p text:style-name="P6"><text:span text:style-name="T3">Tâche 2</text:span><text:span text:style-name="T2"> Langue : subjonctif + conditionnel + sentiments (12)</text:span></text:p>
              </text:list-item>
              <text:list-item>
                <text:p text:style-name="P6"><text:span text:style-name="T3">Tâche 3</text:span><text:span text:style-name="T2"> Expression écrite ~150 mots (16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Harcèlement scolaire</text:span><text:span text:style-name="T2"> — Wikipédia (CC BY-SA)</text:span></text:p>
              </text:list-item>
              <text:list-item>
                <text:p text:style-name="P6"><text:span text:style-name="T4">3018 (numéro)</text:span><text:span text:style-name="T2"> — Wikipédia (CC BY-SA)</text:span></text:p>
              </text:list-item>
              <text:list-item>
                <text:p text:style-name="P6"><text:span text:style-name="T4">Non au harcèlement / pHARe</text:span><text:span text:style-name="T2"> — education.gouv.fr</text:span></text:p>
              </text:list-item>
              <text:list-item>
                <text:p text:style-name="P6"><text:span text:style-name="T4">Nummer gegen Kummer</text:span><text:span text:style-name="T2"> (DE) </text:span><text:span text:style-name="T4">Plateforme indépendante, sans affiliation. Textes originaux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6:21</meta:creation-date>
    <dc:date>2026-07-21T16:16:21</dc:date>
    <meta:document-statistic meta:object-count="189"/>
    <meta:generator>LibreOffice/24.2.7.2$Linux_X86_64 LibreOffice_project/420$Build-2</meta:generator>
  </office:meta>
</office:document-meta>
</file>