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1.05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7 — Harcèlement et respec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7 — Harcèlement et respect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3"><text:span text:style-name="T2">Au collège · Parcours G+M · Classe 9 · Niveau M</text:span></text:p>
            <text:p text:style-name="P4"><text:span text:style-name="T3">Activer → Apporter → S’entraîner → Produire → Réfléchir</text:span></text:p>
            <text:p text:style-name="P4"><text:span text:style-name="T4">Sujet sensible : on parle DE situations, pas DES personnes. Personne n’est obligé de se confi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Distinguer </text:span><text:span text:style-name="T2">harcèlement / conflit / taquinerie</text:span></text:p>
              </text:list-item>
              <text:list-item>
                <text:p text:style-name="P7"><text:span text:style-name="T2">Exprimer un sentiment</text:span><text:span text:style-name="T3"> face à l’injustice</text:span></text:p>
              </text:list-item>
              <text:list-item>
                <text:p text:style-name="P7"><text:span text:style-name="T2">Réconforter</text:span><text:span text:style-name="T3"> un·e camarade dans un dialogue</text:span></text:p>
              </text:list-item>
              <text:list-item>
                <text:p text:style-name="P7"><text:span text:style-name="T2">Écrire</text:span><text:span text:style-name="T3"> un court message de soutien</text:span></text:p>
              </text:list-item>
              <text:list-item>
                <text:p text:style-name="P7"><text:span text:style-name="T3">Connaître les </text:span><text:span text:style-name="T2">personnes-ressources</text:span><text:span text:style-name="T3"> et le </text:span><text:span text:style-name="T2">3018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4">Devant les casiers, à la récréation.</text:span></text:p>
            <text:p text:style-name="P4"><text:span text:style-name="T2">Yanis :</text:span><text:span text:style-name="T3"> Ça va ? Tu as l’air triste… </text:span><text:span text:style-name="T2">Nour :</text:span><text:span text:style-name="T3"> Ils écrivent des messages méchants sur moi tous les soirs. </text:span><text:span text:style-name="T2">Yanis :</text:span><text:span text:style-name="T3"> Ce n’est pas normal. Tu ne dois pas rester seule avec ça. </text:span><text:span text:style-name="T2">Nour :</text:span><text:span text:style-name="T3"> J’ai peur que ça empire si j’en parle. </text:span><text:span text:style-name="T2">Yanis :</text:span><text:span text:style-name="T3"> Moi, je te crois. On peut aller voir Mme Blanc ensembl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Que veut dire </text:span><text:span text:style-name="T4">« faire bloc »</text:span><text:span text:style-name="T3"> ?</text:span></text:p>
              </text:list-item>
              <text:list-item>
                <text:p text:style-name="P7"><text:span text:style-name="T3">Quelle différence entre </text:span><text:span text:style-name="T2">se disputer</text:span><text:span text:style-name="T3"> et </text:span><text:span text:style-name="T2">harceler</text:span><text:span text:style-name="T3"> ?</text:span></text:p>
              </text:list-item>
              <text:list-item>
                <text:p text:style-name="P7"><text:span text:style-name="T3">À qui demander de l’aide au collège ? (au moins 3 personnes)</text:span></text:p>
              </text:list-item>
              <text:list-item>
                <text:p text:style-name="P7"><text:span text:style-name="T4">« Quand quelqu’un est isolé dans la cour, je peux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6.67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5">Français</text:span></text:p>
              </table:table-cell>
              <table:table-cell>
                <text:p text:style-name="P8"><text:span text:style-name="T5">Allemand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">le harcèlement / harceler</text:span></text:p>
              </table:table-cell>
              <table:table-cell>
                <text:p text:style-name="P8"><text:span text:style-name="T6">das Mobbing / mobben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">le cyberharcèlement</text:span></text:p>
              </table:table-cell>
              <table:table-cell>
                <text:p text:style-name="P8"><text:span text:style-name="T6">das Cybermobbing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">se moquer de</text:span></text:p>
              </table:table-cell>
              <table:table-cell>
                <text:p text:style-name="P8"><text:span text:style-name="T6">sich lustig machen über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">isoler / mettre à l’écart</text:span></text:p>
              </table:table-cell>
              <table:table-cell>
                <text:p text:style-name="P8"><text:span text:style-name="T6">ausgrenze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">le témoin</text:span></text:p>
              </table:table-cell>
              <table:table-cell>
                <text:p text:style-name="P8"><text:span text:style-name="T6">der Zeuge / die Zeugin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">soutenir / le soutien</text:span></text:p>
              </table:table-cell>
              <table:table-cell>
                <text:p text:style-name="P8"><text:span text:style-name="T6">unterstützen / die Unterstützung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">demander de l’aide</text:span></text:p>
              </table:table-cell>
              <table:table-cell>
                <text:p text:style-name="P8"><text:span text:style-name="T6">um Hilfe bit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conseiller avec douceu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conseiller avec douceu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Le conditionnel adoucit le conseil :</text:span><text:span text:style-name="T3"> - Tu </text:span><text:span text:style-name="T2">devrais</text:span><text:span text:style-name="T3"> en parler à un adulte. - Tu </text:span><text:span text:style-name="T2">pourrais</text:span><text:span text:style-name="T3"> aller voir le CPE. - À ta place, je </text:span><text:span text:style-name="T2">prendrais</text:span><text:span text:style-name="T3"> une capture d’écran.</text:span></text:p>
            <text:p text:style-name="P4"><text:span text:style-name="T2">Rassurer :</text:span><text:span text:style-name="T3"> Je te crois. · Tu n’es pas seul·e. · Ce n’est pas de ta faut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Agir en Franc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Agir en Franc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Harcèlement = violence </text:span><text:span text:style-name="T2">répétée</text:span><text:span text:style-name="T3"> pour blesser (circulaire 2013)</text:span></text:p>
              </text:list-item>
              <text:list-item>
                <text:p text:style-name="P7"><text:span text:style-name="T3">Par les écrans → </text:span><text:span text:style-name="T2">cyberharcèlement</text:span></text:p>
              </text:list-item>
              <text:list-item>
                <text:p text:style-name="P7"><text:span text:style-name="T3">Depuis 2015 : </text:span><text:span text:style-name="T2">Journée « Non au harcèlement »</text:span><text:span text:style-name="T3"> en novembre</text:span></text:p>
              </text:list-item>
              <text:list-item>
                <text:p text:style-name="P7"><text:span text:style-name="T2">3018</text:span><text:span text:style-name="T3"> : numéro national, gratuit, anonyme (a remplacé le 3020)</text:span></text:p>
              </text:list-item>
            </text:list>
            <text:p text:style-name="P4"><text:span text:style-name="T4">Source : Harcèlement scolaire en France, Wikipédia, CC BY-S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Ex. 1</text:span><text:span text:style-name="T3"> Distinguer H / C / T</text:span></text:p>
              </text:list-item>
              <text:list-item>
                <text:p text:style-name="P7"><text:span text:style-name="T2">Ex. 2</text:span><text:span text:style-name="T3"> Le bon conseil (conditionnel)</text:span></text:p>
              </text:list-item>
              <text:list-item>
                <text:p text:style-name="P7"><text:span text:style-name="T2">Ex. 3</text:span><text:span text:style-name="T3"> Réconforter (associer)</text:span></text:p>
              </text:list-item>
              <text:list-item>
                <text:p text:style-name="P7"><text:span text:style-name="T2">Ex. 4</text:span><text:span text:style-name="T3"> Vers qui se tourner ? (mettre en ordre)</text:span></text:p>
              </text:list-item>
            </text:list>
            <text:p text:style-name="P4"><text:span text:style-name="T4">Différenciation : G verbes fournis · M standard · E justification écrit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— jeu de rô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— jeu de rôle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À deux, ~2 min :</text:span><text:span text:style-name="T3"> se confier / réconforter</text:span></text:p>
            <text:p text:style-name="P4"><text:span text:style-name="T3">Utilise : - </text:span><text:span text:style-name="T2">2 phrases pour rassurer</text:span><text:span text:style-name="T3"> - </text:span><text:span text:style-name="T2">1 conseil au conditionnel</text:span><text:span text:style-name="T3"> - le </text:span><text:span text:style-name="T2">3018</text:span><text:span text:style-name="T3"> ou une </text:span><text:span text:style-name="T2">personne-ressource</text:span></text:p>
            <text:p text:style-name="P4"><text:span text:style-name="T4">Critères : écoute 4 · conseil 3 · ressource 2 · langue 3 = 12 P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3">☐ </text:span><text:span text:style-name="T3">Je distingue harcèlement / conflit / taquinerie</text:span></text:p>
              </text:list-item>
              <text:list-item>
                <text:p text:style-name="P7"><text:span text:style-name="T3">☐ </text:span><text:span text:style-name="T3">J’exprime un sentiment</text:span></text:p>
              </text:list-item>
              <text:list-item>
                <text:p text:style-name="P7"><text:span text:style-name="T3">☐ </text:span><text:span text:style-name="T3">Je rassure en deux phrases</text:span></text:p>
              </text:list-item>
              <text:list-item>
                <text:p text:style-name="P7"><text:span text:style-name="T3">☐ </text:span><text:span text:style-name="T3">Je conseille au conditionnel</text:span></text:p>
              </text:list-item>
              <text:list-item>
                <text:p text:style-name="P7"><text:span text:style-name="T3">☐ </text:span><text:span text:style-name="T3">Je connais 3 ressources + le 3018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.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.)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2">Écrit</text:span><text:span text:style-name="T3"> : message de soutien, 80–110 mots (14 P.)</text:span></text:p>
              </text:list-item>
              <text:list-item>
                <text:p text:style-name="P7"><text:span text:style-name="T2">Oral (dialogue)</text:span><text:span text:style-name="T3"> : jeu de rôle se confier / réconforter (10 P.)</text:span></text:p>
              </text:list-item>
              <text:list-item>
                <text:p text:style-name="P7"><text:span text:style-name="T2">Vocabulaire</text:span><text:span text:style-name="T3"> : 6 mots à traduire (6 P.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— et rappel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Merci — et rappel</text:span></text:p>
          </draw:text-box>
        </draw:frame>
        <draw:frame draw:name="Content Placeholder 2" presentation:style-name="pr2" draw:text-style-name="P5" draw:layer="layout" svg:width="22.859cm" svg:height="9.428cm" svg:x="1.27cm" svg:y="3.334cm" presentation:class="outline" presentation:user-transformed="true">
          <draw:text-box>
            <text:p text:style-name="P4"><text:span text:style-name="T2">Tous différents, jamais indifférents.</text:span></text:p>
            <text:p text:style-name="P4"><text:span text:style-name="T3">Besoin d’aide ? Professeur·e principal·e · infirmier·ère · CPE · </text:span><text:span text:style-name="T2">3018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34:32</meta:creation-date>
    <dc:date>2026-07-21T15:34:32</dc:date>
    <meta:document-statistic meta:object-count="181"/>
    <meta:generator>LibreOffice/24.2.7.2$Linux_X86_64 LibreOffice_project/420$Build-2</meta:generator>
  </office:meta>
</office:document-meta>
</file>