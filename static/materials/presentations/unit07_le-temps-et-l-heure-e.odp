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7 — Le temps et l’heu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7 — Le temps et l’heu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6 · Niveau E 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Demander et dire l’heure</text:span></text:p>
              </text:list-item>
              <text:list-item>
                <text:p text:style-name="P6"><text:span text:style-name="T2">Comprendre un emploi du temps écrit</text:span></text:p>
              </text:list-item>
              <text:list-item>
                <text:p text:style-name="P6"><text:span text:style-name="T2">Lire l’heure officielle (24 h) et familière</text:span></text:p>
              </text:list-item>
              <text:list-item>
                <text:p text:style-name="P6"><text:span text:style-name="T2">Décrire ma journée</text:span></text:p>
              </text:list-item>
              <text:list-item>
                <text:p text:style-name="P6"><text:span text:style-name="T2">Rédiger ma journée typ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evant le lycée, lundi matin. — Quelle heure est-il ? — Il est huit heures moins dix. Le cours commence à huit heures. — On mange à midi et demi ? — D’accord, à la cantine !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Quelle heure est-il maintenant ?</text:span></text:p>
              </text:list-item>
              <text:list-item>
                <text:p text:style-name="P6"><text:span text:style-name="T2">À quelle heure commences-tu les cours ?</text:span></text:p>
              </text:list-item>
              <text:list-item>
                <text:p text:style-name="P6"><text:span text:style-name="T2">Trois moments de la journée ?</text:span></text:p>
              </text:list-item>
              <text:list-item>
                <text:p text:style-name="P6"><text:span text:style-name="T2">12 h 00 et 00 h 00, comment dit-on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’heure · la minute</text:span></text:p>
              </text:list-item>
              <text:list-item>
                <text:p text:style-name="P6"><text:span text:style-name="T2">et quart · et demie · moins le quart</text:span></text:p>
              </text:list-item>
              <text:list-item>
                <text:p text:style-name="P6"><text:span text:style-name="T2">midi · minuit</text:span></text:p>
              </text:list-item>
              <text:list-item>
                <text:p text:style-name="P6"><text:span text:style-name="T2">le matin · l’après-midi · le soir · la nuit</text:span></text:p>
              </text:list-item>
              <text:list-item>
                <text:p text:style-name="P6"><text:span text:style-name="T2">se lever · se coucher · l’emploi du temp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dire l’heu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dire l’heu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Il est </text:span><text:span text:style-name="T3">une</text:span><text:span text:style-name="T2"> heure (pas </text:span><text:span text:style-name="T4">un</text:span><text:span text:style-name="T2">)</text:span></text:p>
              </text:list-item>
              <text:list-item>
                <text:p text:style-name="P6"><text:span text:style-name="T3">et quart</text:span><text:span text:style-name="T2"> (+15) · </text:span><text:span text:style-name="T3">et demie</text:span><text:span text:style-name="T2"> (+30)</text:span></text:p>
              </text:list-item>
              <text:list-item>
                <text:p text:style-name="P6"><text:span text:style-name="T3">moins le quart</text:span><text:span text:style-name="T2"> (−15) · </text:span><text:span text:style-name="T3">moins dix</text:span><text:span text:style-name="T2"> (−10)</text:span></text:p>
              </text:list-item>
              <text:list-item>
                <text:p text:style-name="P6"><text:span text:style-name="T2">midi / minuit et </text:span><text:span text:style-name="T3">demi</text:span><text:span text:style-name="T2"> (masculin)</text:span></text:p>
              </text:list-item>
              <text:list-item>
                <text:p text:style-name="P6"><text:span text:style-name="T2">24 h : 14 h → quatorze heures · </text:span><text:span text:style-name="T3">À</text:span><text:span text:style-name="T2"> quelle heur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e — La journée de Naïma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exte — La journée de Naïma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Réveil à 6 h 30, petit-déjeuner à 7 h</text:span></text:p>
              </text:list-item>
              <text:list-item>
                <text:p text:style-name="P6"><text:span text:style-name="T2">Cours à 8 h, déjeuner à la cantine à 12 h 30</text:span></text:p>
              </text:list-item>
              <text:list-item>
                <text:p text:style-name="P6"><text:span text:style-name="T2">Retour vers 16 h 30</text:span></text:p>
              </text:list-item>
              <text:list-item>
                <text:p text:style-name="P6"><text:span text:style-name="T2">Devoirs de 18 h à 19 h, coucher à 21 h 30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L’horloge parlant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L’horloge parlant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Premier service au monde : Paris, 1933</text:span></text:p>
              </text:list-item>
              <text:list-item>
                <text:p text:style-name="P6"><text:span text:style-name="T2">Astronome Ernest Esclangon, Observatoire de Paris</text:span></text:p>
              </text:list-item>
              <text:list-item>
                <text:p text:style-name="P6"><text:span text:style-name="T2">« Au quatrième top, il sera exactement… »</text:span></text:p>
              </text:list-item>
              <text:list-item>
                <text:p text:style-name="P6"><text:span text:style-name="T2">La France et l’heure précise (système 24 h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compréhension écrite (texte)</text:span></text:p>
              </text:list-item>
              <text:list-item>
                <text:p text:style-name="P6"><text:span text:style-name="T2">Ex. 2 : écrire l’heure en toutes lettres</text:span></text:p>
              </text:list-item>
              <text:list-item>
                <text:p text:style-name="P6"><text:span text:style-name="T2">Ex. 3 : officiel → familier</text:span></text:p>
              </text:list-item>
              <text:list-item>
                <text:p text:style-name="P6"><text:span text:style-name="T2">Ex. 4 : ma journée (à + heure)</text:span></text:p>
              </text:list-item>
              <text:list-item>
                <text:p text:style-name="P6"><text:span text:style-name="T2">Différenciation G / M / 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Rédige ta journée type (~70 mots) - au moins 5 heures - le matin / l’après-midi / le soir - deux verbes pronominaux - ordre chronologiqu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e dis et demande l’heure</text:span></text:p>
              </text:list-item>
              <text:list-item>
                <text:p text:style-name="P6"><text:span text:style-name="T2">☐ </text:span><text:span text:style-name="T2">Je comprends un horaire écrit</text:span></text:p>
              </text:list-item>
              <text:list-item>
                <text:p text:style-name="P6"><text:span text:style-name="T2">☐ </text:span><text:span text:style-name="T2">Je lis l’heure officielle et familière</text:span></text:p>
              </text:list-item>
              <text:list-item>
                <text:p text:style-name="P6"><text:span text:style-name="T2">☐ </text:span><text:span text:style-name="T2">Je décris ma journée</text:span></text:p>
              </text:list-item>
              <text:list-item>
                <text:p text:style-name="P6"><text:span text:style-name="T2">☐ </text:span><text:span text:style-name="T2">Je rédige ma journée typ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: compréhension écrite (12 P.)</text:span></text:p>
              </text:list-item>
              <text:list-item>
                <text:p text:style-name="P6"><text:span text:style-name="T2">Tâche 2 : lire l’heure (6 P.)</text:span></text:p>
              </text:list-item>
              <text:list-item>
                <text:p text:style-name="P6"><text:span text:style-name="T2">Tâche 3 : expression écrite ~70 mots (12 P.)</text:span></text:p>
              </text:list-item>
              <text:list-item>
                <text:p text:style-name="P6"><text:span text:style-name="T2">Total : 30 P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Horloge parlante — Wikipédia, CC BY-SA 4.0</text:span></text:p>
              </text:list-item>
              <text:list-item>
                <text:p text:style-name="P6"><text:span text:style-name="T2">Système horaire de 24 heures — Wikipédia, CC BY-SA 4.0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47:14</meta:creation-date>
    <dc:date>2026-07-21T15:47:14</dc:date>
    <meta:document-statistic meta:object-count="185"/>
    <meta:generator>LibreOffice/24.2.7.2$Linux_X86_64 LibreOffice_project/420$Build-2</meta:generator>
  </office:meta>
</office:document-meta>
</file>