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7 — Le temps et l’heu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7 — Le temps et l’heu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6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ire l’heure (formelle et informelle)</text:span></text:p>
              </text:list-item>
              <text:list-item>
                <text:p text:style-name="P6"><text:span text:style-name="T2">Nommer les 7 jours et les 12 mois</text:span></text:p>
              </text:list-item>
              <text:list-item>
                <text:p text:style-name="P6"><text:span text:style-name="T2">Lire un emploi du temps / un calendrier</text:span></text:p>
              </text:list-item>
              <text:list-item>
                <text:p text:style-name="P6"><text:span text:style-name="T2">Écrire une date complète : </text:span><text:span text:style-name="T3">le 14 mai à 17 heures</text:span></text:p>
              </text:list-item>
              <text:list-item>
                <text:p text:style-name="P6"><text:span text:style-name="T2">Poser une question sur le jour et l’heu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héo et Léa organisent leur semaine.</text:span></text:p>
            <text:list text:style-name="L3">
              <text:list-item>
                <text:p text:style-name="P3"><text:span text:style-name="T2">Théo : On se voit lundi à 16 h au parc ?</text:span></text:p>
              </text:list-item>
              <text:list-item>
                <text:p text:style-name="P3"><text:span text:style-name="T2">Léa : Lundi, non : j’ai sport de 15 h à 17 h. Et mardi ?</text:span></text:p>
              </text:list-item>
              <text:list-item>
                <text:p text:style-name="P3"><text:span text:style-name="T2">Théo : Mardi, d’accord. À quelle heure ?</text:span></text:p>
              </text:list-item>
              <text:list-item>
                <text:p text:style-name="P3"><text:span text:style-name="T2">Léa : À 17 h 30, après mes devoirs.</text:span></text:p>
              </text:list-item>
            </text:list>
            <text:p text:style-name="P3"><text:span text:style-name="T2">→ </text:span><text:span text:style-name="T2">Quel jour ? À quelle heure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 jour est-on aujourd’hui ? Et demain ?</text:span></text:p>
              </text:list-item>
              <text:list-item>
                <text:p text:style-name="P6"><text:span text:style-name="T2">Quelle heure est-il maintenant ?</text:span></text:p>
              </text:list-item>
              <text:list-item>
                <text:p text:style-name="P6"><text:span text:style-name="T2">Les 12 mois en allemand — lesquels ressemblent au françai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7 jou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7 jou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undi · mardi · mercredi · jeudi · vendredi · samedi · dimanche</text:span></text:p>
            <text:p text:style-name="P3"><text:span text:style-name="T2">Sans majuscule : </text:span><text:span text:style-name="T3">en janvier</text:span><text:span text:style-name="T2">, </text:span><text:span text:style-name="T3">le lundi</text:span><text:span text:style-name="T2">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12 moi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12 moi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janvier · février · mars · avril · mai · juin juillet · août · septembre · octobre · novembre · décembr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Dire l’heu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Dire l’heu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Quelle heure est-il ?</text:span><text:span text:style-name="T2"> → </text:span><text:span text:style-name="T3">Il est huit heures.</text:span></text:p>
              </text:list-item>
              <text:list-item>
                <text:p text:style-name="P6"><text:span text:style-name="T2">Formel (24 h) : </text:span><text:span text:style-name="T3">14 h 30</text:span><text:span text:style-name="T2"> = quatorze heures trente</text:span></text:p>
              </text:list-item>
              <text:list-item>
                <text:p text:style-name="P6"><text:span text:style-name="T2">Informel (12 h) : et quart · et demie · moins le quart</text:span></text:p>
              </text:list-item>
              <text:list-item>
                <text:p text:style-name="P6"><text:span text:style-name="T2">midi = 12 h · minuit = 0 h</text:span></text:p>
              </text:list-item>
              <text:list-item>
                <text:p text:style-name="P6"><text:span text:style-name="T2">En France, on écrit : </text:span><text:span text:style-name="T4">18 h 45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es jou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es jou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inq jours viennent des astres romains :</text:span></text:p>
            <text:list text:style-name="L3">
              <text:list-item>
                <text:p text:style-name="P3"><text:span text:style-name="T2">lundi = jour de la Lune</text:span></text:p>
              </text:list-item>
              <text:list-item>
                <text:p text:style-name="P3"><text:span text:style-name="T2">mardi = Mars · mercredi = Mercure</text:span></text:p>
              </text:list-item>
              <text:list-item>
                <text:p text:style-name="P3"><text:span text:style-name="T2">jeudi = Jupiter · vendredi = Vénus</text:span></text:p>
              </text:list-item>
              <text:list-item>
                <text:p text:style-name="P3"><text:span text:style-name="T2">samedi = jour du sabbat · dimanche = jour du Seigneur</text:span></text:p>
              </text:list-item>
            </text:list>
            <text:p text:style-name="P3"><text:span text:style-name="T3">(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écrire l’heure formelle</text:span></text:p>
              </text:list-item>
              <text:list-item>
                <text:p text:style-name="P6"><text:span text:style-name="T2">Ex. 2 : le mois suivant</text:span></text:p>
              </text:list-item>
              <text:list-item>
                <text:p text:style-name="P6"><text:span text:style-name="T2">Ex. 3 : compréhension — les anniversaires</text:span></text:p>
              </text:list-item>
              <text:list-item>
                <text:p text:style-name="P6"><text:span text:style-name="T2">Ex. 4 : compléter le mini-dialogue</text:span></text:p>
              </text:list-item>
            </text:list>
            <text:p text:style-name="P3"><text:span text:style-name="T2">Différenciation :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Ma semain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Ma semain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Écris ~40 mots :</text:span></text:p>
            <text:list text:style-name="L3">
              <text:list-item>
                <text:p text:style-name="P3"><text:span text:style-name="T2">3 activités (jour + heure)</text:span></text:p>
              </text:list-item>
              <text:list-item>
                <text:p text:style-name="P3"><text:span text:style-name="T2">ta journée préférée + pourquoi</text:span></text:p>
              </text:list-item>
            </text:list>
            <text:p text:style-name="P3"><text:span text:style-name="T2">Critères : contenu · langue · structur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dis l’heure formelle et informelle</text:span></text:p>
              </text:list-item>
              <text:list-item>
                <text:p text:style-name="P6"><text:span text:style-name="T2">Je nomme les 7 jours et les 12 mois</text:span></text:p>
              </text:list-item>
              <text:list-item>
                <text:p text:style-name="P6"><text:span text:style-name="T2">Je lis un emploi du temps</text:span></text:p>
              </text:list-item>
              <text:list-item>
                <text:p text:style-name="P6"><text:span text:style-name="T2">J’écris une date complète</text:span></text:p>
              </text:list-item>
              <text:list-item>
                <text:p text:style-name="P6"><text:span text:style-name="T2">Je pose une question sur le jour et l’heu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Lexique : jours + mois (10 P.)</text:span></text:p>
              </text:list-item>
              <text:list-item>
                <text:p text:style-name="P6"><text:span text:style-name="T2">Tâche 2 — L’heure : 5 heures à transcrire (10 P.)</text:span></text:p>
              </text:list-item>
              <text:list-item>
                <text:p text:style-name="P6"><text:span text:style-name="T2">Tâche 3 — Écriture : 3 dates personnelles (10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s des jours de la semaine — Wikipédia, CC BY-SA</text:span></text:p>
              </text:list-item>
              <text:list-item>
                <text:p text:style-name="P6"><text:span text:style-name="T2">Système horaire sur 24 heures — Wikipédia, CC 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07:58</meta:creation-date>
    <dc:date>2026-07-21T15:07:58</dc:date>
    <meta:document-statistic meta:object-count="185"/>
    <meta:generator>LibreOffice/24.2.7.2$Linux_X86_64 LibreOffice_project/420$Build-2</meta:generator>
  </office:meta>
</office:document-meta>
</file>