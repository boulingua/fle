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7 — Sport et esprit d’équip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7 — Sport et esprit d’équip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8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ire quel sport je pratique et pourquoi</text:span></text:p>
              </text:list-item>
              <text:list-item>
                <text:p text:style-name="P6"><text:span text:style-name="T2">Donner mon opinion sur une activité</text:span></text:p>
              </text:list-item>
              <text:list-item>
                <text:p text:style-name="P6"><text:span text:style-name="T2">Comprendre un règlement de tournoi court</text:span></text:p>
              </text:list-item>
              <text:list-item>
                <text:p text:style-name="P6"><text:span text:style-name="T2">Mener un dialogue d’inscription</text:span></text:p>
              </text:list-item>
              <text:list-item>
                <text:p text:style-name="P6"><text:span text:style-name="T2">Parler de l’esprit d’équip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ant le gymnase :</text:span></text:p>
            <text:list text:style-name="L3">
              <text:list-item>
                <text:p text:style-name="P3"><text:span text:style-name="T3">Léa :</text:span><text:span text:style-name="T2"> On monte une équipe pour le tournoi de hand ?</text:span></text:p>
              </text:list-item>
              <text:list-item>
                <text:p text:style-name="P3"><text:span text:style-name="T3">Karim :</text:span><text:span text:style-name="T2"> J’adore le hand, c’est rapide et on joue ensemble !</text:span></text:p>
              </text:list-item>
              <text:list-item>
                <text:p text:style-name="P3"><text:span text:style-name="T3">Nour :</text:span><text:span text:style-name="T2"> Je préfère la natation, c’est plus calme.</text:span></text:p>
              </text:list-item>
              <text:list-item>
                <text:p text:style-name="P3"><text:span text:style-name="T3">Léa :</text:span><text:span text:style-name="T2"> Dans une équipe, on progresse ensemble !</text:span></text:p>
              </text:list-item>
            </text:list>
            <text:p text:style-name="P3"><text:span text:style-name="T2">Qui aime le sport collectif ? Qui préfère l’individuel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 sport pratiques-tu, et avec qui ?</text:span></text:p>
              </text:list-item>
              <text:list-item>
                <text:p text:style-name="P6"><text:span text:style-name="T2">Sport individuel ou sport d’équipe ? Pourquoi ?</text:span></text:p>
              </text:list-item>
              <text:list-item>
                <text:p text:style-name="P6"><text:span text:style-name="T2">Qu’apporte une équipe de plus ?</text:span></text:p>
              </text:list-item>
              <text:list-item>
                <text:p text:style-name="P6"><text:span text:style-name="T2">Gagner ou perdre ensemble : quel effet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équipe (mixte) · un match · un·e arbitre</text:span></text:p>
              </text:list-item>
              <text:list-item>
                <text:p text:style-name="P6"><text:span text:style-name="T2">un·e adversaire · un·e capitaine</text:span></text:p>
              </text:list-item>
              <text:list-item>
                <text:p text:style-name="P6"><text:span text:style-name="T2">l’esprit d’équipe · s’entraîner · encourager</text:span></text:p>
              </text:list-item>
              <text:list-item>
                <text:p text:style-name="P6"><text:span text:style-name="T2">donner son avis : </text:span><text:span text:style-name="T4">à mon avis…</text:span><text:span text:style-name="T2">, </text:span><text:span text:style-name="T4">je trouve que…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Faire de + sport</text:span></text:p>
            <text:list text:style-name="L3">
              <text:list-item>
                <text:p text:style-name="P3"><text:span text:style-name="T2">faire </text:span><text:span text:style-name="T3">du</text:span><text:span text:style-name="T2"> foot · faire </text:span><text:span text:style-name="T3">de la</text:span><text:span text:style-name="T2"> natation</text:span></text:p>
              </text:list-item>
              <text:list-item>
                <text:p text:style-name="P3"><text:span text:style-name="T2">faire </text:span><text:span text:style-name="T3">de l’</text:span><text:span text:style-name="T2"> escalade · </text:span><text:span text:style-name="T3">jouer au</text:span><text:span text:style-name="T2"> handball</text:span></text:p>
              </text:list-item>
            </text:list>
            <text:p text:style-name="P3"><text:span text:style-name="T3">Donner son opinion</text:span></text:p>
            <text:list text:continue-numbering="true" text:style-name="L3">
              <text:list-item>
                <text:p text:style-name="P3"><text:span text:style-name="T2">à mon avis… · je pense que… · pour moi…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règlemen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règlemen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6 joueur·euse·s, équipe mixte (2 filles + 2 garçons min.)</text:span></text:p>
              </text:list-item>
              <text:list-item>
                <text:p text:style-name="P6"><text:span text:style-name="T2">Match : 2 × 12 min, pause de 3 min</text:span></text:p>
              </text:list-item>
              <text:list-item>
                <text:p text:style-name="P6"><text:span text:style-name="T2">Au moins 3 matchs par équipe</text:span></text:p>
              </text:list-item>
              <text:list-item>
                <text:p text:style-name="P6"><text:span text:style-name="T2">Respect obligatoire de l’arbitre et de l’adversaire</text:span></text:p>
              </text:list-item>
              <text:list-item>
                <text:p text:style-name="P6"><text:span text:style-name="T2">Inscription avant le 10 mar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Le sport scolaire en France : l’UNSS</text:span></text:p>
            <text:list text:style-name="L3">
              <text:list-item>
                <text:p text:style-name="P3"><text:span text:style-name="T2">Fédération créée en 1938</text:span></text:p>
              </text:list-item>
              <text:list-item>
                <text:p text:style-name="P3"><text:span text:style-name="T2">Rencontres surtout le mercredi après-midi</text:span></text:p>
              </text:list-item>
              <text:list-item>
                <text:p text:style-name="P3"><text:span text:style-name="T2">Plus de 100 activités (collectives et individuelles)</text:span></text:p>
              </text:list-item>
              <text:list-item>
                <text:p text:style-name="P3"><text:span text:style-name="T2">Les élèves peuvent devenir « jeunes officiels » (arbitres, organisateurs)</text:span></text:p>
              </text:list-item>
            </text:list>
            <text:p text:style-name="P3"><text:span text:style-name="T4">(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Vrai ou faux (règlement)</text:span></text:p>
              </text:list-item>
              <text:list-item>
                <text:p text:style-name="P6"><text:span text:style-name="T2">Ex. 2 — Faire du / de la / de l’ / au</text:span></text:p>
              </text:list-item>
              <text:list-item>
                <text:p text:style-name="P6"><text:span text:style-name="T2">Ex. 3 — Relier les opinions</text:span></text:p>
              </text:list-item>
              <text:list-item>
                <text:p text:style-name="P6"><text:span text:style-name="T2">Ex. 4 — Compléter le dialogue d’inscription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Dialogue d’inscription (binôme, ~90 s)</text:span></text:p>
            <text:list text:style-name="L3">
              <text:list-item>
                <text:p text:style-name="P3"><text:span text:style-name="T2">A veut s’inscrire, B organise</text:span></text:p>
              </text:list-item>
              <text:list-item>
                <text:p text:style-name="P3"><text:span text:style-name="T2">A pose 4 questions + 1 opinion</text:span></text:p>
              </text:list-item>
              <text:list-item>
                <text:p text:style-name="P3"><text:span text:style-name="T2">B répond avec le règlement</text:span></text:p>
              </text:list-item>
            </text:list>
            <text:p text:style-name="P3"><text:span text:style-name="T2">Critères : tâche · langue · interaction · prononciat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dis mon sport avec </text:span><text:span text:style-name="T4">faire de</text:span></text:p>
              </text:list-item>
              <text:list-item>
                <text:p text:style-name="P6"><text:span text:style-name="T2">☐ </text:span><text:span text:style-name="T2">Je donne mon opinion</text:span></text:p>
              </text:list-item>
              <text:list-item>
                <text:p text:style-name="P6"><text:span text:style-name="T2">☐ </text:span><text:span text:style-name="T2">Je comprends un règlement court</text:span></text:p>
              </text:list-item>
              <text:list-item>
                <text:p text:style-name="P6"><text:span text:style-name="T2">☐ </text:span><text:span text:style-name="T2">Je mène un dialogue d’inscription</text:span></text:p>
              </text:list-item>
              <text:list-item>
                <text:p text:style-name="P6"><text:span text:style-name="T2">☐ </text:span><text:span text:style-name="T2">Je connais 8 mots du spor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(12 P.)</text:span></text:p>
              </text:list-item>
              <text:list-item>
                <text:p text:style-name="P6"><text:span text:style-name="T2">Tâche 2 — Dialogue oral (12 P.)</text:span></text:p>
              </text:list-item>
              <text:list-item>
                <text:p text:style-name="P6"><text:span text:style-name="T2">Tâche 3 — Expression écrite : mon équipe idéale (6 P.)</text:span></text:p>
              </text:list-item>
            </text:list>
            <text:p text:style-name="P3"><text:span text:style-name="T3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Union nationale du sport scolaire</text:span><text:span text:style-name="T2"> — Wikipédia (2026), CC BY-SA 4.0</text:span></text:p>
              </text:list-item>
              <text:list-item>
                <text:p text:style-name="P6"><text:span text:style-name="T2">https://fr.wikipedia.org/wiki/Union_nationale_du_sport_scolai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3:54</meta:creation-date>
    <dc:date>2026-07-21T15:33:54</dc:date>
    <meta:document-statistic meta:object-count="185"/>
    <meta:generator>LibreOffice/24.2.7.2$Linux_X86_64 LibreOffice_project/420$Build-2</meta:generator>
  </office:meta>
</office:document-meta>
</file>