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7 — Vacances en Bretagn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7 — Vacances en Bretagn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7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ituer la Bretagne et citer ses particularités</text:span></text:p>
              </text:list-item>
              <text:list-item>
                <text:p text:style-name="P6"><text:span text:style-name="T2">Comprendre un journal de vacances à l’écoute</text:span></text:p>
              </text:list-item>
              <text:list-item>
                <text:p text:style-name="P6"><text:span text:style-name="T2">Distinguer passé composé et imparfait</text:span></text:p>
              </text:list-item>
              <text:list-item>
                <text:p text:style-name="P6"><text:span text:style-name="T2">Rédiger un court journal de vacances (~120 mots)</text:span></text:p>
              </text:list-item>
              <text:list-item>
                <text:p text:style-name="P6"><text:span text:style-name="T2">Relire et corriger les temps du pass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 — le message de Léa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 — le message de Léa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On est arrivés à Concarneau. Il pleuvait ce matin, mais maintenant il fait beau. On a mangé des galettes au marché, c’était trop bon ! »</text:span></text:p>
            <text:p text:style-name="P3"><text:span text:style-name="T2">→ </text:span><text:span text:style-name="T2">Où est Léa ? Quel temps ? Qu’a-t-elle mangé ? Programme de demain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Bretagne : où en France ? (nord / sud / ouest)</text:span></text:p>
              </text:list-item>
              <text:list-item>
                <text:p text:style-name="P6"><text:span text:style-name="T2">Mots de la mer et des vacances</text:span></text:p>
              </text:list-item>
              <text:list-item>
                <text:p text:style-name="P6"><text:span text:style-name="T2">Crêpe ou galette : quelle différenc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côte · la marée</text:span></text:p>
              </text:list-item>
              <text:list-item>
                <text:p text:style-name="P6"><text:span text:style-name="T2">une crêpe (sucrée) · une galette (salée)</text:span></text:p>
              </text:list-item>
              <text:list-item>
                <text:p text:style-name="P6"><text:span text:style-name="T2">une crêperie</text:span></text:p>
              </text:list-item>
              <text:list-item>
                <text:p text:style-name="P6"><text:span text:style-name="T2">se promener · visiter</text:span></text:p>
              </text:list-item>
              <text:list-item>
                <text:p text:style-name="P6"><text:span text:style-name="T2">il faisait beau · avoir hâ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assé composé ou imparfait ?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assé composé ou imparfait ?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assé composé = action précise, terminée → « J’ai visité un phare. »</text:span></text:p>
              </text:list-item>
              <text:list-item>
                <text:p text:style-name="P6"><text:span text:style-name="T2">Imparfait = décor, description, habitude → « Il faisait beau. Chaque matin, on mangeait une crêpe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journal de No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journal de No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resqu’île de Crozon : ciel gris, vent fort, bateau vers une île, galette complète à midi, baignade l’après-midi, kouign-amann demai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Bretagne : extrême ouest, presqu’île, long littoral</text:span></text:p>
              </text:list-item>
              <text:list-item>
                <text:p text:style-name="P6"><text:span text:style-name="T2">Tradition celtique : breton (brezhoneg), gallo</text:span></text:p>
              </text:list-item>
              <text:list-item>
                <text:p text:style-name="P6"><text:span text:style-name="T2">Spécialités : crêpes, galettes, cidre, kouign-amann</text:span></text:p>
              </text:list-item>
              <text:list-item>
                <text:p text:style-name="P6"><text:span text:style-name="T2">Source : Wikipédia (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journal de Noé</text:span></text:p>
              </text:list-item>
              <text:list-item>
                <text:p text:style-name="P6"><text:span text:style-name="T2">Ex. 2 : passé composé / imparfait</text:span></text:p>
              </text:list-item>
              <text:list-item>
                <text:p text:style-name="P6"><text:span text:style-name="T2">Ex. 3 : crêpe, galette, cidre, kouign-amann</text:span></text:p>
              </text:list-item>
              <text:list-item>
                <text:p text:style-name="P6"><text:span text:style-name="T2">Ex. 4 : remettre un récit dans l’ordre</text:span></text:p>
              </text:list-item>
              <text:list-item>
                <text:p text:style-name="P6"><text:span text:style-name="T2">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Journal de vacances (3 jours, ~120 mots) - temps (imparfait) + activité (passé composé) - une spécialité + une anecdote - ≥ 5 passés composés · ≥ 3 imparfai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situe la Bretagne</text:span></text:p>
              </text:list-item>
              <text:list-item>
                <text:p text:style-name="P6"><text:span text:style-name="T2">Je comprends un journal à l’écoute</text:span></text:p>
              </text:list-item>
              <text:list-item>
                <text:p text:style-name="P6"><text:span text:style-name="T2">Je distingue passé composé / imparfait</text:span></text:p>
              </text:list-item>
              <text:list-item>
                <text:p text:style-name="P6"><text:span text:style-name="T2">Je cite 3 spécialités</text:span></text:p>
              </text:list-item>
              <text:list-item>
                <text:p text:style-name="P6"><text:span text:style-name="T2">Je rédige un journal clai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oin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oin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Hörverstehen : journal de Noé, 5 questions (10 pts)</text:span></text:p>
              </text:list-item>
              <text:list-item>
                <text:p text:style-name="P6"><text:span text:style-name="T2">Vocabulaire : 8 mots-clés (8 pts)</text:span></text:p>
              </text:list-item>
              <text:list-item>
                <text:p text:style-name="P6"><text:span text:style-name="T2">Expression écrite : journal ~120 mots (12 p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Bretagne — Wikipédia (CC BY-SA 4.0)</text:span></text:p>
              </text:list-item>
              <text:list-item>
                <text:p text:style-name="P6"><text:span text:style-name="T2">Cuisine bretonne — Wikipédia (CC BY-SA 4.0)</text:span></text:p>
              </text:list-item>
              <text:list-item>
                <text:p text:style-name="P6"><text:span text:style-name="T2">Breton (langue) — Wikipédia (CC BY-SA 4.0) Plateforme indépendante, sans affiliation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09:37</meta:creation-date>
    <dc:date>2026-07-21T16:09:37</dc:date>
    <meta:document-statistic meta:object-count="185"/>
    <meta:generator>LibreOffice/24.2.7.2$Linux_X86_64 LibreOffice_project/420$Build-2</meta:generator>
  </office:meta>
</office:document-meta>
</file>