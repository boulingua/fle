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acances en fami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acances en fami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7 · Parcours G+M · Classe 7 · Niveau M Raconter ses vacances au passé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aconter mes vacances au passé composé (1 min, en continu)</text:span></text:p>
              </text:list-item>
              <text:list-item>
                <text:p text:style-name="P6"><text:span text:style-name="T2">Nommer lieux, activités et météo</text:span></text:p>
              </text:list-item>
              <text:list-item>
                <text:p text:style-name="P6"><text:span text:style-name="T2">Décrire un voyage : départ, séjour, retour</text:span></text:p>
              </text:list-item>
              <text:list-item>
                <text:p text:style-name="P6"><text:span text:style-name="T2">Rédiger une carte postale claire</text:span></text:p>
              </text:list-item>
              <text:list-item>
                <text:p text:style-name="P6"><text:span text:style-name="T2">Relier mes idées : d’abord, ensuite, puis, enfi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rentrée, dans la cour. - Théo : Alors, tes vacances ? - Léa : Super ! Deux semaines à Nice, chez ma tante. - Léa : D’abord on s’est baignés, ensuite on a visité le vieux Nice. - Théo : Moi, je suis resté à la campagne. On a fait du vélo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ù es-tu parti·e l’été dernier ?</text:span></text:p>
              </text:list-item>
              <text:list-item>
                <text:p text:style-name="P6"><text:span text:style-name="T2">Mer, montagne, ville ou campagne ? Avec qui ?</text:span></text:p>
              </text:list-item>
              <text:list-item>
                <text:p text:style-name="P6"><text:span text:style-name="T2">Trois activités que tu aimes en vacances</text:span></text:p>
              </text:list-item>
              <text:list-item>
                <text:p text:style-name="P6"><text:span text:style-name="T2">Un souvenir en un mo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rtir en vacances · la mer / la plage</text:span></text:p>
              </text:list-item>
              <text:list-item>
                <text:p text:style-name="P6"><text:span text:style-name="T2">la montagne · la campagne</text:span></text:p>
              </text:list-item>
              <text:list-item>
                <text:p text:style-name="P6"><text:span text:style-name="T2">se baigner · faire une randonnée</text:span></text:p>
              </text:list-item>
              <text:list-item>
                <text:p text:style-name="P6"><text:span text:style-name="T2">visiter un musée · prendre le train</text:span></text:p>
              </text:list-item>
              <text:list-item>
                <text:p text:style-name="P6"><text:span text:style-name="T2">loger à l’hôtel / au camping · un souvenir</text:span></text:p>
              </text:list-item>
              <text:list-item>
                <text:p text:style-name="P6"><text:span text:style-name="T2">Météo : il fait chaud / beau ; il pleut ; il y a du solei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passé compos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passé compos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oir / être (présent) + participe passé</text:span></text:p>
              </text:list-item>
              <text:list-item>
                <text:p text:style-name="P6"><text:span text:style-name="T2">Déplacement + pronominaux → être : je suis allé·e, on s’est baignés</text:span></text:p>
              </text:list-item>
              <text:list-item>
                <text:p text:style-name="P6"><text:span text:style-name="T2">Avec être : accord (Léa est allée, mes parents sont partis)</text:span></text:p>
              </text:list-item>
              <text:list-item>
                <text:p text:style-name="P6"><text:span text:style-name="T2">Autres → avoir : j’ai visité, ils ont fait</text:span></text:p>
              </text:list-item>
              <text:list-item>
                <text:p text:style-name="P6"><text:span text:style-name="T2">Irréguliers : fait · vu · pris · l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logue — à la ga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alogue — à la ga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mère : Tu as pris ton billet ?</text:span></text:p>
              </text:list-item>
              <text:list-item>
                <text:p text:style-name="P6"><text:span text:style-name="T2">Sami : Oui ! Et j’ai gardé le ticket du téléphérique comme souvenir.</text:span></text:p>
              </text:list-item>
              <text:list-item>
                <text:p text:style-name="P6"><text:span text:style-name="T2">Sami : D’abord la mer, ensuite la montagne… On a bien profité.</text:span></text:p>
              </text:list-item>
              <text:list-item>
                <text:p text:style-name="P6"><text:span text:style-name="T2">Sami : Hier, on a marché six heures 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vacances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vacances en Franc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Grandes vacances » d’été : environ 8 semaines (juillet-août)</text:span></text:p>
              </text:list-item>
              <text:list-item>
                <text:p text:style-name="P6"><text:span text:style-name="T2">Trois zones (A, B, C) aux dates décalées pour l’hiver et le printemps</text:span></text:p>
              </text:list-item>
              <text:list-item>
                <text:p text:style-name="P6"><text:span text:style-name="T2">Objectif : étaler les départs et la fréquentation touristique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u dialogue</text:span></text:p>
              </text:list-item>
              <text:list-item>
                <text:p text:style-name="P6"><text:span text:style-name="T2">Ex. 2 : mer ou montagne ?</text:span></text:p>
              </text:list-item>
              <text:list-item>
                <text:p text:style-name="P6"><text:span text:style-name="T2">Ex. 3 : passé composé (avoir / être)</text:span></text:p>
              </text:list-item>
              <text:list-item>
                <text:p text:style-name="P6"><text:span text:style-name="T2">Ex. 4 : remettre l’histoire dans l’ordre + racont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fférenci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fférenci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G : auxiliaires fournis, souvenir en un mot</text:span></text:p>
              </text:list-item>
              <text:list-item>
                <text:p text:style-name="P6"><text:span text:style-name="T2">M : consigne standard</text:span></text:p>
              </text:list-item>
              <text:list-item>
                <text:p text:style-name="P6"><text:span text:style-name="T2">E : 4 activités + une opinion, viser 90 secondes en contin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aconte tes vacances (~1 min, en continu) - Où, avec qui, 3 activités, météo, souvenir préféré - Connecteurs : d’abord, ensuite, puis, enfin - Évalué : contenu /5 · passé composé /4 · fluidité /3 · prononciation /3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lieux, activités, météo</text:span></text:p>
              </text:list-item>
              <text:list-item>
                <text:p text:style-name="P6"><text:span text:style-name="T2">Je raconte au passé composé (bon auxiliaire)</text:span></text:p>
              </text:list-item>
              <text:list-item>
                <text:p text:style-name="P6"><text:span text:style-name="T2">Je parle en continu 1 minute</text:span></text:p>
              </text:list-item>
              <text:list-item>
                <text:p text:style-name="P6"><text:span text:style-name="T2">J’utilise les connecteurs</text:span></text:p>
              </text:list-item>
              <text:list-item>
                <text:p text:style-name="P6"><text:span text:style-name="T2">Je rédige une carte postale clai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1 Compréhension écrite (8 P.)</text:span></text:p>
              </text:list-item>
              <text:list-item>
                <text:p text:style-name="P6"><text:span text:style-name="T2">T2 Grammaire — passé composé (8 P.)</text:span></text:p>
              </text:list-item>
              <text:list-item>
                <text:p text:style-name="P6"><text:span text:style-name="T2">T3 Expression écrite : carte postale ~80 mots (12 P.)</text:span></text:p>
              </text:list-item>
              <text:list-item>
                <text:p text:style-name="P6"><text:span text:style-name="T2">T4 Expression orale : 1 min en continu (12 P.)</text:span></text:p>
              </text:list-item>
              <text:list-item>
                <text:p text:style-name="P6"><text:span text:style-name="T2">Total : 4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èges à évit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ièges à évit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rtir EN vacances (pas « aller en »)</text:span></text:p>
              </text:list-item>
              <text:list-item>
                <text:p text:style-name="P6"><text:span text:style-name="T2">Météo impersonnelle : il fait chaud</text:span></text:p>
              </text:list-item>
              <text:list-item>
                <text:p text:style-name="P6"><text:span text:style-name="T2">Accord du participe avec êt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4:10</meta:creation-date>
    <dc:date>2026-07-21T15:44:10</dc:date>
    <meta:document-statistic meta:object-count="189"/>
    <meta:generator>LibreOffice/24.2.7.2$Linux_X86_64 LibreOffice_project/420$Build-2</meta:generator>
  </office:meta>
</office:document-meta>
</file>