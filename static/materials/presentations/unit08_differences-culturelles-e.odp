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8 — Différences culturelles franco-allemand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8 — Différences culturelles franco-allemand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9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résenter oralement 5–6 différences culturelles FR/DE</text:span></text:p>
              </text:list-item>
              <text:list-item>
                <text:p text:style-name="P6"><text:span text:style-name="T2">Nuancer avec des quantifieurs</text:span></text:p>
              </text:list-item>
              <text:list-item>
                <text:p text:style-name="P6"><text:span text:style-name="T2">Médier une courte phrase allemand → français</text:span></text:p>
              </text:list-item>
              <text:list-item>
                <text:p text:style-name="P6"><text:span text:style-name="T2">Comparer sans juger</text:span></text:p>
              </text:list-item>
              <text:list-item>
                <text:p text:style-name="P6"><text:span text:style-name="T2">Distinguer stéréotype et fait vérifiab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ehdi arrive de Tunis chez Anouk (famille franco-allemande).</text:span></text:p>
            <text:p text:style-name="P3"><text:span text:style-name="T2">— </text:span><text:span text:style-name="T2">On mange déjà ? Il est dix-neuf heures ! — Chez nous, on dîne tôt. Mais à Lyon, plutôt vers vingt heures. — Pourquoi deux bises à ta voisine, mais une poignée de main à ton correspondant ? — Ça dépend du pays… et même de la rég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e différence entre deux pays qui vous a surpris·e ?</text:span></text:p>
              </text:list-item>
              <text:list-item>
                <text:p text:style-name="P6"><text:span text:style-name="T2">Vrai ou faux : « La plupart des magasins allemands ferment le dimanche » ?</text:span></text:p>
              </text:list-item>
              <text:list-item>
                <text:p text:style-name="P6"><text:span text:style-name="T2">Un stéréotype sur la France ou l’Allemagne : toujours vrai ?</text:span></text:p>
              </text:list-item>
            </text:list>
            <text:p text:style-name="P3"><text:span text:style-name="T2">Comparer sans juger : décrire, puis nuancer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dîner / le repas du soir — das Abendessen</text:span></text:p>
              </text:list-item>
              <text:list-item>
                <text:p text:style-name="P6"><text:span text:style-name="T2">une coutume, une habitude — ein Brauch</text:span></text:p>
              </text:list-item>
              <text:list-item>
                <text:p text:style-name="P6"><text:span text:style-name="T2">faire la bise / serrer la main — die Hand geben</text:span></text:p>
              </text:list-item>
              <text:list-item>
                <text:p text:style-name="P6"><text:span text:style-name="T2">tutoiement / vouvoiement — Duzen / Siezen</text:span></text:p>
              </text:list-item>
              <text:list-item>
                <text:p text:style-name="P6"><text:span text:style-name="T2">la cantine — die Mensa</text:span></text:p>
              </text:list-item>
              <text:list-item>
                <text:p text:style-name="P6"><text:span text:style-name="T2">le repos dominical — die Sonntagsruhe</text:span></text:p>
              </text:list-item>
              <text:list-item>
                <text:p text:style-name="P6"><text:span text:style-name="T2">en revanche / au contraire — dageg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uanc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uanc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rtain·e·s → minorité</text:span></text:p>
              </text:list-item>
              <text:list-item>
                <text:p text:style-name="P6"><text:span text:style-name="T2">beaucoup de → ≈ la moitié</text:span></text:p>
              </text:list-item>
              <text:list-item>
                <text:p text:style-name="P6"><text:span text:style-name="T2">la plupart des → large majorité</text:span></text:p>
              </text:list-item>
              <text:list-item>
                <text:p text:style-name="P6"><text:span text:style-name="T2">presque tous·tes → quasi tout le monde</text:span></text:p>
              </text:list-item>
              <text:list-item>
                <text:p text:style-name="P6"><text:span text:style-name="T2">tous·tes les → totalité</text:span></text:p>
              </text:list-item>
            </text:list>
            <text:p text:style-name="P3"><text:span text:style-name="T2">Accord : la plupart des familles </text:span><text:span text:style-name="T3">dînent</text:span><text:span text:style-name="T2"> ; </text:span><text:span text:style-name="T3">toutes</text:span><text:span text:style-name="T2"> les région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a bise : de une à quatre selon la région ; pas de règle unique. (d’après </text:span><text:span text:style-name="T4">Bise (salutation)</text:span><text:span text:style-name="T2">, Wikipédia, CC BY-SA)</text:span></text:p>
            <text:p text:style-name="P3"><text:span text:style-name="T2">Le repos dominical : encadré par la loi (</text:span><text:span text:style-name="T4">Ladenschlussgesetz</text:span><text:span text:style-name="T2">) ; magasins fermés, quelques exceptions. (d’après </text:span><text:span text:style-name="T4">Ladenschlussgesetz</text:span><text:span text:style-name="T2">, Wikipedia, CC BY-SA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texte</text:span></text:p>
              </text:list-item>
              <text:list-item>
                <text:p text:style-name="P6"><text:span text:style-name="T2">Ex. 2 — Modalisation (proportions → quantifieurs)</text:span></text:p>
              </text:list-item>
              <text:list-item>
                <text:p text:style-name="P6"><text:span text:style-name="T2">Ex. 3 — Médiation allemand → français</text:span></text:p>
              </text:list-item>
              <text:list-item>
                <text:p text:style-name="P6"><text:span text:style-name="T2">Ex. 4 — Connecteurs de comparaison</text:span></text:p>
              </text:list-item>
            </text:list>
            <text:p text:style-name="P3"><text:span text:style-name="T2">Différenciation : (G) Ex. 1 et 4 · (M) Ex. 1–3 · (E) tout + médiation bonu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Mon guide interculturel » (~2 min à l’oral)</text:span></text:p>
            <text:list text:style-name="L3">
              <text:list-item>
                <text:p text:style-name="P3"><text:span text:style-name="T2">5 à 6 différences FR/DE</text:span></text:p>
              </text:list-item>
              <text:list-item>
                <text:p text:style-name="P3"><text:span text:style-name="T2">au moins 4 quantifieurs</text:span></text:p>
              </text:list-item>
              <text:list-item>
                <text:p text:style-name="P3"><text:span text:style-name="T2">2 connecteurs de comparaison</text:span></text:p>
              </text:list-item>
              <text:list-item>
                <text:p text:style-name="P3"><text:span text:style-name="T2">un conseil final</text:span></text:p>
              </text:list-item>
            </text:list>
            <text:p text:style-name="P3"><text:span text:style-name="T2">Critères : contenu · nuance · comparaison · fluidité · attitud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présente 5–6 différences</text:span></text:p>
              </text:list-item>
              <text:list-item>
                <text:p text:style-name="P6"><text:span text:style-name="T2">J’emploie 4 quantifieurs</text:span></text:p>
              </text:list-item>
              <text:list-item>
                <text:p text:style-name="P6"><text:span text:style-name="T2">J’utilise des connecteurs de comparaison</text:span></text:p>
              </text:list-item>
              <text:list-item>
                <text:p text:style-name="P6"><text:span text:style-name="T2">Je médie une phrase DE → FR</text:span></text:p>
              </text:list-item>
              <text:list-item>
                <text:p text:style-name="P6"><text:span text:style-name="T2">Je décris sans jug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Tâche 1 — Monologue (16 pts) : 3 indications en allemand → exposé ~2 min</text:span></text:p>
            <text:p text:style-name="P3"><text:span text:style-name="T2">Tâche 2 — Médiation DE → FR (14 pts) : 3 phrases</text:span></text:p>
            <text:p text:style-name="P3"><text:span text:style-name="T2">Total : 30 poi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Bise (salutation)</text:span><text:span text:style-name="T2"> — Wikipédia, CC BY-SA</text:span></text:p>
              </text:list-item>
              <text:list-item>
                <text:p text:style-name="P6"><text:span text:style-name="T4">Ladenschlussgesetz</text:span><text:span text:style-name="T2"> — Wikipedia, CC BY-SA</text:span></text:p>
              </text:list-item>
              <text:list-item>
                <text:p text:style-name="P6"><text:span text:style-name="T2">OFAJ / DFJW — ofaj.org (pour aller plus loin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24</meta:creation-date>
    <dc:date>2026-07-21T16:16:24</dc:date>
    <meta:document-statistic meta:object-count="181"/>
    <meta:generator>LibreOffice/24.2.7.2$Linux_X86_64 LibreOffice_project/420$Build-2</meta:generator>
  </office:meta>
</office:document-meta>
</file>