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Gender et littérature contemporai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Gender et littérature contemporai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our et Basile préparent un exposé « genre et littérature ».</text:span></text:p>
            <text:list text:style-name="L3">
              <text:list-item>
                <text:p text:style-name="P3"><text:span text:style-name="T2">Nour hésite à recopier des romans récents (autrices vivantes).</text:span></text:p>
              </text:list-item>
              <text:list-item>
                <text:p text:style-name="P3"><text:span text:style-name="T2">Basile : on décrit, on résume, on renvoie au livre.</text:span></text:p>
              </text:list-item>
              <text:list-item>
                <text:p text:style-name="P3"><text:span text:style-name="T2">Pour citer entre guillemets → un texte du domaine public.</text:span></text:p>
              </text:list-item>
            </text:list>
            <text:p text:style-name="P3"><text:span text:style-name="T3">Citer les ancien·ne·s, paraphraser les contemporain·e·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argumentatif sur le genre.</text:span></text:p>
              </text:list-item>
              <text:list-item>
                <text:p text:style-name="P6"><text:span text:style-name="T2">Nommer des autrices/auteurs francophones du genre.</text:span></text:p>
              </text:list-item>
              <text:list-item>
                <text:p text:style-name="P6"><text:span text:style-name="T2">Employer le vocabulaire des études de genre.</text:span></text:p>
              </text:list-item>
              <text:list-item>
                <text:p text:style-name="P6"><text:span text:style-name="T2">Dialoguer : opinion nuancée, concession, réfutation.</text:span></text:p>
              </text:list-item>
              <text:list-item>
                <text:p text:style-name="P6"><text:span text:style-name="T2">Distinguer domaine public et œuvre protégé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Genre</text:span><text:span text:style-name="T2"> : grammatical ou social ?</text:span></text:p>
              </text:list-item>
              <text:list-item>
                <text:p text:style-name="P6"><text:span text:style-name="T2">Une autrice / un auteur qui écrit sur l’identité ?</text:span></text:p>
              </text:list-item>
              <text:list-item>
                <text:p text:style-name="P6"><text:span text:style-name="T2">Traduire </text:span><text:span text:style-name="T4">gender studies</text:span><text:span text:style-name="T2"> en français.</text:span></text:p>
              </text:list-item>
              <text:list-item>
                <text:p text:style-name="P6"><text:span text:style-name="T2">Qu’est-ce qu’un stéréotype de gen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genre (social), les études de genre</text:span></text:p>
              </text:list-item>
              <text:list-item>
                <text:p text:style-name="P6"><text:span text:style-name="T2">un stéréotype, l’identité</text:span></text:p>
              </text:list-item>
              <text:list-item>
                <text:p text:style-name="P6"><text:span text:style-name="T2">l’intersectionnalité</text:span></text:p>
              </text:list-item>
              <text:list-item>
                <text:p text:style-name="P6"><text:span text:style-name="T2">l’écriture inclusive, le point médian</text:span></text:p>
              </text:list-item>
              <text:list-item>
                <text:p text:style-name="P6"><text:span text:style-name="T2">remettre en question</text:span></text:p>
              </text:list-item>
              <text:list-item>
                <text:p text:style-name="P6"><text:span text:style-name="T2">le domain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opinion, nuance, concess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opinion, nuance, concess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pinion :</text:span><text:span text:style-name="T2"> </text:span><text:span text:style-name="T4">Il me semble que…</text:span><text:span text:style-name="T2">, </text:span><text:span text:style-name="T4">Je suis convaincu·e que…</text:span></text:p>
              </text:list-item>
              <text:list-item>
                <text:p text:style-name="P6"><text:span text:style-name="T3">Nuance :</text:span><text:span text:style-name="T2"> </text:span><text:span text:style-name="T4">dans une certaine mesure</text:span><text:span text:style-name="T2">, </text:span><text:span text:style-name="T4">cela dépend de…</text:span></text:p>
              </text:list-item>
              <text:list-item>
                <text:p text:style-name="P6"><text:span text:style-name="T3">Concession :</text:span><text:span text:style-name="T2"> </text:span><text:span text:style-name="T4">Certes… mais…</text:span><text:span text:style-name="T2">, </text:span><text:span text:style-name="T4">Bien que + subjonctif</text:span></text:p>
              </text:list-item>
              <text:list-item>
                <text:p text:style-name="P6"><text:span text:style-name="T3">Réfutation :</text:span><text:span text:style-name="T2"> </text:span><text:span text:style-name="T4">Au contraire…</text:span><text:span text:style-name="T2">, </text:span><text:span text:style-name="T4">Je ne partage pas cet avis</text:span></text:p>
              </text:list-item>
            </text:list>
            <text:p text:style-name="P3"><text:span text:style-name="T2">Concéder d’abord rend la réfutation plus for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crire le genre, hier…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crire le genre, hier…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lympe de Gouges (1791) :</text:span><text:span text:style-name="T2"> « La femme naît libre et demeure égale à l’homme en droits. »</text:span></text:p>
              </text:list-item>
              <text:list-item>
                <text:p text:style-name="P6"><text:span text:style-name="T3">George Sand :</text:span><text:span text:style-name="T2"> prénom d’homme, pantalon → geste politique.</text:span></text:p>
              </text:list-item>
              <text:list-item>
                <text:p text:style-name="P6"><text:span text:style-name="T3">Colette :</text:span><text:span text:style-name="T2"> le désir et les rôles imposés.</text:span></text:p>
              </text:list-item>
            </text:list>
            <text:p text:style-name="P3"><text:span text:style-name="T2">→ </text:span><text:span text:style-name="T2">Domaine public : citation permis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et aujourd’hu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… </text:span><text:span text:style-name="T1">et aujourd’hu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spentes, Kerangal, Édouard Louis, Bouraoui.</text:span></text:p>
              </text:list-item>
              <text:list-item>
                <text:p text:style-name="P6"><text:span text:style-name="T2">Œuvres protégées → </text:span><text:span text:style-name="T3">on ne cite pas mot pour mot</text:span><text:span text:style-name="T2">.</text:span></text:p>
              </text:list-item>
              <text:list-item>
                <text:p text:style-name="P6"><text:span text:style-name="T2">On lit, résume, discute, renvoie au livre.</text:span></text:p>
              </text:list-item>
            </text:list>
            <text:p text:style-name="P3"><text:span text:style-name="T2">S’approprier ≠ rendre compte honnêtemen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(Wikipédia, CC BY-SA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(Wikipédia, CC BY-SA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Études de genre</text:span><text:span text:style-name="T2"> : le genre comme construction sociale, distincte du sexe biologique.</text:span></text:p>
              </text:list-item>
              <text:list-item>
                <text:p text:style-name="P6"><text:span text:style-name="T3">Intersectionnalité</text:span><text:span text:style-name="T2"> : K. Crenshaw, 1989 — discriminations cumulées.</text:span></text:p>
              </text:list-item>
              <text:list-item>
                <text:p text:style-name="P6"><text:span text:style-name="T3">Écriture inclusive</text:span><text:span text:style-name="T2"> : doublets, point médian, termes épicènes — usage débattu, non obligatoir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(texte).</text:span></text:p>
              </text:list-item>
              <text:list-item>
                <text:p text:style-name="P6"><text:span text:style-name="T2">Ex. 2 — Vocabulaire à compléter.</text:span></text:p>
              </text:list-item>
              <text:list-item>
                <text:p text:style-name="P6"><text:span text:style-name="T2">Ex. 3 — Écriture inclusive.</text:span></text:p>
              </text:list-item>
              <text:list-item>
                <text:p text:style-name="P6"><text:span text:style-name="T2">Ex. 4 — Concéder / réfuter / nuancer.</text:span></text:p>
              </text:list-item>
            </text:list>
            <text:p text:style-name="P3"><text:span text:style-name="T2">Différenciation G / M / 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15 répliques) :</text:span></text:p>
            <text:list text:style-name="L3">
              <text:list-item>
                <text:p text:style-name="P3"><text:span text:style-name="T2">4 termes du tableau</text:span></text:p>
              </text:list-item>
              <text:list-item>
                <text:p text:style-name="P3"><text:span text:style-name="T2">1 citation du domaine public attribuée</text:span></text:p>
              </text:list-item>
              <text:list-item>
                <text:p text:style-name="P3"><text:span text:style-name="T2">1 référence contemporaine sans citation</text:span></text:p>
              </text:list-item>
              <text:list-item>
                <text:p text:style-name="P3"><text:span text:style-name="T2">1 concession + 1 réfutation</text:span></text:p>
              </text:list-item>
            </text:list>
            <text:p text:style-name="P3"><text:span text:style-name="T2">Barème sur 20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 &amp; 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 &amp; 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hèse et arguments ? Citer / résumer / paraphraser ?</text:span></text:p>
              </text:list-item>
              <text:list-item>
                <text:p text:style-name="P6"><text:span text:style-name="T2">Qui citer, qui référencer ?</text:span></text:p>
              </text:list-item>
              <text:list-item>
                <text:p text:style-name="P6"><text:span text:style-name="T3">Évaluation :</text:span><text:span text:style-name="T2"> Compréhension écrite (12 P.) + Interaction orale (18 P.) =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tudes de genre — Wikipédia, CC BY-SA</text:span></text:p>
              </text:list-item>
              <text:list-item>
                <text:p text:style-name="P6"><text:span text:style-name="T2">Écriture inclusive — Wikipédia, CC BY-SA</text:span></text:p>
              </text:list-item>
              <text:list-item>
                <text:p text:style-name="P6"><text:span text:style-name="T2">Intersectionnalité — Wikipédia, CC BY-SA</text:span></text:p>
              </text:list-item>
              <text:list-item>
                <text:p text:style-name="P6"><text:span text:style-name="T2">Déclaration des droits de la femme — O. de Gouges (1791), domaine public</text:span></text:p>
              </text:list-item>
              <text:list-item>
                <text:p text:style-name="P6"><text:span text:style-name="T2">George Sand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20</meta:creation-date>
    <dc:date>2026-07-21T16:30:20</dc:date>
    <meta:document-statistic meta:object-count="185"/>
    <meta:generator>LibreOffice/24.2.7.2$Linux_X86_64 LibreOffice_project/420$Build-2</meta:generator>
  </office:meta>
</office:document-meta>
</file>