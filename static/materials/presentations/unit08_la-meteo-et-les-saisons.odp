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La météo et les sais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La météo et les sais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les 4 saisons</text:span></text:p>
              </text:list-item>
              <text:list-item>
                <text:p text:style-name="P6"><text:span text:style-name="T2">Décrire le temps : </text:span><text:span text:style-name="T3">il fait…</text:span><text:span text:style-name="T2">, </text:span><text:span text:style-name="T3">il y a…</text:span><text:span text:style-name="T2">, </text:span><text:span text:style-name="T3">il pleut / il neige</text:span></text:p>
              </text:list-item>
              <text:list-item>
                <text:p text:style-name="P6"><text:span text:style-name="T2">Comprendre un court bulletin météo</text:span></text:p>
              </text:list-item>
              <text:list-item>
                <text:p text:style-name="P6"><text:span text:style-name="T2">Poser la question </text:span><text:span text:style-name="T3">« Quel temps fait-il ? »</text:span></text:p>
              </text:list-item>
              <text:list-item>
                <text:p text:style-name="P6"><text:span text:style-name="T2">Présenter la météo de 2 ou 3 vil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radio de Mme Renault : </text:span><text:span text:style-name="T3">« Ce matin, à Paris, il fait frais, huit degrés. Cet après-midi, du soleil. À Strasbourg, il pleuvra ce soir. »</text:span><text:span text:style-name="T2"> Léa : </text:span><text:span text:style-name="T3">« Mamie habite là-bas ! »</text:span><text:span text:style-name="T2"> → Quel temps à Paris ? Où va-t-il pleuvoi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temps fait-il aujourd’hui ?</text:span></text:p>
              </text:list-item>
              <text:list-item>
                <text:p text:style-name="P6"><text:span text:style-name="T2">Quelle est votre saison préférée ?</text:span></text:p>
              </text:list-item>
              <text:list-item>
                <text:p text:style-name="P6"><text:span text:style-name="T2">Trois mots météo que vous connaissez déjà</text:span></text:p>
              </text:list-item>
              <text:list-item>
                <text:p text:style-name="P6"><text:span text:style-name="T2">Regardez par la fenêtre : soleil, nuages, plui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4 sais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4 sais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printemps (Frühling)</text:span></text:p>
              </text:list-item>
              <text:list-item>
                <text:p text:style-name="P6"><text:span text:style-name="T2">l’été (Sommer)</text:span></text:p>
              </text:list-item>
              <text:list-item>
                <text:p text:style-name="P6"><text:span text:style-name="T2">l’automne (Herbst)</text:span></text:p>
              </text:list-item>
              <text:list-item>
                <text:p text:style-name="P6"><text:span text:style-name="T2">l’hiver (Winter) → </text:span><text:span text:style-name="T3">au printemps · en été · en automne · en hiv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a météo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a météo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l fait beau / chaud / froid.</text:span></text:p>
              </text:list-item>
              <text:list-item>
                <text:p text:style-name="P6"><text:span text:style-name="T2">Il y a du soleil / du vent / des nuages.</text:span></text:p>
              </text:list-item>
              <text:list-item>
                <text:p text:style-name="P6"><text:span text:style-name="T2">Il pleut. · Il neige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Il fait + adjectif</text:span><text:span text:style-name="T2"> → </text:span><text:span text:style-name="T3">Il fait beau.</text:span></text:p>
              </text:list-item>
              <text:list-item>
                <text:p text:style-name="P6"><text:span text:style-name="T4">Il y a + nom</text:span><text:span text:style-name="T2"> → </text:span><text:span text:style-name="T3">Il y a du vent.</text:span></text:p>
              </text:list-item>
              <text:list-item>
                <text:p text:style-name="P6"><text:span text:style-name="T4">Il + verbe</text:span><text:span text:style-name="T2"> → </text:span><text:span text:style-name="T3">Il pleut. Il neige.</text:span><text:span text:style-name="T2"> Le « il » est impersonnel (comme </text:span><text:span text:style-name="T3">il est huit heure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tit bulletin météo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etit bulletin météo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Demain : à Paris, du soleil, 18°. À Strasbourg, il pleuvra, 16°. À Marseille, il fera chaud, 28°. À Lille, du vent et des nuag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s clima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s clima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uest : climat </text:span><text:span text:style-name="T4">océanique</text:span><text:span text:style-name="T2"> (doux, pluvieux)</text:span></text:p>
              </text:list-item>
              <text:list-item>
                <text:p text:style-name="P6"><text:span text:style-name="T2">Sud : climat </text:span><text:span text:style-name="T4">méditerranéen</text:span><text:span text:style-name="T2"> (étés chauds et secs)</text:span></text:p>
              </text:list-item>
              <text:list-item>
                <text:p text:style-name="P6"><text:span text:style-name="T2">Le même jour : 28° à Marseille, pluie à Lille !</text:span></text:p>
              </text:list-item>
              <text:list-item>
                <text:p text:style-name="P6"><text:span text:style-name="T2">Saisons météo (1er du mois) ≠ saisons astronomiques (équinoxes/solstices) </text:span><text:span text:style-name="T3">(D’après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Quelle saison ?</text:span></text:p>
              </text:list-item>
              <text:list-item>
                <text:p text:style-name="P6"><text:span text:style-name="T2">Ex. 2 — Compréhension du bulletin</text:span></text:p>
              </text:list-item>
              <text:list-item>
                <text:p text:style-name="P6"><text:span text:style-name="T2">Ex. 3 — Compléter (</text:span><text:span text:style-name="T3">il fait / il y a / il pleut</text:span><text:span text:style-name="T2">)</text:span></text:p>
              </text:list-item>
              <text:list-item>
                <text:p text:style-name="P6"><text:span text:style-name="T2">Ex. 4 — Saison ↔ mois 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résentateur météo à la télé — </text:span><text:span text:style-name="T4">3 villes</text:span><text:span text:style-name="T2"> avec temps + température </text:span><text:span text:style-name="T3">« À Berlin, du soleil, 20°. À Munich, il pleut, 14°. À Hambourg, du vent, 17°. »</text:span><text:span text:style-name="T2"> Critères : contenu · langue · aisanc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les 4 saisons + les mois</text:span></text:p>
              </text:list-item>
              <text:list-item>
                <text:p text:style-name="P6"><text:span text:style-name="T2">Je connais 6 expressions météo</text:span></text:p>
              </text:list-item>
              <text:list-item>
                <text:p text:style-name="P6"><text:span text:style-name="T2">Je choisis </text:span><text:span text:style-name="T3">il fait / il y a / il pleut</text:span></text:p>
              </text:list-item>
              <text:list-item>
                <text:p text:style-name="P6"><text:span text:style-name="T2">Je comprends un bulletin lu à voix haute</text:span></text:p>
              </text:list-item>
              <text:list-item>
                <text:p text:style-name="P6"><text:span text:style-name="T2">Je présente la météo de 3 vil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orale (12 P.)</text:span></text:p>
              </text:list-item>
              <text:list-item>
                <text:p text:style-name="P6"><text:span text:style-name="T2">Tâche 2 — Saisons et lexique (8 P.)</text:span></text:p>
              </text:list-item>
              <text:list-item>
                <text:p text:style-name="P6"><text:span text:style-name="T2">Tâche 3 — Expression écrite, 3 villes (10 P.) </text:span><text:span text:style-name="T4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Climat de la France</text:span><text:span text:style-name="T2"> — Wikipédia, CC BY-SA</text:span></text:p>
              </text:list-item>
              <text:list-item>
                <text:p text:style-name="P6"><text:span text:style-name="T3">Climat océanique</text:span><text:span text:style-name="T2"> — Wikipédia, CC BY-SA</text:span></text:p>
              </text:list-item>
              <text:list-item>
                <text:p text:style-name="P6"><text:span text:style-name="T3">Climat méditerranéen</text:span><text:span text:style-name="T2"> — Wikipédia, CC BY-SA</text:span></text:p>
              </text:list-item>
              <text:list-item>
                <text:p text:style-name="P6"><text:span text:style-name="T3">Équinoxe</text:span><text:span text:style-name="T2"> — Wikipédia, CC BY-SA</text:span></text:p>
              </text:list-item>
              <text:list-item>
                <text:p text:style-name="P6"><text:span text:style-name="T2">Bulletins et dialogues : textes originau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01</meta:creation-date>
    <dc:date>2026-07-21T15:08:01</dc:date>
    <meta:document-statistic meta:object-count="189"/>
    <meta:generator>LibreOffice/24.2.7.2$Linux_X86_64 LibreOffice_project/420$Build-2</meta:generator>
  </office:meta>
</office:document-meta>
</file>