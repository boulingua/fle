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 Québec — un autre frança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e Québec — un autre frança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7 · Niveau E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Situer le Québec dans le monde francophone</text:span></text:p>
              </text:list-item>
              <text:list-item>
                <text:p text:style-name="P6"><text:span text:style-name="T2">Reconnaître et traduire 8 québécismes</text:span></text:p>
              </text:list-item>
              <text:list-item>
                <text:p text:style-name="P6"><text:span text:style-name="T2">Comprendre l’essentiel d’un texte authentique simple</text:span></text:p>
              </text:list-item>
              <text:list-item>
                <text:p text:style-name="P6"><text:span text:style-name="T2">Comparer français du Québec et français de France</text:span></text:p>
              </text:list-item>
              <text:list-item>
                <text:p text:style-name="P6"><text:span text:style-name="T2">Rédiger une réponse (~120 mot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(Montréal) écrit à Anouk (Karlsruhe) : « J’ai </text:span><text:span text:style-name="T3">déjeuné</text:span><text:span text:style-name="T2"> vite, je suis partie </text:span><text:span text:style-name="T3">magasiner</text:span><text:span text:style-name="T2"> avec mon </text:span><text:span text:style-name="T3">chum</text:span><text:span text:style-name="T2">, ce soir on </text:span><text:span text:style-name="T3">soupe</text:span><text:span text:style-name="T2"> chez ma grand-mère. » → Quels mots ne correspondent pas au français appri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e savez-vous du Québec ?</text:span></text:p>
              </text:list-item>
              <text:list-item>
                <text:p text:style-name="P6"><text:span text:style-name="T2">Où le placez-vous sur la carte francophone ?</text:span></text:p>
              </text:list-item>
              <text:list-item>
                <text:p text:style-name="P6"><text:span text:style-name="T2">Poutine, sirop d’érable, hockey, érable : ça vous parle ?</text:span></text:p>
              </text:list-item>
              <text:list-item>
                <text:p text:style-name="P6"><text:span text:style-name="T2">Le français du Québec = le français de Franc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5" draw:style-name="gr2" draw:layer="layout" svg:width="22.859cm" svg:height="6.679cm" svg:x="1.27cm" svg:y="3.3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Québec</text:span></text:p>
              </table:table-cell>
              <table:table-cell>
                <text:p text:style-name="P7"><text:span text:style-name="T4">Fra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déjeuner / dîner / souper</text:span></text:p>
              </table:table-cell>
              <table:table-cell>
                <text:p text:style-name="P7"><text:span text:style-name="T5">petit-déj. / déjeuner / dîne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un char</text:span></text:p>
              </table:table-cell>
              <table:table-cell>
                <text:p text:style-name="P7"><text:span text:style-name="T5">une voitur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un chum / une blonde</text:span></text:p>
              </table:table-cell>
              <table:table-cell>
                <text:p text:style-name="P7"><text:span text:style-name="T5">un copain / une copin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magasiner</text:span></text:p>
              </table:table-cell>
              <table:table-cell>
                <text:p text:style-name="P7"><text:span text:style-name="T5">faire les magasin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un dépanneur</text:span></text:p>
              </table:table-cell>
              <table:table-cell>
                <text:p text:style-name="P7"><text:span text:style-name="T5">épicerie de quartie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une tuque</text:span></text:p>
              </table:table-cell>
              <table:table-cell>
                <text:p text:style-name="P7"><text:span text:style-name="T5">un bonne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la fin de semaine</text:span></text:p>
              </table:table-cell>
              <table:table-cell>
                <text:p text:style-name="P7"><text:span text:style-name="T5">le week-e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es repa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es repa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ttention, tout est décalé ! - Québec : déjeuner (matin) → dîner (midi) → souper (soir) - France : petit-déjeuner → déjeuner → dîner Astuce : repérer d’abord le moment de la journé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lettre d’Inè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 lettre d’Inè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Automne, érables rouges, tuque, souper chez la grand-mère (poutine + sirop d’érable), chum Antoine, hockey, magasiner, dépanneur, match des Canadiens de Montréal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ébec : plus grande province du Canada, français langue officielle (Charte de 1977)</text:span></text:p>
              </text:list-item>
              <text:list-item>
                <text:p text:style-name="P6"><text:span text:style-name="T2">1534 : Jacques Cartier aborde la Gaspé et prend possession au nom de la France</text:span></text:p>
              </text:list-item>
              <text:list-item>
                <text:p text:style-name="P6"><text:span text:style-name="T2">Capitale : ville de Québec · Plus grande ville : Montréal</text:span></text:p>
              </text:list-item>
              <text:list-item>
                <text:p text:style-name="P6"><text:span text:style-name="T2">Poutine : frites + fromage en grains + sauce brune (Québec rural, fin des années 1950)</text:span></text:p>
              </text:list-item>
              <text:list-item>
                <text:p text:style-name="P6"><text:span text:style-name="T2">Sirop d’érable : le Québec, 1er producteur mondial </text:span><text:span text:style-name="T3">(Sources : Wikipédia, CC BY-SA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compréhension de la lettre (5 questions)</text:span></text:p>
              </text:list-item>
              <text:list-item>
                <text:p text:style-name="P6"><text:span text:style-name="T2">Ex. 2 : Québec → France (6 mots)</text:span></text:p>
              </text:list-item>
              <text:list-item>
                <text:p text:style-name="P6"><text:span text:style-name="T2">Ex. 3 : vrai / faux à corriger</text:span></text:p>
              </text:list-item>
              <text:list-item>
                <text:p text:style-name="P6"><text:span text:style-name="T2">Ex. 4 : compléter avec un québécisme → Correction avec la fiche Solut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 (~120 mo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 (~120 mo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ponse à Inès : - votre saison à Karlsruhe - ce que vous mangez - votre fin de semaine - 3 québécismes entre guillemets + 1 question Barème : consigne 4 · lexique 3 · cohérence 3 · langue 3 · format 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situe le Québec</text:span></text:p>
              </text:list-item>
              <text:list-item>
                <text:p text:style-name="P6"><text:span text:style-name="T2">Je connais 8 québécismes</text:span></text:p>
              </text:list-item>
              <text:list-item>
                <text:p text:style-name="P6"><text:span text:style-name="T2">Les repas sont décalés</text:span></text:p>
              </text:list-item>
              <text:list-item>
                <text:p text:style-name="P6"><text:span text:style-name="T2">Je comprends une lettre québécoise</text:span></text:p>
              </text:list-item>
              <text:list-item>
                <text:p text:style-name="P6"><text:span text:style-name="T2">J’écris une répons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(30 pts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(30 pts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: compréhension écrite (12)</text:span></text:p>
              </text:list-item>
              <text:list-item>
                <text:p text:style-name="P6"><text:span text:style-name="T2">Tâche 2 : lexique / médias (8)</text:span></text:p>
              </text:list-item>
              <text:list-item>
                <text:p text:style-name="P6"><text:span text:style-name="T2">Tâche 3 : carte postale ~120 mots (10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Québec / Histoire du Québec / Charte de la langue française — Wikipédia, CC BY-SA</text:span></text:p>
              </text:list-item>
              <text:list-item>
                <text:p text:style-name="P6"><text:span text:style-name="T2">Poutine / Sirop d’érable / Français québécois — Wikipédia, CC BY-SA</text:span></text:p>
              </text:list-item>
              <text:list-item>
                <text:p text:style-name="P6"><text:span text:style-name="T2">Vitrine linguistique — OQLF (documentaire, non affili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09:40</meta:creation-date>
    <dc:date>2026-07-21T16:09:40</dc:date>
    <meta:document-statistic meta:object-count="185"/>
    <meta:generator>LibreOffice/24.2.7.2$Linux_X86_64 LibreOffice_project/420$Build-2</meta:generator>
  </office:meta>
</office:document-meta>
</file>