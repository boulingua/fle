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8 — Réseaux sociaux et identité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8 — Réseaux sociaux et identité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(lycée) · classe 10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istinguer identité réelle et identité numérique</text:span></text:p>
              </text:list-item>
              <text:list-item>
                <text:p text:style-name="P6"><text:span text:style-name="T2">Comprendre un court article sur les usages des jeunes</text:span></text:p>
              </text:list-item>
              <text:list-item>
                <text:p text:style-name="P6"><text:span text:style-name="T2">Nommer les risques : bulle de filtres, comparaison sociale, désinformation</text:span></text:p>
              </text:list-item>
              <text:list-item>
                <text:p text:style-name="P6"><text:span text:style-name="T2">Exprimer une opinion nuancée</text:span></text:p>
              </text:list-item>
              <text:list-item>
                <text:p text:style-name="P6"><text:span text:style-name="T2">Dialoguer et réagir aux arguments de l’aut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éa : Une semaine sans rien poster, tu as survécu ?</text:span></text:p>
            <text:p text:style-name="P3"><text:span text:style-name="T2">Élise : Oui. Les premiers jours, je vérifiais mon téléphone toutes les cinq minutes.</text:span></text:p>
            <text:p text:style-name="P3"><text:span text:style-name="T2">Élise : Je dors mieux… mais j’ai raté un anniversaire passé dans le groupe.</text:span></text:p>
            <text:p text:style-name="P3"><text:span text:style-name="T2">Élise : Je ne dis pas que c’est mauvais — il faut choisir </text:span><text:span text:style-name="T3">quand</text:span><text:span text:style-name="T2"> et </text:span><text:span text:style-name="T3">comment</text:span><text:span text:style-name="T2">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bien de temps par jour sur les réseaux ?</text:span></text:p>
              </text:list-item>
              <text:list-item>
                <text:p text:style-name="P6"><text:span text:style-name="T2">Quels réseaux, et pour quoi faire ?</text:span></text:p>
              </text:list-item>
              <text:list-item>
                <text:p text:style-name="P6"><text:span text:style-name="T2">« Bulle de filtres » : qu’est-ce que cela évoque ?</text:span></text:p>
              </text:list-item>
              <text:list-item>
                <text:p text:style-name="P6"><text:span text:style-name="T2">Montre-t-on la même image en ligne et dans la vi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’identité numérique — les traces qu’on laisse en ligne</text:span></text:p>
              </text:list-item>
              <text:list-item>
                <text:p text:style-name="P6"><text:span text:style-name="T2">la bulle de filtres — ne voir que des contenus semblables</text:span></text:p>
              </text:list-item>
              <text:list-item>
                <text:p text:style-name="P6"><text:span text:style-name="T2">la comparaison sociale — se comparer sans cesse</text:span></text:p>
              </text:list-item>
              <text:list-item>
                <text:p text:style-name="P6"><text:span text:style-name="T2">la désinformation — de fausses informations diffusées</text:span></text:p>
              </text:list-item>
              <text:list-item>
                <text:p text:style-name="P6"><text:span text:style-name="T2">faire défiler / une notification / la vie privée / décroch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opinion nuancé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opinion nuancé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’un côté … , d’un autre côté …</text:span></text:p>
              </text:list-item>
              <text:list-item>
                <text:p text:style-name="P6"><text:span text:style-name="T2">Certes … , mais …</text:span></text:p>
              </text:list-item>
              <text:list-item>
                <text:p text:style-name="P6"><text:span text:style-name="T2">Bien que + subjonctif</text:span></text:p>
              </text:list-item>
              <text:list-item>
                <text:p text:style-name="P6"><text:span text:style-name="T2">À mon avis / Je trouve que + indicatif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— Deux visages d’un même profi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— Deux visages d’un même profi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Camille poste ses meilleurs moments, « pas les journées grises ».</text:span></text:p>
            <text:p text:style-name="P3"><text:span text:style-name="T2">Yanis garde une identité numérique professionnelle : projets, dessins, rien de privé.</text:span></text:p>
            <text:p text:style-name="P3"><text:span text:style-name="T2">Deux stratégies, un même but : contrôler son image.</text:span></text:p>
            <text:p text:style-name="P3"><text:span text:style-name="T2">Objectif commun : un usage choisi, et non subi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a bulle de filtr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a bulle de filtr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pression popularisée par Eli Pariser (années 2010)</text:span></text:p>
              </text:list-item>
              <text:list-item>
                <text:p text:style-name="P6"><text:span text:style-name="T2">Les algorithmes nous montrent surtout ce qui nous plaît</text:span></text:p>
              </text:list-item>
              <text:list-item>
                <text:p text:style-name="P6"><text:span text:style-name="T2">Risque : moins de points de vue différents</text:span></text:p>
              </text:list-item>
              <text:list-item>
                <text:p text:style-name="P6"><text:span text:style-name="T2">Comparaison sociale : étudiée depuis Festinger (1954)</text:span></text:p>
              </text:list-item>
            </text:list>
            <text:p text:style-name="P3"><text:span text:style-name="T2">(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Compréhension écrite (le texte)</text:span></text:p>
              </text:list-item>
              <text:list-item>
                <text:p text:style-name="P6"><text:span text:style-name="T2">Ex. 2 — Vocabulaire à compléter</text:span></text:p>
              </text:list-item>
              <text:list-item>
                <text:p text:style-name="P6"><text:span text:style-name="T2">Ex. 3 — Reformuler avec les connecteurs d’opinion</text:span></text:p>
              </text:list-item>
              <text:list-item>
                <text:p text:style-name="P6"><text:span text:style-name="T2">Ex. 4 — Donner un avis nuancé (2–3 phrases)</text:span></text:p>
              </text:list-item>
            </text:list>
            <text:p text:style-name="P3"><text:span text:style-name="T2">Différenciation :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 — dialogue en binôm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 — dialogue en binôm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Chacun·e : un avantage + un risque + une opinion nuancée (2 connecteurs) + une réaction + une règle personnelle.</text:span></text:p>
            <text:p text:style-name="P3"><text:span text:style-name="T2">Critères : contenu · interaction · langue · fluidité — sur 15 point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distingue identité réelle et numérique</text:span></text:p>
              </text:list-item>
              <text:list-item>
                <text:p text:style-name="P6"><text:span text:style-name="T2">Je comprends l’essentiel d’un article</text:span></text:p>
              </text:list-item>
              <text:list-item>
                <text:p text:style-name="P6"><text:span text:style-name="T2">Je nomme trois risques</text:span></text:p>
              </text:list-item>
              <text:list-item>
                <text:p text:style-name="P6"><text:span text:style-name="T2">J’utilise trois connecteurs d’opinion</text:span></text:p>
              </text:list-item>
              <text:list-item>
                <text:p text:style-name="P6"><text:span text:style-name="T2">Je dialogue et je réagi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— 30 point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— 30 point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écrite (12 P.)</text:span></text:p>
              </text:list-item>
              <text:list-item>
                <text:p text:style-name="P6"><text:span text:style-name="T2">Tâche 2 — Langue : connecteurs d’opinion (8 P.)</text:span></text:p>
              </text:list-item>
              <text:list-item>
                <text:p text:style-name="P6"><text:span text:style-name="T2">Tâche 3 — Interaction / dialogue ~140 mots (10 P.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Bulle de filtres — Wikipédia, CC BY-SA 4.0</text:span></text:p>
              </text:list-item>
              <text:list-item>
                <text:p text:style-name="P6"><text:span text:style-name="T2">Comparaison sociale — Wikipédia, CC BY-SA 4.0</text:span></text:p>
              </text:list-item>
              <text:list-item>
                <text:p text:style-name="P6"><text:span text:style-name="T2">CLEMI — Éducation aux médias, clemi.f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28:46</meta:creation-date>
    <dc:date>2026-07-21T16:28:46</dc:date>
    <meta:document-statistic meta:object-count="185"/>
    <meta:generator>LibreOffice/24.2.7.2$Linux_X86_64 LibreOffice_project/420$Build-2</meta:generator>
  </office:meta>
</office:document-meta>
</file>