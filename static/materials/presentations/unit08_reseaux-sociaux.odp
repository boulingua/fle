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éseaux sociaux et identité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éseaux sociaux et identité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Unité 8 · Parcours G+M · Classe 10 · Niveau M</text:span></text:p>
            <text:p text:style-name="P3"><text:span text:style-name="T2">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prendre un article court sur les réseaux</text:span></text:p>
              </text:list-item>
              <text:list-item>
                <text:p text:style-name="P6"><text:span text:style-name="T2">Nommer et expliquer les mécanismes clés</text:span></text:p>
              </text:list-item>
              <text:list-item>
                <text:p text:style-name="P6"><text:span text:style-name="T2">Exprimer une opinion et réagir à l’autre</text:span></text:p>
              </text:list-item>
              <text:list-item>
                <text:p text:style-name="P6"><text:span text:style-name="T2">Peser le pour et le contre (avis équilibré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Karim : « Tu as vu ma story au concert ? » Léa : « Elle est belle… mais tu étais vraiment là ? » Karim : « J’ai mis un filtre. J’ai posté quatre photos avant. » Léa : « On montre tous une vie parfaite qui n’existe pas. »</text:span></text:p>
            <text:p text:style-name="P3"><text:span text:style-name="T2">→ </text:span><text:span text:style-name="T2">Qui a raison ? Pourquoi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ombien de temps sur les réseaux par jour ?</text:span></text:p>
              </text:list-item>
              <text:list-item>
                <text:p text:style-name="P6"><text:span text:style-name="T2">Quels réseaux, pour quoi faire ?</text:span></text:p>
              </text:list-item>
              <text:list-item>
                <text:p text:style-name="P6"><text:span text:style-name="T2">Déjà ressenti la FOMO ?</text:span></text:p>
              </text:list-item>
              <text:list-item>
                <text:p text:style-name="P6"><text:span text:style-name="T2">Vraie vie ou version idéalisée 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 réseau social · la publication / le post</text:span></text:p>
              </text:list-item>
              <text:list-item>
                <text:p text:style-name="P6"><text:span text:style-name="T2">le like · le filtre · l’algorithme</text:span></text:p>
              </text:list-item>
              <text:list-item>
                <text:p text:style-name="P6"><text:span text:style-name="T2">la bulle de filtre · l’identité numérique</text:span></text:p>
              </text:list-item>
              <text:list-item>
                <text:p text:style-name="P6"><text:span text:style-name="T2">la comparaison · la déconnexion · le bien-êt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e langue — l’opin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oint de langue — l’opin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dicatif : </text:span><text:span text:style-name="T3">Je pense que c’est utile.</text:span><text:span text:style-name="T2"> Doute / négation → subjonctif : </text:span><text:span text:style-name="T3">Je ne pense pas que ce soit grave.</text:span></text:p>
            <text:p text:style-name="P3"><text:span text:style-name="T2">Nuancer : à mon avis · tu as raison, cependant… · je suis d’accord, sauf que…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e — « Poster ou pas ? »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xte — « Poster ou pas ? »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Inès compare sa vraie vie à une « vitrine ». Sa cousine : « Personne ne poste ses journées ennuyeuses. » Elle poste « lundi normal » → ses amies proches : « C’est reposant. » « Je n’ai pas quitté les réseaux, j’ai changé ma façon de les utiliser. »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e culturelle — la bulle de filt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ote culturelle — la bulle de filt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Expression popularisée par Eli Pariser (v. 2011). Les plateformes montrent surtout ce qui confirme nos goûts. → On voit moins les points de vue différents. → Chercher volontairement des sources varié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: Vrai / Faux sur le texte</text:span></text:p>
              </text:list-item>
              <text:list-item>
                <text:p text:style-name="P6"><text:span text:style-name="T2">Ex. 2 : Vocabulaire à compléter</text:span></text:p>
              </text:list-item>
              <text:list-item>
                <text:p text:style-name="P6"><text:span text:style-name="T2">Ex. 3 : Indicatif ou subjonctif ?</text:span></text:p>
              </text:list-item>
              <text:list-item>
                <text:p text:style-name="P6"><text:span text:style-name="T2">Ex. 4 : Micro-dialogue avec nuance</text:span></text:p>
              </text:list-item>
            </text:list>
            <text:p text:style-name="P3"><text:span text:style-name="T2">Différenciation : G (1-2) · M (1-4) · E (+ concession + question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« Faut-il imposer la mention “image retouchée” ? » A pour · B contre Chacun : 3 arguments · 1 question · 1 concession → synthèse commune</text:span></text:p>
            <text:p text:style-name="P3"><text:span text:style-name="T2">Critères : contenu · interaction · lang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Je comprends un article court</text:span></text:p>
              </text:list-item>
              <text:list-item>
                <text:p text:style-name="P6"><text:span text:style-name="T2">Je nomme 4 mécanismes</text:span></text:p>
              </text:list-item>
              <text:list-item>
                <text:p text:style-name="P6"><text:span text:style-name="T2">J’exprime une opinion (indic./subj.)</text:span></text:p>
              </text:list-item>
              <text:list-item>
                <text:p text:style-name="P6"><text:span text:style-name="T2">Je réagis à mon partenaire</text:span></text:p>
              </text:list-item>
              <text:list-item>
                <text:p text:style-name="P6"><text:span text:style-name="T2">Je présente un avis équilibré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ource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« Bulle de filtres », Wikipédia (fr), CC BY-SA 4.0</text:span></text:p>
              </text:list-item>
              <text:list-item>
                <text:p text:style-name="P6"><text:span text:style-name="T2">« Réseautage social », Wikipédia (fr), CC BY-SA 4.0</text:span></text:p>
              </text:list-item>
            </text:list>
            <text:p text:style-name="P3"><text:span text:style-name="T2">Plateforme indépendante, sans lien avec les plateformes citées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40</meta:creation-date>
    <dc:date>2026-07-21T15:46:40</dc:date>
    <meta:document-statistic meta:object-count="181"/>
    <meta:generator>LibreOffice/24.2.7.2$Linux_X86_64 LibreOffice_project/420$Build-2</meta:generator>
  </office:meta>
</office:document-meta>
</file>