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8 — Un·e Allemand·e à Pari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8 — Un·e Allemand·e à Pari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8 · Niveau M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journal de voyage simple</text:span></text:p>
              </text:list-item>
              <text:list-item>
                <text:p text:style-name="P6"><text:span text:style-name="T2">Identifier trois différences culturelles Allemagne / France</text:span></text:p>
              </text:list-item>
              <text:list-item>
                <text:p text:style-name="P6"><text:span text:style-name="T2">Distinguer passé composé et imparfait</text:span></text:p>
              </text:list-item>
              <text:list-item>
                <text:p text:style-name="P6"><text:span text:style-name="T2">Écrire un message de voyage (~70 mots)</text:span></text:p>
              </text:list-item>
              <text:list-item>
                <text:p text:style-name="P6"><text:span text:style-name="T2">Réagir poliment à un petit malentendu culture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À la boulangerie, 8 h 15 : — Je voudrais une </text:span><text:span text:style-name="T3">chocolatine</text:span><text:span text:style-name="T2">, s’il vous plaît. — Une </text:span><text:span text:style-name="T3">quoi</text:span><text:span text:style-name="T2"> ? Ici, à Paris, on dit </text:span><text:span text:style-name="T3">« pain au chocolat »</text:span><text:span text:style-name="T2"> ! — Ah, pardon ! À Bordeaux, on dit </text:span><text:span text:style-name="T3">chocolatine</text:span><text:span text:style-name="T2">…</text:span></text:p>
            <text:p text:style-name="P3"><text:span text:style-name="T2">Que fait Jonas : s’excuser, rire, se taire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lichés : Allemand·e·s vu·e·s par les Français ? Et l’inverse ?</text:span></text:p>
              </text:list-item>
              <text:list-item>
                <text:p text:style-name="P6"><text:span text:style-name="T2">Trois habitudes qui changent : repas, transports, salutations</text:span></text:p>
              </text:list-item>
              <text:list-item>
                <text:p text:style-name="P6"><text:span text:style-name="T2">Que veut dire « se sentir étranger·ère »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 journal de Jona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 journal de Jona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undi : métro rapide mais 30 °C ; dîner à 20 h 30 (18 h 30 chez lui)</text:span></text:p>
              </text:list-item>
              <text:list-item>
                <text:p text:style-name="P6"><text:span text:style-name="T2">Mercredi : « chocolatine » corrigé en « pain au chocolat »</text:span></text:p>
              </text:list-item>
              <text:list-item>
                <text:p text:style-name="P6"><text:span text:style-name="T2">Vendredi : une dame âgée lui répond en allemand — elle avait habité Karlsruh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rame (de métro)</text:span></text:p>
              </text:list-item>
              <text:list-item>
                <text:p text:style-name="P6"><text:span text:style-name="T2">une chocolatine</text:span></text:p>
              </text:list-item>
              <text:list-item>
                <text:p text:style-name="P6"><text:span text:style-name="T2">corriger · un malentendu</text:span></text:p>
              </text:list-item>
              <text:list-item>
                <text:p text:style-name="P6"><text:span text:style-name="T2">dîner · un carnet · une dame âgé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assé composé = action : </text:span><text:span text:style-name="T3">j’ai demandé, elle a souri</text:span></text:p>
              </text:list-item>
              <text:list-item>
                <text:p text:style-name="P6"><text:span text:style-name="T2">Imparfait = décor / habitude : </text:span><text:span text:style-name="T3">il faisait 30 °C, on mangeait à 18 h 30</text:span></text:p>
              </text:list-item>
              <text:list-item>
                <text:p text:style-name="P6"><text:span text:style-name="T2">Imparfait = radical du </text:span><text:span text:style-name="T3">nous</text:span><text:span text:style-name="T2"> + -ais, -ais, -ait, -ions, -iez, -aien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: chocolatine ?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: chocolatine ?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3">pain au chocolat</text:span><text:span text:style-name="T2"> : majorité de la France, Suisse, Belgique</text:span></text:p>
              </text:list-item>
              <text:list-item>
                <text:p text:style-name="P6"><text:span text:style-name="T3">chocolatine</text:span><text:span text:style-name="T2"> : grand Sud-Ouest (Toulouse, Bordeaux)</text:span></text:p>
              </text:list-item>
              <text:list-item>
                <text:p text:style-name="P6"><text:span text:style-name="T2">Mot entré au dictionnaire en 2007 / 2011 ; ≈ 84 % disent </text:span><text:span text:style-name="T3">pain au chocolat</text:span><text:span text:style-name="T2"> (2019)</text:span></text:p>
              </text:list-item>
              <text:list-item>
                <text:p text:style-name="P6"><text:span text:style-name="T2">Source : Wikipédia, CC 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Vrai / faux (lecture)</text:span></text:p>
              </text:list-item>
              <text:list-item>
                <text:p text:style-name="P6"><text:span text:style-name="T2">Ex. 2 — Passé composé ou imparfait ?</text:span></text:p>
              </text:list-item>
              <text:list-item>
                <text:p text:style-name="P6"><text:span text:style-name="T2">Ex. 3 — Trois différences Paris / Karlsruhe</text:span></text:p>
              </text:list-item>
              <text:list-item>
                <text:p text:style-name="P6"><text:span text:style-name="T2">Ex. 4 — Réagir poliment</text:span></text:p>
              </text:list-item>
              <text:list-item>
                <text:p text:style-name="P6"><text:span text:style-name="T2">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rois mini-extraits de journal (~70 mots) sur une ville française : 1. une observation 2. une différence culturelle 3. une rencontre Passé composé + imparfait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comprends un journal de voyage</text:span></text:p>
              </text:list-item>
              <text:list-item>
                <text:p text:style-name="P6"><text:span text:style-name="T2">Je distingue passé composé / imparfait</text:span></text:p>
              </text:list-item>
              <text:list-item>
                <text:p text:style-name="P6"><text:span text:style-name="T2">Je nomme trois différences culturelles</text:span></text:p>
              </text:list-item>
              <text:list-item>
                <text:p text:style-name="P6"><text:span text:style-name="T2">Je réagis poliment à un malentendu</text:span></text:p>
              </text:list-item>
              <text:list-item>
                <text:p text:style-name="P6"><text:span text:style-name="T2">J’écris ~70 mo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(10 P.)</text:span></text:p>
              </text:list-item>
              <text:list-item>
                <text:p text:style-name="P6"><text:span text:style-name="T2">Tâche 2 — Grammaire passé composé / imparfait (10 P.)</text:span></text:p>
              </text:list-item>
              <text:list-item>
                <text:p text:style-name="P6"><text:span text:style-name="T2">Tâche 3 — Expression écrite ~70 mots (10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Pain au chocolat » — Wikipédia, CC BY-SA 4.0</text:span></text:p>
              </text:list-item>
              <text:list-item>
                <text:p text:style-name="P6"><text:span text:style-name="T2">« Métro de Paris » — Wikipédia, CC BY-SA 4.0</text:span></text:p>
              </text:list-item>
              <text:list-item>
                <text:p text:style-name="P6"><text:span text:style-name="T2">Textes du journal : originaux pour cette unit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3:57</meta:creation-date>
    <dc:date>2026-07-21T15:33:57</dc:date>
    <meta:document-statistic meta:object-count="185"/>
    <meta:generator>LibreOffice/24.2.7.2$Linux_X86_64 LibreOffice_project/420$Build-2</meta:generator>
  </office:meta>
</office:document-meta>
</file>