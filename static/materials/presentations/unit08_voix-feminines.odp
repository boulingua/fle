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oix féminines en littérat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ix féminines en littérat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8 · Parcours E · classe 11 · Niveau E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biographique sur une autrice</text:span></text:p>
              </text:list-item>
              <text:list-item>
                <text:p text:style-name="P6"><text:span text:style-name="T2">Raconter une vie au passé (composé / imparfait)</text:span></text:p>
              </text:list-item>
              <text:list-item>
                <text:p text:style-name="P6"><text:span text:style-name="T2">Présenter oralement une voix féminine (4–5 min)</text:span></text:p>
              </text:list-item>
              <text:list-item>
                <text:p text:style-name="P6"><text:span text:style-name="T2">Analyser une courte citation</text:span></text:p>
              </text:list-item>
              <text:list-item>
                <text:p text:style-name="P6"><text:span text:style-name="T2">Distinguer citer (domaine public) et évoquer (contemporain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George Sand</text:span><text:span text:style-name="T2"> — homme ou femme ?</text:span></text:p>
            <text:p text:style-name="P3"><text:span text:style-name="T2">C’était une femme : Aurore Dupin, née en 1804.</text:span></text:p>
            <text:p text:style-name="P3"><text:span text:style-name="T2">Pourquoi une écrivaine choisirait-elle un nom d’homm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itez une écrivaine et une de ses œuvres</text:span></text:p>
              </text:list-item>
              <text:list-item>
                <text:p text:style-name="P6"><text:span text:style-name="T2">Quand les femmes ont-elles pu publier librement en France ?</text:span></text:p>
              </text:list-item>
              <text:list-item>
                <text:p text:style-name="P6"><text:span text:style-name="T2">Que signifie « le domaine public »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autrice / une écrivaine</text:span></text:p>
              </text:list-item>
              <text:list-item>
                <text:p text:style-name="P6"><text:span text:style-name="T2">un pseudonyme · une œuvre · un récit</text:span></text:p>
              </text:list-item>
              <text:list-item>
                <text:p text:style-name="P6"><text:span text:style-name="T2">paraître, publier · s’affranchir de</text:span></text:p>
              </text:list-item>
              <text:list-item>
                <text:p text:style-name="P6"><text:span text:style-name="T2">une pionnière · la condition féminine</text:span></text:p>
              </text:list-item>
              <text:list-item>
                <text:p text:style-name="P6"><text:span text:style-name="T2">le domaine pub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pass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pass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Passé composé</text:span><text:span text:style-name="T2"> : actions, événements datés </text:span><text:span text:style-name="T3">En 1945, elle est entrée à l’Académie…</text:span></text:p>
            <text:p text:style-name="P3"><text:span text:style-name="T4">Imparfait</text:span><text:span text:style-name="T2"> : décor, habitudes, descriptions </text:span><text:span text:style-name="T3">Une femme qui écrivait n’était pas prise au sérieux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orge Sand (1804–1876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George Sand (1804–1876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rai nom : Aurore Dupin</text:span></text:p>
              </text:list-item>
              <text:list-item>
                <text:p text:style-name="P6"><text:span text:style-name="T2">Pseudonyme masculin, tenue masculine → liberté</text:span></text:p>
              </text:list-item>
              <text:list-item>
                <text:p text:style-name="P6"><text:span text:style-name="T2">Romans champêtres : </text:span><text:span text:style-name="T3">La Mare au diable</text:span><text:span text:style-name="T2"> (1846), </text:span><text:span text:style-name="T3">La Petite Fadette</text:span><text:span text:style-name="T2"> (1849)</text:span></text:p>
              </text:list-item>
              <text:list-item>
                <text:p text:style-name="P6"><text:span text:style-name="T2">Une des romancières les plus lues du XIXe sièc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ette (1873–1954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lette (1873–1954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emiers livres (</text:span><text:span text:style-name="T3">Claudine</text:span><text:span text:style-name="T2">) sous le nom de son mari</text:span></text:p>
              </text:list-item>
              <text:list-item>
                <text:p text:style-name="P6"><text:span text:style-name="T2">Voix propre, sensible, attentive à la nature</text:span></text:p>
              </text:list-item>
              <text:list-item>
                <text:p text:style-name="P6"><text:span text:style-name="T2">1945 : Académie Goncourt (qu’elle préside)</text:span></text:p>
              </text:list-item>
              <text:list-item>
                <text:p text:style-name="P6"><text:span text:style-name="T2">1954 : funérailles nationales — une première pour une femme de lettr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jourd’hu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ujourd’hu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rnaux · NDiaye · Slimani</text:span></text:p>
            <text:p text:style-name="P3"><text:span text:style-name="T2">Voix contemporaines → on les </text:span><text:span text:style-name="T4">évoque</text:span><text:span text:style-name="T2">, on ne les </text:span><text:span text:style-name="T4">recopie</text:span><text:span text:style-name="T2"> pas (œuvres sous droit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Compréhension du texte</text:span></text:p>
              </text:list-item>
              <text:list-item>
                <text:p text:style-name="P6"><text:span text:style-name="T2">Passé composé / imparfait</text:span></text:p>
              </text:list-item>
              <text:list-item>
                <text:p text:style-name="P6"><text:span text:style-name="T2">Vocabulaire (relier)</text:span></text:p>
              </text:list-item>
              <text:list-item>
                <text:p text:style-name="P6"><text:span text:style-name="T2">Citation de George Sand à analys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t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it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L’art n’est pas une étude de la réalité positive ; c’est une recherche de la vérité idéale. »</text:span></text:p>
            <text:p text:style-name="P3"><text:span text:style-name="T2">— </text:span><text:span text:style-name="T2">George Sand, </text:span><text:span text:style-name="T3">Histoire de ma vie</text:span><text:span text:style-name="T2"> (1855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z une voix féminine (4–5 min)</text:span></text:p>
            <text:p text:style-name="P3"><text:span text:style-name="T2">Vie → œuvre clé → apport → avis</text:span></text:p>
            <text:p text:style-name="P3"><text:span text:style-name="T2">Citer (Sand, Colette) </text:span><text:span text:style-name="T4">ou</text:span><text:span text:style-name="T2"> évoquer (contemporaine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texte biographique</text:span></text:p>
              </text:list-item>
              <text:list-item>
                <text:p text:style-name="P6"><text:span text:style-name="T2">Je raconte une vie au passé</text:span></text:p>
              </text:list-item>
              <text:list-item>
                <text:p text:style-name="P6"><text:span text:style-name="T2">Je parle en continu d’une autrice</text:span></text:p>
              </text:list-item>
              <text:list-item>
                <text:p text:style-name="P6"><text:span text:style-name="T2">J’analyse une citation</text:span></text:p>
              </text:list-item>
              <text:list-item>
                <text:p text:style-name="P6"><text:span text:style-name="T2">Je sais citer / évoqu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: « George Sand », « Colette » (CC BY-SA)</text:span></text:p>
              </text:list-item>
              <text:list-item>
                <text:p text:style-name="P6"><text:span text:style-name="T2">George Sand, </text:span><text:span text:style-name="T3">Histoire de ma vie</text:span><text:span text:style-name="T2"> (1855, domaine public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43</meta:creation-date>
    <dc:date>2026-07-21T16:29:43</dc:date>
    <meta:document-statistic meta:object-count="189"/>
    <meta:generator>LibreOffice/24.2.7.2$Linux_X86_64 LibreOffice_project/420$Build-2</meta:generator>
  </office:meta>
</office:document-meta>
</file>