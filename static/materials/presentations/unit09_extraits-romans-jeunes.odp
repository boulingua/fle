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italic" style:text-underline-style="none" fo:font-weight="normal" fo:background-color="transparent" style:font-size-asian="33pt" style:font-style-asian="italic" style:font-weight-asian="normal" style:font-size-complex="33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Extraits de romans jeun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Extraits de romans jeun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extrait de roman jeunesse</text:span></text:p>
              </text:list-item>
              <text:list-item>
                <text:p text:style-name="P6"><text:span text:style-name="T2">Distinguer auteur·e / narrateur·rice / personnage</text:span></text:p>
              </text:list-item>
              <text:list-item>
                <text:p text:style-name="P6"><text:span text:style-name="T2">Repérer le point de vue (interne / externe)</text:span></text:p>
              </text:list-item>
              <text:list-item>
                <text:p text:style-name="P6"><text:span text:style-name="T2">Rédiger une fiche de lecture (~150 mots)</text:span></text:p>
              </text:list-item>
              <text:list-item>
                <text:p text:style-name="P6"><text:span text:style-name="T2">Comparer papier et liseu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CDI, trois romans, trois voix : - un garçon raconte sa propre histoire (« je ») - une narratrice observe de l’extérieur - un journal intime</text:span></text:p>
            <text:p text:style-name="P3"><text:span text:style-name="T2">« Ouvre-les, écoute la voix qui te parl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roman jeunesse francophone connaissez-vous ?</text:span></text:p>
              </text:list-item>
              <text:list-item>
                <text:p text:style-name="P6"><text:span text:style-name="T2">Auteur·e ou narrateur·rice : quelle différence ?</text:span></text:p>
              </text:list-item>
              <text:list-item>
                <text:p text:style-name="P6"><text:span text:style-name="T2">Papier ou liseuse ?</text:span></text:p>
              </text:list-item>
              <text:list-item>
                <text:p text:style-name="P6"><text:span text:style-name="T2">Quels thèmes dans un roman pour ado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uteur·e = personne réelle qui écrit</text:span></text:p>
              </text:list-item>
              <text:list-item>
                <text:p text:style-name="P6"><text:span text:style-name="T2">narrateur·rice = voix qui raconte</text:span></text:p>
              </text:list-item>
              <text:list-item>
                <text:p text:style-name="P6"><text:span text:style-name="T2">personnage = être fictif</text:span></text:p>
              </text:list-item>
              <text:list-item>
                <text:p text:style-name="P6"><text:span text:style-name="T2">point de vue = interne / externe</text:span></text:p>
              </text:list-item>
              <text:list-item>
                <text:p text:style-name="P6"><text:span text:style-name="T2">incipit · intrigue · dénou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s temps du récit : - imparfait → décor, description - passé composé / passé simple → action achevée - plus-que-parfait (avait + participe) → antériorité</text:span></text:p>
            <text:p text:style-name="P3"><text:span text:style-name="T2">Point de vue : interne (« je ») / externe (« il, elle »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Extrait Le carnet ble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Extrait </text:span><text:span text:style-name="T3">Le carnet ble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Nour n’avait jamais aimé les rentrées… » - La famille vient de déménager - La grand-mère offre un carnet : « Écris tout. » - Une fille l’aborde à la récréation</text:span></text:p>
            <text:p text:style-name="P3"><text:span text:style-name="T2">(Texte original, libre de droi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littérature de jeunesse s’est diversifiée au XXᵉ siècle. Les romans « young adult » abordent l’amitié, la famille, l’identité, le passage à l’âge adulte.</text:span></text:p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du texte</text:span></text:p>
              </text:list-item>
              <text:list-item>
                <text:p text:style-name="P6"><text:span text:style-name="T2">Ex. 2 Notions (narrateur, personnages, incipit)</text:span></text:p>
              </text:list-item>
              <text:list-item>
                <text:p text:style-name="P6"><text:span text:style-name="T2">Ex. 3 Les temps du récit</text:span></text:p>
              </text:list-item>
              <text:list-item>
                <text:p text:style-name="P6"><text:span text:style-name="T2">Ex. 4 Papier ou liseuse ?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u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arrateur externe ; personnages : Nour, la fille</text:span></text:p>
              </text:list-item>
              <text:list-item>
                <text:p text:style-name="P6"><text:span text:style-name="T2">Imparfait : sentait, regardait</text:span></text:p>
              </text:list-item>
              <text:list-item>
                <text:p text:style-name="P6"><text:span text:style-name="T2">Passé simple : ouvrit</text:span></text:p>
              </text:list-item>
              <text:list-item>
                <text:p text:style-name="P6"><text:span text:style-name="T2">Plus-que-parfait : avait offert, avait d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che de lecture (~150 mots) : - auteur·e + titre - résumé (3 phrases) - personnage principal + point de vue - thème - avis personnel justifi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extrait</text:span></text:p>
              </text:list-item>
              <text:list-item>
                <text:p text:style-name="P6"><text:span text:style-name="T2">Je distingue auteur / narrateur / personnage</text:span></text:p>
              </text:list-item>
              <text:list-item>
                <text:p text:style-name="P6"><text:span text:style-name="T2">Je repère le point de vue</text:span></text:p>
              </text:list-item>
              <text:list-item>
                <text:p text:style-name="P6"><text:span text:style-name="T2">Je rédige une fiche de le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xtrait </text:span><text:span text:style-name="T4">La lettre oubliée</text:span><text:span text:style-name="T2"> - Tâche 1 Compréhension (10 P.) - Tâche 2 Texte et média (8 P.) - Tâche 3 Fiche de lecture ~150 mots (12 P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ttérature d’enfance et de jeunesse — Wikipédia, CC BY-SA</text:span></text:p>
              </text:list-item>
              <text:list-item>
                <text:p text:style-name="P6"><text:span text:style-name="T2">Focalisation — Wikipédia, CC BY-SA</text:span></text:p>
              </text:list-item>
              <text:list-item>
                <text:p text:style-name="P6"><text:span text:style-name="T2">Textes </text:span><text:span text:style-name="T4">Le carnet bleu</text:span><text:span text:style-name="T2"> / </text:span><text:span text:style-name="T4">La lettre oubliée</text:span><text:span text:style-name="T2"> — originaux, libres de droi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49</meta:creation-date>
    <dc:date>2026-07-21T16:28:49</dc:date>
    <meta:document-statistic meta:object-count="189"/>
    <meta:generator>LibreOffice/24.2.7.2$Linux_X86_64 LibreOffice_project/420$Build-2</meta:generator>
  </office:meta>
</office:document-meta>
</file>