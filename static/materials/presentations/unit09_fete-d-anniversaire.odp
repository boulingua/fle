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9 — Fête d’annivers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9 — Fête d’annivers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7 · Niveau M</text:span></text:p>
            <text:p text:style-name="P3"><text:span text:style-name="T2">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édiger une </text:span><text:span text:style-name="T3">invitation</text:span><text:span text:style-name="T2"> (date, heure, lieu)</text:span></text:p>
              </text:list-item>
              <text:list-item>
                <text:p text:style-name="P6"><text:span text:style-name="T2">Parler d’un projet avec le </text:span><text:span text:style-name="T3">futur proche</text:span></text:p>
              </text:list-item>
              <text:list-item>
                <text:p text:style-name="P6"><text:span text:style-name="T3">Accepter / refuser</text:span><text:span text:style-name="T2"> poliment</text:span></text:p>
              </text:list-item>
              <text:list-item>
                <text:p text:style-name="P6"><text:span text:style-name="T2">Dire une </text:span><text:span text:style-name="T3">date</text:span><text:span text:style-name="T2"> et un </text:span><text:span text:style-name="T3">moment</text:span></text:p>
              </text:list-item>
              <text:list-item>
                <text:p text:style-name="P6"><text:span text:style-name="T3">Offrir</text:span><text:span text:style-name="T2"> un cadeau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— </text:span><text:span text:style-name="T2">Allô, Inès ? Samedi, je vais avoir treize ans. Tu es libre ? — Oui, super ! Qu’est-ce que tu vas faire ? — On va faire une fête à la maison : pizza, gâteau et musique. Tu vas venir ? — Bien sûr ! Je vais apporter des ballon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and est votre anniversaire ?</text:span></text:p>
              </text:list-item>
              <text:list-item>
                <text:p text:style-name="P6"><text:span text:style-name="T2">Comment le fêtez-vous ?</text:span></text:p>
              </text:list-item>
              <text:list-item>
                <text:p text:style-name="P6"><text:span text:style-name="T2">Quel cadeau aimeriez-vous recevoir ?</text:span></text:p>
              </text:list-item>
            </text:list>
            <text:p text:style-name="P3"><text:span text:style-name="T4">Dire une date :</text:span><text:span text:style-name="T2"> </text:span><text:span text:style-name="T3">le</text:span><text:span text:style-name="T2"> 15 </text:span><text:span text:style-name="T3">mars</text:span><text:span text:style-name="T2"> (mois sans majuscule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’invitation → die Einladung</text:span></text:p>
              </text:list-item>
              <text:list-item>
                <text:p text:style-name="P6"><text:span text:style-name="T2">le cadeau → das Geschenk</text:span></text:p>
              </text:list-item>
              <text:list-item>
                <text:p text:style-name="P6"><text:span text:style-name="T2">le gâteau → der Kuchen</text:span></text:p>
              </text:list-item>
              <text:list-item>
                <text:p text:style-name="P6"><text:span text:style-name="T2">la bougie → die Kerze</text:span></text:p>
              </text:list-item>
              <text:list-item>
                <text:p text:style-name="P6"><text:span text:style-name="T2">souffler les bougies → die Kerzen ausblasen</text:span></text:p>
              </text:list-item>
              <text:list-item>
                <text:p text:style-name="P6"><text:span text:style-name="T2">Joyeux anniversaire ! → Alles Gute zum Geburtstag!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futur proch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futur proch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aller</text:span><text:span text:style-name="T2"> (présent) </text:span><text:span text:style-name="T3">+ infinitif</text:span></text:p>
            <text:list text:style-name="L3">
              <text:list-item>
                <text:p text:style-name="P3"><text:span text:style-name="T2">je </text:span><text:span text:style-name="T3">vais faire</text:span></text:p>
              </text:list-item>
              <text:list-item>
                <text:p text:style-name="P3"><text:span text:style-name="T2">tu </text:span><text:span text:style-name="T3">vas venir</text:span></text:p>
              </text:list-item>
              <text:list-item>
                <text:p text:style-name="P3"><text:span text:style-name="T2">on </text:span><text:span text:style-name="T3">va danser</text:span></text:p>
              </text:list-item>
              <text:list-item>
                <text:p text:style-name="P3"><text:span text:style-name="T2">nous </text:span><text:span text:style-name="T3">allons inviter</text:span></text:p>
              </text:list-item>
              <text:list-item>
                <text:p text:style-name="P3"><text:span text:style-name="T2">vous </text:span><text:span text:style-name="T3">allez apporter</text:span></text:p>
              </text:list-item>
              <text:list-item>
                <text:p text:style-name="P3"><text:span text:style-name="T2">ils </text:span><text:span text:style-name="T3">vont arriver</text:span></text:p>
              </text:list-item>
            </text:list>
            <text:p text:style-name="P3"><text:span text:style-name="T2">Négation : </text:span><text:span text:style-name="T4">Je </text:span><text:span text:style-name="T5">ne vais pas</text:span><text:span text:style-name="T4"> venir.</text:span><text:span text:style-name="T2"> → toujours l’infinitif 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carton d’invit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carton d’invit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Tu es invité·e !</text:span><text:span text:style-name="T2"> 🎉 Léa fête ses </text:span><text:span text:style-name="T3">13 ans</text:span><text:span text:style-name="T2"> ! 📅 Samedi 15 mars, 18 h – 22 h 🏠 Chez Léa, 7 rue des Lilas 🎂 Pizza · gâteau · karaoké · jeux Réponds avant le 12 mars 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On chante </text:span><text:span text:style-name="T4">« Joyeux anniversaire »</text:span><text:span text:style-name="T2">, puis on fait un vœu et on souffle les bougies (une par année).</text:span></text:p>
              </text:list-item>
              <text:list-item>
                <text:p text:style-name="P6"><text:span text:style-name="T2">En France, l’anniversaire individuel se répand surtout dans les années 1950-60.</text:span></text:p>
              </text:list-item>
              <text:list-item>
                <text:p text:style-name="P6"><text:span text:style-name="T2">La mélodie vient de </text:span><text:span text:style-name="T4">« Happy Birthday to You »</text:span><text:span text:style-name="T2"> (domaine public dans l’UE depuis 2017).</text:span></text:p>
              </text:list-item>
            </text:list>
            <text:p text:style-name="P3"><text:span text:style-name="T4">Source : Wikipédia, CC BY-SA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Ex. 1</text:span><text:span text:style-name="T2"> Compréhension écrite (carton + dialogue)</text:span></text:p>
              </text:list-item>
              <text:list-item>
                <text:p text:style-name="P6"><text:span text:style-name="T3">Ex. 2</text:span><text:span text:style-name="T2"> Futur proche : conjuguez</text:span></text:p>
              </text:list-item>
              <text:list-item>
                <text:p text:style-name="P6"><text:span text:style-name="T3">Ex. 3</text:span><text:span text:style-name="T2"> Forme négative</text:span></text:p>
              </text:list-item>
              <text:list-item>
                <text:p text:style-name="P6"><text:span text:style-name="T3">Ex. 4</text:span><text:span text:style-name="T2"> Accepter ou refuser</text:span></text:p>
              </text:list-item>
            </text:list>
            <text:p text:style-name="P3"><text:span text:style-name="T2">Différenciation :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En binôme — dialogue téléphonique (6 répliques)</text:span></text:p>
            <text:p text:style-name="P3"><text:span text:style-name="T2">Accepter ou refuser + proposer un cadeau ou une aide.</text:span></text:p>
            <text:p text:style-name="P3"><text:span text:style-name="T2">Au moins </text:span><text:span text:style-name="T3">3 verbes au futur proche</text:span><text:span text:style-name="T2">.</text:span></text:p>
            <text:p text:style-name="P3"><text:span text:style-name="T2">Critères : tâche · futur proche · vocabulaire · interaction · prononciati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’écris une invitation</text:span></text:p>
              </text:list-item>
              <text:list-item>
                <text:p text:style-name="P6"><text:span text:style-name="T2">☐ </text:span><text:span text:style-name="T2">Je forme le futur proche</text:span></text:p>
              </text:list-item>
              <text:list-item>
                <text:p text:style-name="P6"><text:span text:style-name="T2">☐ </text:span><text:span text:style-name="T2">Je le mets au négatif</text:span></text:p>
              </text:list-item>
              <text:list-item>
                <text:p text:style-name="P6"><text:span text:style-name="T2">☐ </text:span><text:span text:style-name="T2">J’accepte / je refuse poliment</text:span></text:p>
              </text:list-item>
              <text:list-item>
                <text:p text:style-name="P6"><text:span text:style-name="T2">☐ </text:span><text:span text:style-name="T2">Je connais 8 mots de la fêt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Tâche 1</text:span><text:span text:style-name="T2"> Grammaire — 10 P.</text:span></text:p>
              </text:list-item>
              <text:list-item>
                <text:p text:style-name="P6"><text:span text:style-name="T3">Tâche 2</text:span><text:span text:style-name="T2"> Compréhension écrite — 8 P.</text:span></text:p>
              </text:list-item>
              <text:list-item>
                <text:p text:style-name="P6"><text:span text:style-name="T3">Tâche 3</text:span><text:span text:style-name="T2"> Invitation (~80 mots) — 12 P.</text:span></text:p>
              </text:list-item>
            </text:list>
            <text:p text:style-name="P3"><text:span text:style-name="T3">Total : 3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08:23</meta:creation-date>
    <dc:date>2026-07-21T15:08:23</dc:date>
    <meta:document-statistic meta:object-count="181"/>
    <meta:generator>LibreOffice/24.2.7.2$Linux_X86_64 LibreOffice_project/420$Build-2</meta:generator>
  </office:meta>
</office:document-meta>
</file>