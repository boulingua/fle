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P7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9 — Fête et invitation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9 — Fête et invitation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E · classe 7 · Niveau E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Rédiger une invitation (date, heure, lieu)</text:span></text:p>
              </text:list-item>
              <text:list-item>
                <text:p text:style-name="P6"><text:span text:style-name="T2">Indiquer une date et un horaire</text:span></text:p>
              </text:list-item>
              <text:list-item>
                <text:p text:style-name="P6"><text:span text:style-name="T2">Parler d’un projet proche : le futur proche</text:span></text:p>
              </text:list-item>
              <text:list-item>
                <text:p text:style-name="P6"><text:span text:style-name="T2">Accepter ou refuser poliment</text:span></text:p>
              </text:list-item>
              <text:list-item>
                <text:p text:style-name="P6"><text:span text:style-name="T2">Répondre à un carton (R.S.V.P.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Léa et Karim, à la sortie du collège : - « Samedi, je vais fêter mes treize ans. Tu viens ? » - « C’est où et à quelle heure ? » - « Chez moi, à partir de dix-huit heures. » - « Avec plaisir ! Je te réponds ce soir. »</text:span></text:p>
            <text:p text:style-name="P3"><text:span text:style-name="T2">Questions : Qui organise ? Quels verbes au futur ? Pourquoi Karim attend-il ?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omment fêtez-vous votre anniversaire ?</text:span></text:p>
              </text:list-item>
              <text:list-item>
                <text:p text:style-name="P6"><text:span text:style-name="T2">Quelles informations dans une invitation ?</text:span></text:p>
              </text:list-item>
              <text:list-item>
                <text:p text:style-name="P6"><text:span text:style-name="T2">Cinq mots français de la fête ?</text:span></text:p>
              </text:list-item>
              <text:list-item>
                <text:p text:style-name="P6"><text:span text:style-name="T2">Que dites-vous quand vous ne pouvez pas venir ?</text:span></text:p>
              </text:list-item>
            </text:list>
            <text:p text:style-name="P3"><text:span text:style-name="T2">Une invitation répond à : </text:span><text:span text:style-name="T3">Quoi ? Quand ? Où ? Comment répondre ?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une invitation / un carton</text:span></text:p>
              </text:list-item>
              <text:list-item>
                <text:p text:style-name="P6"><text:span text:style-name="T2">fêter · inviter · accepter · refuser</text:span></text:p>
              </text:list-item>
              <text:list-item>
                <text:p text:style-name="P6"><text:span text:style-name="T2">le gâteau · les bougies · souffler les bougies</text:span></text:p>
              </text:list-item>
              <text:list-item>
                <text:p text:style-name="P6"><text:span text:style-name="T2">faire un vœu · un cadeau</text:span></text:p>
              </text:list-item>
              <text:list-item>
                <text:p text:style-name="P6"><text:span text:style-name="T2">R.S.V.P. · avec plaisir · désolé·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 de langue — le futur proch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oint de langue — le futur proch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4">aller</text:span><text:span text:style-name="T2"> (présent) + </text:span><text:span text:style-name="T3">infinitif</text:span><text:span text:style-name="T2"> = action bientôt</text:span></text:p>
            <text:p text:style-name="P3"><text:span text:style-name="T2">je vais | tu vas | on va |</text:span><text:span text:style-name="T2"><text:line-break/></text:span><text:span text:style-name="T2">nous allons | vous allez | ils vont |</text:span></text:p>
            <text:list text:style-name="L3">
              <text:list-item>
                <text:p text:style-name="P3"><text:span text:style-name="T2">Je </text:span><text:span text:style-name="T3">vais inviter</text:span><text:span text:style-name="T2"> mes amis.</text:span></text:p>
              </text:list-item>
              <text:list-item>
                <text:p text:style-name="P3"><text:span text:style-name="T2">On </text:span><text:span text:style-name="T3">va danser</text:span><text:span text:style-name="T2"> toute la soirée.</text:span></text:p>
              </text:list-item>
              <text:list-item>
                <text:p text:style-name="P3"><text:span text:style-name="T2">Négation : Je </text:span><text:span text:style-name="T3">ne vais pas</text:span><text:span text:style-name="T2"> venir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 carton d’invit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Le carton d’invit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3">Tu es invité·e !</text:span><text:span text:style-name="T2"> 🎉 Léa fête ses </text:span><text:span text:style-name="T3">13 ans</text:span><text:span text:style-name="T2"> ! 📅 Samedi 23 mai, 18 h–22 h 🏠 Chez Léa, 14 rue des Lilas 🍕 Pizzas, gâteau, musique, jeux </text:span><text:span text:style-name="T3">R.S.V.P. avant le vendredi 22 mai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« Joyeux anniversaire » : chanson chantée avec le gâteau, on souffle les bougies et on fait un vœu.</text:span></text:p>
              </text:list-item>
              <text:list-item>
                <text:p text:style-name="P6"><text:span text:style-name="T3">R.S.V.P.</text:span><text:span text:style-name="T2"> = </text:span><text:span text:style-name="T4">Répondez s’il vous plaît</text:span><text:span text:style-name="T2"> → confirmer sa présence.</text:span></text:p>
              </text:list-item>
              <text:list-item>
                <text:p text:style-name="P6"><text:span text:style-name="T2">Sources : Wikipédia, licence CC BY-SA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5">
              <text:list-item>
                <text:p text:style-name="P6"><text:span text:style-name="T2">Compréhension du carton (4 questions)</text:span></text:p>
              </text:list-item>
              <text:list-item>
                <text:p text:style-name="P6"><text:span text:style-name="T2">Futur proche (6 phrases)</text:span></text:p>
              </text:list-item>
              <text:list-item>
                <text:p text:style-name="P6"><text:span text:style-name="T2">Dates et horaires en toutes lettres</text:span></text:p>
              </text:list-item>
              <text:list-item>
                <text:p text:style-name="P6"><text:span text:style-name="T2">Accepter / refuser poliment</text:span></text:p>
              </text:list-item>
            </text:list>
            <text:p text:style-name="P3"><text:span text:style-name="T2">Différenciation G / M / 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3">Écrit (~80 mots)</text:span><text:span text:style-name="T2"> : votre carton d’invitation</text:span></text:p>
              </text:list-item>
            </text:list>
            <text:list text:style-name="L6">
              <text:list-item>
                <text:list>
                  <text:list-item>
                    <text:p text:style-name="P7"><text:span text:style-name="T5">occasion, date, heure, lieu</text:span></text:p>
                  </text:list-item>
                  <text:list-item>
                    <text:p text:style-name="P7"><text:span text:style-name="T5">3 verbes au futur proche</text:span></text:p>
                  </text:list-item>
                  <text:list-item>
                    <text:p text:style-name="P7"><text:span text:style-name="T5">R.S.V.P. + date limite</text:span></text:p>
                  </text:list-item>
                </text:list>
              </text:list-item>
              <text:list-item>
                <text:p text:style-name="P6"><text:span text:style-name="T3">Oral (binôme, 6 répliques)</text:span><text:span text:style-name="T2"> : question + acceptation/refus poli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☐ </text:span><text:span text:style-name="T2">J’écris une invitation complète</text:span></text:p>
              </text:list-item>
              <text:list-item>
                <text:p text:style-name="P6"><text:span text:style-name="T2">☐ </text:span><text:span text:style-name="T2">Je forme le futur proche</text:span></text:p>
              </text:list-item>
              <text:list-item>
                <text:p text:style-name="P6"><text:span text:style-name="T2">☐ </text:span><text:span text:style-name="T2">Je dis une date et un horaire</text:span></text:p>
              </text:list-item>
              <text:list-item>
                <text:p text:style-name="P6"><text:span text:style-name="T2">☐ </text:span><text:span text:style-name="T2">J’accepte / je refuse poliment</text:span></text:p>
              </text:list-item>
              <text:list-item>
                <text:p text:style-name="P6"><text:span text:style-name="T2">☐ </text:span><text:span text:style-name="T2">J’utilise R.S.V.P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âche 1 — Compréhension écrite : 8 pts</text:span></text:p>
              </text:list-item>
              <text:list-item>
                <text:p text:style-name="P6"><text:span text:style-name="T2">Tâche 2 — Futur proche : 10 pts</text:span></text:p>
              </text:list-item>
              <text:list-item>
                <text:p text:style-name="P6"><text:span text:style-name="T2">Tâche 3 — Expression écrite (~80 mots) : 12 pts</text:span></text:p>
              </text:list-item>
              <text:list-item>
                <text:p text:style-name="P6"><text:span text:style-name="T3">Total : 30 point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« R.S.V.P. » — Wikipédia (CC BY-SA)</text:span></text:p>
              </text:list-item>
              <text:list-item>
                <text:p text:style-name="P6"><text:span text:style-name="T2">« Joyeux anniversaire (chanson) » — Wikipédia (CC BY-SA)</text:span></text:p>
              </text:list-item>
              <text:list-item>
                <text:p text:style-name="P6"><text:span text:style-name="T2">« Anniversaire » — Wikipédia (CC BY-SA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6:09:44</meta:creation-date>
    <dc:date>2026-07-21T16:09:44</dc:date>
    <meta:document-statistic meta:object-count="185"/>
    <meta:generator>LibreOffice/24.2.7.2$Linux_X86_64 LibreOffice_project/420$Build-2</meta:generator>
  </office:meta>
</office:document-meta>
</file>