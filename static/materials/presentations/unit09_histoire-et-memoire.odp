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Histoire et mémo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Histoire et mémo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ichy (1940-1944) · Guerre d’Algérie (1954-1962)</text:span></text:p>
            <text:p text:style-name="P3"><text:span text:style-name="T3">Parcours E · classe 11 · Niveau E</text:span></text:p>
            <text:p text:style-name="P3"><text:span text:style-name="T3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Situer Vichy et la guerre d’Algérie dans le temps</text:span></text:p>
              </text:list-item>
              <text:list-item>
                <text:p text:style-name="P6"><text:span text:style-name="T3">Distinguer </text:span><text:span text:style-name="T2">l’histoire</text:span><text:span text:style-name="T3"> (les faits) de </text:span><text:span text:style-name="T2">la mémoire</text:span><text:span text:style-name="T3"> (la perception sociale)</text:span></text:p>
              </text:list-item>
              <text:list-item>
                <text:p text:style-name="P6"><text:span text:style-name="T3">Comprendre un texte documentaire (dates, chiffres, acteurs)</text:span></text:p>
              </text:list-item>
              <text:list-item>
                <text:p text:style-name="P6"><text:span text:style-name="T3">Employer la </text:span><text:span text:style-name="T2">voix passive</text:span></text:p>
              </text:list-item>
              <text:list-item>
                <text:p text:style-name="P6"><text:span text:style-name="T3">Rédiger une </text:span><text:span text:style-name="T2">note historique</text:span><text:span text:style-name="T3"> (~300 mots), factuelle et respectueu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Devant le Mémorial de la Shoah :</text:span></text:p>
            <text:p text:style-name="P3"><text:span text:style-name="T2">Léa :</text:span><text:span text:style-name="T3"> — Le pays a mis très longtemps à en parler.</text:span></text:p>
            <text:p text:style-name="P3"><text:span text:style-name="T2">Karim :</text:span><text:span text:style-name="T3"> — Mon grand-père racontait la guerre d’Algérie ; à l’école, presque rien. Pourquoi ce silence ?</text:span></text:p>
            <text:p text:style-name="P3"><text:span text:style-name="T2">M. Rousseau :</text:span><text:span text:style-name="T3"> — Les faits, c’est l’histoire. La façon de s’en souvenir, c’est la mémoi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Que savez-vous du régime de Vichy ?</text:span></text:p>
              </text:list-item>
              <text:list-item>
                <text:p text:style-name="P6"><text:span text:style-name="T3">Quand a eu lieu la guerre d’Algérie ?</text:span></text:p>
              </text:list-item>
              <text:list-item>
                <text:p text:style-name="P6"><text:span text:style-name="T4">Fait · témoignage · reconnaissance · commémoration</text:span><text:span text:style-name="T3"> : associez chaque mot à une définition</text:span></text:p>
              </text:list-item>
              <text:list-item>
                <text:p text:style-name="P6"><text:span text:style-name="T4">Erinnerungskultur</text:span><text:span text:style-name="T3"> — un équivalent en Fra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une rafle · la déportation · l’Occupation</text:span></text:p>
              </text:list-item>
              <text:list-item>
                <text:p text:style-name="P6"><text:span text:style-name="T3">la collaboration · un passé sensible</text:span></text:p>
              </text:list-item>
              <text:list-item>
                <text:p text:style-name="P6"><text:span text:style-name="T3">la mémoire · la reconnaissance</text:span></text:p>
              </text:list-item>
              <text:list-item>
                <text:p text:style-name="P6"><text:span text:style-name="T3">une commémoration</text:span></text:p>
              </text:list-item>
              <text:list-item>
                <text:p text:style-name="P6"><text:span text:style-name="T3">imprescriptible · occulté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a voix passiv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a voix passiv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être</text:span><text:span text:style-name="T3"> + participe passé (accordé) [+ </text:span><text:span text:style-name="T4">par</text:span><text:span text:style-name="T3"> …]</text:span></text:p>
            <text:list text:style-name="L3">
              <text:list-item>
                <text:p text:style-name="P3"><text:span text:style-name="T3">Actif : </text:span><text:span text:style-name="T4">La police arrête 13 000 personnes.</text:span></text:p>
              </text:list-item>
              <text:list-item>
                <text:p text:style-name="P3"><text:span text:style-name="T3">Passif : </text:span><text:span text:style-name="T4">13 000 personnes </text:span><text:span text:style-name="T5">sont arrêtées</text:span><text:span text:style-name="T4"> par la police.</text:span></text:p>
              </text:list-item>
              <text:list-item>
                <text:p text:style-name="P3"><text:span text:style-name="T3">Passé composé : </text:span><text:span text:style-name="T4">… </text:span><text:span text:style-name="T5">a été occulté</text:span><text:span text:style-name="T4">.</text:span></text:p>
              </text:list-item>
              <text:list-item>
                <text:p text:style-name="P3"><text:span text:style-name="T3">Imparfait : </text:span><text:span text:style-name="T4">… </text:span><text:span text:style-name="T5">étaient rarement évoqués</text:span><text:span text:style-name="T4">.</text:span></text:p>
              </text:list-item>
            </text:list>
            <text:p text:style-name="P3"><text:span text:style-name="T3">Le complément d’agent peut être omi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Deux dates, deux silen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Deux dates, deux silen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16 juillet 1942</text:span><text:span text:style-name="T3"> : rafle organisée par la police française, sur ordre allemand → déportation, longtemps occultée</text:span></text:p>
              </text:list-item>
              <text:list-item>
                <text:p text:style-name="P6"><text:span text:style-name="T2">17 octobre 1961</text:span><text:span text:style-name="T3"> : manifestation d’Algériens réprimée à Paris ; bilan longtemps dissimulé</text:span></text:p>
              </text:list-item>
              <text:list-item>
                <text:p text:style-name="P6"><text:span text:style-name="T2">Mars 1962</text:span><text:span text:style-name="T3"> : Accords d’Évian → fin de la guerre, indépendance de l’Algérie</text:span></text:p>
              </text:list-item>
            </text:list>
            <text:p text:style-name="P3"><text:span text:style-name="T3">L’histoire rejoint la mémoire avec le temp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Reconnaissance offici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Reconnaissance offici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1995</text:span><text:span text:style-name="T3"> : reconnaissance de la responsabilité de l’État dans la déportation des Juifs</text:span></text:p>
              </text:list-item>
              <text:list-item>
                <text:p text:style-name="P6"><text:span text:style-name="T2">2012 · 2018 · 2021</text:span><text:span text:style-name="T3"> : reconnaissances liées à la guerre d’Algérie (17 octobre 1961, torture)</text:span></text:p>
              </text:list-item>
            </text:list>
            <text:p text:style-name="P3"><text:span text:style-name="T3">→ </text:span><text:span text:style-name="T3">Une </text:span><text:span text:style-name="T2">politique mémorielle</text:span><text:span text:style-name="T3"> : du silence à la reconnaissance</text:span></text:p>
            <text:p text:style-name="P3"><text:span text:style-name="T4">Source : Wikipédia (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</text:span><text:span text:style-name="T3"> Compréhension écrite (5 questions)</text:span></text:p>
              </text:list-item>
              <text:list-item>
                <text:p text:style-name="P6"><text:span text:style-name="T2">Ex. 2</text:span><text:span text:style-name="T3"> Histoire / mémoire / politique mémorielle</text:span></text:p>
              </text:list-item>
              <text:list-item>
                <text:p text:style-name="P6"><text:span text:style-name="T2">Ex. 3</text:span><text:span text:style-name="T3"> Voix passive (3 transformations)</text:span></text:p>
              </text:list-item>
              <text:list-item>
                <text:p text:style-name="P6"><text:span text:style-name="T2">Ex. 4</text:span><text:span text:style-name="T3"> Reformulation : </text:span><text:span text:style-name="T4">« un passé imprescriptible »</text:span></text:p>
              </text:list-item>
            </text:list>
            <text:p text:style-name="P3"><text:span text:style-name="T3">Différenciation : G (Ex. 1-2) · M (Ex. 1-3) · E (les quatr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ote historique (~300 mots)</text:span></text:p>
            <text:p text:style-name="P3"><text:span text:style-name="T3">Sujet au choix : </text:span><text:span text:style-name="T2">17 octobre 1961</text:span><text:span text:style-name="T3"> ou </text:span><text:span text:style-name="T2">Accords d’Évian</text:span></text:p>
            <text:list text:style-name="L3">
              <text:list-item>
                <text:p text:style-name="P3"><text:span text:style-name="T3">Introduction (lieu, date, contexte)</text:span></text:p>
              </text:list-item>
              <text:list-item>
                <text:p text:style-name="P3"><text:span text:style-name="T3">Déroulement + </text:span><text:span text:style-name="T2">3 dates précises</text:span></text:p>
              </text:list-item>
              <text:list-item>
                <text:p text:style-name="P3"><text:span text:style-name="T2">1</text:span><text:span text:style-name="T3"> reconnaissance officielle (année)</text:span></text:p>
              </text:list-item>
              <text:list-item>
                <text:p text:style-name="P3"><text:span text:style-name="T3">Paragraphe « histoire vs mémoire »</text:span></text:p>
              </text:list-item>
              <text:list-item>
                <text:p text:style-name="P3"><text:span text:style-name="T2">2 phrases à la voix passive</text:span><text:span text:style-name="T3"> · ton neutre · paraphras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☐ </text:span><text:span text:style-name="T3">Je situe Vichy et la guerre d’Algérie</text:span></text:p>
              </text:list-item>
              <text:list-item>
                <text:p text:style-name="P6"><text:span text:style-name="T3">☐ </text:span><text:span text:style-name="T3">Je distingue histoire et mémoire</text:span></text:p>
              </text:list-item>
              <text:list-item>
                <text:p text:style-name="P6"><text:span text:style-name="T3">☐ </text:span><text:span text:style-name="T3">J’extrais dates et chiffres d’un texte</text:span></text:p>
              </text:list-item>
              <text:list-item>
                <text:p text:style-name="P6"><text:span text:style-name="T3">☐ </text:span><text:span text:style-name="T3">Je forme la voix passive</text:span></text:p>
              </text:list-item>
              <text:list-item>
                <text:p text:style-name="P6"><text:span text:style-name="T3">☐ </text:span><text:span text:style-name="T3">Je rédige une note de 300 mots, factuelle et respectueu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.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.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</text:span><text:span text:style-name="T3"> Compréhension écrite (10 P.)</text:span></text:p>
              </text:list-item>
              <text:list-item>
                <text:p text:style-name="P6"><text:span text:style-name="T2">Tâche 2</text:span><text:span text:style-name="T3"> Voix passive + classement (8 P.)</text:span></text:p>
              </text:list-item>
              <text:list-item>
                <text:p text:style-name="P6"><text:span text:style-name="T2">Tâche 3</text:span><text:span text:style-name="T3"> Note historique ~300 mots (12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Rafle du Vélodrome d’Hiver</text:span><text:span text:style-name="T3"> — Wikipédia (CC BY-SA)</text:span></text:p>
              </text:list-item>
              <text:list-item>
                <text:p text:style-name="P6"><text:span text:style-name="T4">Guerre d’Algérie</text:span><text:span text:style-name="T3"> — Wikipédia (CC BY-SA)</text:span></text:p>
              </text:list-item>
              <text:list-item>
                <text:p text:style-name="P6"><text:span text:style-name="T4">Manifestation du 17 octobre 1961</text:span><text:span text:style-name="T3"> — Wikipédia (CC BY-SA)</text:span></text:p>
              </text:list-item>
              <text:list-item>
                <text:p text:style-name="P6"><text:span text:style-name="T4">Accords d’Évian</text:span><text:span text:style-name="T3"> — Wikipédia (CC BY-SA)</text:span></text:p>
              </text:list-item>
              <text:list-item>
                <text:p text:style-name="P6"><text:span text:style-name="T4">Mémorial de la Shoah</text:span><text:span text:style-name="T3"> — site officiel</text:span></text:p>
              </text:list-item>
            </text:list>
            <text:p text:style-name="P3"><text:span text:style-name="T3">Textes originaux · faits paraphrasés · plateforme indépendante, sans affili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46</meta:creation-date>
    <dc:date>2026-07-21T16:29:46</dc:date>
    <meta:document-statistic meta:object-count="185"/>
    <meta:generator>LibreOffice/24.2.7.2$Linux_X86_64 LibreOffice_project/420$Build-2</meta:generator>
  </office:meta>
</office:document-meta>
</file>