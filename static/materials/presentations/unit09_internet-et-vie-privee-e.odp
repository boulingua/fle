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Internet et vie priv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Internet et vie priv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court sur la protection des données</text:span></text:p>
              </text:list-item>
              <text:list-item>
                <text:p text:style-name="P6"><text:span text:style-name="T2">Employer 8 mots de la vie privée en ligne</text:span></text:p>
              </text:list-item>
              <text:list-item>
                <text:p text:style-name="P6"><text:span text:style-name="T2">Donner un conseil au conditionnel présent</text:span></text:p>
              </text:list-item>
              <text:list-item>
                <text:p text:style-name="P6"><text:span text:style-name="T2">Dialoguer pour conseiller et mettre en garde</text:span></text:p>
              </text:list-item>
              <text:list-item>
                <text:p text:style-name="P6"><text:span text:style-name="T2">Justifier un geste de prud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hdi poste une photo de la piscine : 50 </text:span><text:span text:style-name="T3">likes</text:span><text:span text:style-name="T2"> ! Anouk : « Tu as demandé à tout le monde avant de la publier ? » Sur la photo : Léa et Karim → leur visage est une </text:span><text:span text:style-name="T4">donnée personnelle</text:span><text:span text:style-name="T2">.</text:span></text:p>
            <text:p text:style-name="P3"><text:span text:style-name="T2">Anouk : « Tu devrais leur demander leur accord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’applications par jour ?</text:span></text:p>
              </text:list-item>
              <text:list-item>
                <text:p text:style-name="P6"><text:span text:style-name="T2">Compte privé / public : quelle différence ?</text:span></text:p>
              </text:list-item>
              <text:list-item>
                <text:p text:style-name="P6"><text:span text:style-name="T2">Ton nom est-il facile à trouver en ligne ?</text:span></text:p>
              </text:list-item>
              <text:list-item>
                <text:p text:style-name="P6"><text:span text:style-name="T2">Cite un risque du partage en lign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donnée personnelle · la vie privée</text:span></text:p>
              </text:list-item>
              <text:list-item>
                <text:p text:style-name="P6"><text:span text:style-name="T2">les paramètres de confidentialité · un mot de passe</text:span></text:p>
              </text:list-item>
              <text:list-item>
                <text:p text:style-name="P6"><text:span text:style-name="T2">un compte privé / public · l’empreinte numérique</text:span></text:p>
              </text:list-item>
              <text:list-item>
                <text:p text:style-name="P6"><text:span text:style-name="T2">un·e abonné·e (</text:span><text:span text:style-name="T3">follower</text:span><text:span text:style-name="T2">) · les cookies</text:span></text:p>
              </text:list-item>
              <text:list-item>
                <text:p text:style-name="P6"><text:span text:style-name="T2">le consentement / l’accord · signaler / bloqu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conditionn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conditionn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seiller poliment = </text:span><text:span text:style-name="T4">conditionnel présent</text:span></text:p>
            <text:list text:style-name="L3">
              <text:list-item>
                <text:p text:style-name="P3"><text:span text:style-name="T3">devoir</text:span><text:span text:style-name="T2"> → </text:span><text:span text:style-name="T4">tu devrais</text:span><text:span text:style-name="T2"> changer ton mot de passe</text:span></text:p>
              </text:list-item>
              <text:list-item>
                <text:p text:style-name="P3"><text:span text:style-name="T3">falloir</text:span><text:span text:style-name="T2"> → </text:span><text:span text:style-name="T4">il faudrait</text:span><text:span text:style-name="T2"> vérifier les paramètres</text:span></text:p>
              </text:list-item>
              <text:list-item>
                <text:p text:style-name="P3"><text:span text:style-name="T3">pouvoir</text:span><text:span text:style-name="T2"> → </text:span><text:span text:style-name="T4">on pourrait</text:span><text:span text:style-name="T2"> signaler ce message</text:span></text:p>
              </text:list-item>
              <text:list-item>
                <text:p text:style-name="P3"><text:span text:style-name="T3">valoir</text:span><text:span text:style-name="T2"> → </text:span><text:span text:style-name="T4">il vaudrait mieux</text:span><text:span text:style-name="T2"> ne pas partager ton adresse</text:span></text:p>
              </text:list-item>
            </text:list>
            <text:p text:style-name="P3"><text:span text:style-name="T2">Attention : </text:span><text:span text:style-name="T3">tu devrais</text:span><text:span text:style-name="T2"> + infinitif / </text:span><text:span text:style-name="T3">il faudrait que</text:span><text:span text:style-name="T2"> + subjonctif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« Mes données, mes droits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« Mes données, mes droits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on nom, ta photo, tes messages = </text:span><text:span text:style-name="T4">données personnelles</text:span><text:span text:style-name="T2">.</text:span></text:p>
            <text:p text:style-name="P3"><text:span text:style-name="T2">Depuis 2018 (règlement européen) : savoir, corriger, demander la suppression (« droit à l’oubli »).</text:span></text:p>
            <text:p text:style-name="P3"><text:span text:style-name="T2">La meilleure protection = la </text:span><text:span text:style-name="T4">prudence</text:span><text:span text:style-name="T2">. Demande l’accord · ne partage pas ton mot de passe · signale ou bloqu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ère culturel — RGPD et CN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père culturel — RGPD et CN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RGPD</text:span><text:span text:style-name="T2"> : règlement de l’UE, applicable depuis le 25 mai 2018 (en Allemagne : DSGVO)</text:span></text:p>
              </text:list-item>
              <text:list-item>
                <text:p text:style-name="P6"><text:span text:style-name="T4">CNIL</text:span><text:span text:style-name="T2"> : autorité française, créée en 1978 (loi Informatique et Libertés)</text:span></text:p>
              </text:list-item>
              <text:list-item>
                <text:p text:style-name="P6"><text:span text:style-name="T2">Elle informe, conseille et peut sanctionner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vocabulaire à compléter</text:span></text:p>
              </text:list-item>
              <text:list-item>
                <text:p text:style-name="P6"><text:span text:style-name="T2">Ex. 3 : conseils au conditionnel</text:span></text:p>
              </text:list-item>
              <text:list-item>
                <text:p text:style-name="P6"><text:span text:style-name="T2">Ex. 4 : mini-dialogue à deux</text:span></text:p>
              </text:list-item>
            </text:list>
            <text:p text:style-name="P3"><text:span text:style-name="T2">Différenciation : G (Ex. 1-2) · M (Ex. 1-3) · E (Ex. 1-4 + justification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de conseil, en binôme (~10 répliques)</text:span></text:p>
            <text:list text:style-name="L3">
              <text:list-item>
                <text:p text:style-name="P3"><text:span text:style-name="T2">5 mots de vocabulaire</text:span></text:p>
              </text:list-item>
              <text:list-item>
                <text:p text:style-name="P3"><text:span text:style-name="T2">3 conseils au conditionnel</text:span></text:p>
              </text:list-item>
              <text:list-item>
                <text:p text:style-name="P3"><text:span text:style-name="T2">1 mise en garde</text:span></text:p>
              </text:list-item>
              <text:list-item>
                <text:p text:style-name="P3"><text:span text:style-name="T2">1 question ouverte</text:span></text:p>
              </text:list-item>
            </text:list>
            <text:p text:style-name="P3"><text:span text:style-name="T2">Barème : 15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texte sur les données</text:span></text:p>
              </text:list-item>
              <text:list-item>
                <text:p text:style-name="P6"><text:span text:style-name="T2">J’emploie 8 mots de la vie privée</text:span></text:p>
              </text:list-item>
              <text:list-item>
                <text:p text:style-name="P6"><text:span text:style-name="T2">Je conseille au conditionnel</text:span></text:p>
              </text:list-item>
              <text:list-item>
                <text:p text:style-name="P6"><text:span text:style-name="T2">Je dialogue et je relance</text:span></text:p>
              </text:list-item>
              <text:list-item>
                <text:p text:style-name="P6"><text:span text:style-name="T2">J’explique un geste de prud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oints</text:span></text:p>
            <text:list text:style-name="L3">
              <text:list-item>
                <text:p text:style-name="P3"><text:span text:style-name="T2">Tâche 1 : compréhension écrite (10)</text:span></text:p>
              </text:list-item>
              <text:list-item>
                <text:p text:style-name="P3"><text:span text:style-name="T2">Tâche 2 : vocabulaire + grammaire (8)</text:span></text:p>
              </text:list-item>
              <text:list-item>
                <text:p text:style-name="P3"><text:span text:style-name="T2">Tâche 3 : interaction / dialogue (12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« Règlement général sur la protection des données », CC BY-SA</text:span></text:p>
              </text:list-item>
              <text:list-item>
                <text:p text:style-name="P6"><text:span text:style-name="T2">Wikipédia — « Commission nationale de l’informatique et des libertés », CC BY-SA</text:span></text:p>
              </text:list-item>
              <text:list-item>
                <text:p text:style-name="P6"><text:span text:style-name="T2">Références : CNIL espace jeunes · Internet Sans Crainte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28</meta:creation-date>
    <dc:date>2026-07-21T16:16:28</dc:date>
    <meta:document-statistic meta:object-count="185"/>
    <meta:generator>LibreOffice/24.2.7.2$Linux_X86_64 LibreOffice_project/420$Build-2</meta:generator>
  </office:meta>
</office:document-meta>
</file>