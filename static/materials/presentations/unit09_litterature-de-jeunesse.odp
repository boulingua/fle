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Content_20_with_20_Caption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7.62cm" style:use-optimal-column-width="false"/>
    </style:style>
    <style:style style:name="co2" style:family="table-column">
      <style:table-column-properties style:column-width="4.727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9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P11" style:family="paragraph">
      <style:paragraph-properties fo:margin-left="3.528cm" fo:margin-right="0cm" fo:margin-top="0.141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italic" style:text-underline-style="none" fo:font-weight="normal" fo:background-color="transparent" style:font-size-asian="13.5pt" style:font-style-asian="italic" style:font-weight-asian="normal" style:font-size-complex="13.5pt" style:font-style-complex="italic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italic" style:text-underline-style="none" fo:font-weight="normal" fo:background-color="transparent" style:font-size-asian="33pt" style:font-style-asian="italic" style:font-weight-asian="normal" style:font-size-complex="33pt" style:font-style-complex="italic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9 — Littérature de jeunesse français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9 — Littérature de jeunesse français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10 · Niveau M Compréhension écrite · Compétence textuelle et médiatiqu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ituer des grands noms de la littérature de jeunesse française</text:span></text:p>
              </text:list-item>
              <text:list-item>
                <text:p text:style-name="P6"><text:span text:style-name="T2">Repérer narrateur, thème et registre d’un extrait</text:span></text:p>
              </text:list-item>
              <text:list-item>
                <text:p text:style-name="P6"><text:span text:style-name="T2">Reconnaître le passé simple et retrouver l’infinitif</text:span></text:p>
              </text:list-item>
              <text:list-item>
                <text:p text:style-name="P6"><text:span text:style-name="T2">Rédiger un avis personnel structuré (≈ 180 mo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 — au CDI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 — au CDI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me Lefèvre pose cinq livres sur la table.</text:span></text:p>
            <text:list text:style-name="L3">
              <text:list-item>
                <text:p text:style-name="P3"><text:span text:style-name="T2">Léa connaît </text:span><text:span text:style-name="T3">Cabot-Caboche</text:span><text:span text:style-name="T2"> de Pennac : un chien raconte.</text:span></text:p>
              </text:list-item>
              <text:list-item>
                <text:p text:style-name="P3"><text:span text:style-name="T2">Karim se souvient des </text:span><text:span text:style-name="T3">Malheurs de Sophie</text:span><text:span text:style-name="T2">.</text:span></text:p>
              </text:list-item>
              <text:list-item>
                <text:p text:style-name="P3"><text:span text:style-name="T2">« Vieux » ne veut pas dire « ennuyeux » !</text:span></text:p>
              </text:list-item>
            </text:list>
            <text:p text:style-name="P3"><text:span text:style-name="T4">Et vous : votre livre d’enfance préféré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isez-vous des romans en français ou en allemand ?</text:span></text:p>
              </text:list-item>
              <text:list-item>
                <text:p text:style-name="P6"><text:span text:style-name="T2">Quel auteur / autrice jeunesse connaissez-vous ?</text:span></text:p>
              </text:list-item>
              <text:list-item>
                <text:p text:style-name="P6"><text:span text:style-name="T2">Quel genre préférez-vous ?</text:span></text:p>
              </text:list-item>
              <text:list-item>
                <text:p text:style-name="P6"><text:span text:style-name="T2">À quoi sert la littérature de jeuness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cinq repèr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cinq repères</text:span></text:p>
          </draw:text-box>
        </draw:frame>
        <draw:frame draw:name="Content Placeholder 5" draw:style-name="gr2" draw:layer="layout" svg:width="22.859cm" svg:height="5.009cm" svg:x="1.27cm" svg:y="3.31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5">Auteur(rice)</text:span></text:p>
              </table:table-cell>
              <table:table-cell>
                <text:p text:style-name="P7"><text:span text:style-name="T5">Œuvre</text:span></text:p>
              </table:table-cell>
              <table:table-cell>
                <text:p text:style-name="P7"><text:span text:style-name="T5">Thèm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Comtesse de Ségur</text:span></text:p>
              </table:table-cell>
              <table:table-cell>
                <text:p text:style-name="P7"><text:span text:style-name="T7">Les Malheurs de Sophie</text:span><text:span text:style-name="T6"> (1858)</text:span></text:p>
              </table:table-cell>
              <table:table-cell>
                <text:p text:style-name="P7"><text:span text:style-name="T6">enfanc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Hector Malot</text:span></text:p>
              </table:table-cell>
              <table:table-cell>
                <text:p text:style-name="P7"><text:span text:style-name="T7">Sans famille</text:span><text:span text:style-name="T6"> (1878)</text:span></text:p>
              </table:table-cell>
              <table:table-cell>
                <text:p text:style-name="P7"><text:span text:style-name="T6">orphelin, voyag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Daniel Pennac</text:span></text:p>
              </table:table-cell>
              <table:table-cell>
                <text:p text:style-name="P7"><text:span text:style-name="T7">Cabot-Caboche</text:span><text:span text:style-name="T6"> (1982)</text:span></text:p>
              </table:table-cell>
              <table:table-cell>
                <text:p text:style-name="P7"><text:span text:style-name="T6">chien narrateur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Marie-Aude Murail</text:span></text:p>
              </table:table-cell>
              <table:table-cell>
                <text:p text:style-name="P7"><text:span text:style-name="T7">Oh, boy !</text:span><text:span text:style-name="T6"> (2000)</text:span></text:p>
              </table:table-cell>
              <table:table-cell>
                <text:p text:style-name="P7"><text:span text:style-name="T6">famille recomposé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Anne-Laure Bondoux</text:span></text:p>
              </table:table-cell>
              <table:table-cell>
                <text:p text:style-name="P7"><text:span text:style-name="T7">Le Temps des miracles</text:span><text:span text:style-name="T6"> (2009)</text:span></text:p>
              </table:table-cell>
              <table:table-cell>
                <text:p text:style-name="P7"><text:span text:style-name="T6">exil, identité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 passé simple" draw:style-name="dp1" draw:master-page-name="Content_20_with_20_Caption">
        <draw:frame draw:name="Title 1" presentation:style-name="pr4" draw:text-style-name="P8" draw:layer="layout" svg:width="8.355cm" svg:height="2.42cm" svg:x="1.27cm" svg:y="0.569cm" presentation:class="title" presentation:user-transformed="true">
          <draw:text-box>
            <text:p text:style-name="P7"><text:span text:style-name="T8">Point de langue — le passé simple</text:span></text:p>
          </draw:text-box>
        </draw:frame>
        <draw:frame draw:name="Text Placeholder 3" presentation:style-name="pr5" draw:text-style-name="P10" draw:layer="layout" svg:width="8.355cm" svg:height="9.772cm" svg:x="1.27cm" svg:y="2.99cm" presentation:class="outline" presentation:user-transformed="true">
          <draw:text-box>
            <text:p text:style-name="P9"><text:span text:style-name="T9">Le temps du récit dans les romans.</text:span></text:p>
          </draw:text-box>
        </draw:frame>
        <draw:frame draw:name="Content Placeholder 5" draw:style-name="gr2" draw:layer="layout" svg:width="14.18cm" svg:height="4.174cm" svg:x="9.913cm" svg:y="0.564cm">
          <table:table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<text:span text:style-name="T5">Infinitif</text:span></text:p>
              </table:table-cell>
              <table:table-cell>
                <text:p text:style-name="P7"><text:span text:style-name="T5">Passé simple</text:span></text:p>
              </table:table-cell>
              <table:table-cell>
                <text:p text:style-name="P7"><text:span text:style-name="T5">Passé composé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arriver</text:span></text:p>
              </table:table-cell>
              <table:table-cell>
                <text:p text:style-name="P7"><text:span text:style-name="T6">il arriva</text:span></text:p>
              </table:table-cell>
              <table:table-cell>
                <text:p text:style-name="P7"><text:span text:style-name="T6">il est arrivé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finir</text:span></text:p>
              </table:table-cell>
              <table:table-cell>
                <text:p text:style-name="P7"><text:span text:style-name="T6">elle finit</text:span></text:p>
              </table:table-cell>
              <table:table-cell>
                <text:p text:style-name="P7"><text:span text:style-name="T6">elle a fini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prendre</text:span></text:p>
              </table:table-cell>
              <table:table-cell>
                <text:p text:style-name="P7"><text:span text:style-name="T6">il prit</text:span></text:p>
              </table:table-cell>
              <table:table-cell>
                <text:p text:style-name="P7"><text:span text:style-name="T6">il a pris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être</text:span></text:p>
              </table:table-cell>
              <table:table-cell>
                <text:p text:style-name="P7"><text:span text:style-name="T6">il fut</text:span></text:p>
              </table:table-cell>
              <table:table-cell>
                <text:p text:style-name="P7"><text:span text:style-name="T6">il a été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1"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Niveau M : reconnaître et retrouver l’infinitif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 de l’analys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 de l’analys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narrateur / la narratrice</text:span></text:p>
              </text:list-item>
              <text:list-item>
                <text:p text:style-name="P6"><text:span text:style-name="T2">l’intrigue · le dénouement</text:span></text:p>
              </text:list-item>
              <text:list-item>
                <text:p text:style-name="P6"><text:span text:style-name="T2">un thème · le registre</text:span></text:p>
              </text:list-item>
              <text:list-item>
                <text:p text:style-name="P6"><text:span text:style-name="T2">un extrait · émouvant / toucha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Le carnet de Nou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</text:span><text:span text:style-name="T10">Le carnet de Nou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11"><text:span text:style-name="T11">Nour ferma son cahier et regarda par la fenêtre du car. Les champs défilaient comme des pages qu’on tourne trop vite. — Tu écris quoi ? — Rien d’important. Nour hésita. Puis elle ouvrit son carnet : « Il était une fois une fille qui voyageait avec un cahier plein de mondes…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1856 : Hachette lance la </text:span><text:span text:style-name="T4">Bibliothèque rose</text:span><text:span text:style-name="T2">.</text:span></text:p>
              </text:list-item>
              <text:list-item>
                <text:p text:style-name="P6"><text:span text:style-name="T4">Comtesse de Ségur</text:span><text:span text:style-name="T2"> (1799–1874) : </text:span><text:span text:style-name="T3">Les Malheurs de Sophie</text:span><text:span text:style-name="T2">.</text:span></text:p>
              </text:list-item>
              <text:list-item>
                <text:p text:style-name="P6"><text:span text:style-name="T2">Œuvres aujourd’hui dans le </text:span><text:span text:style-name="T4">domaine public</text:span><text:span text:style-name="T2">.</text:span></text:p>
              </text:list-item>
              <text:list-item>
                <text:p text:style-name="P6"><text:span text:style-name="T2">Héritage : les </text:span><text:span text:style-name="T4">fables</text:span><text:span text:style-name="T2"> de La Fontaine.</text:span></text:p>
              </text:list-item>
            </text:list>
            <text:p text:style-name="P3"><text:span text:style-name="T3">(Source :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(texte C)</text:span></text:p>
              </text:list-item>
              <text:list-item>
                <text:p text:style-name="P6"><text:span text:style-name="T2">Ex. 2 : Analyse (narrateur, thème, comparaison, registre)</text:span></text:p>
              </text:list-item>
              <text:list-item>
                <text:p text:style-name="P6"><text:span text:style-name="T2">Ex. 3 : Passé simple → infinitif</text:span></text:p>
              </text:list-item>
              <text:list-item>
                <text:p text:style-name="P6"><text:span text:style-name="T2">Ex. 4 : Vocabulaire à compléter</text:span></text:p>
              </text:list-item>
            </text:list>
            <text:p text:style-name="P3"><text:span text:style-name="T4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avis personne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avis personne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≈ </text:span><text:span text:style-name="T2">180 mots :</text:span></text:p>
            <text:list text:style-name="L7">
              <text:list-item>
                <text:p text:style-name="P3"><text:span text:style-name="T2">Résumé (2 phrases)</text:span></text:p>
              </text:list-item>
              <text:list-item>
                <text:p text:style-name="P3"><text:span text:style-name="T2">Ce qui vous touche (2 éléments)</text:span></text:p>
              </text:list-item>
              <text:list-item>
                <text:p text:style-name="P3"><text:span text:style-name="T2">Évaluation + recommandation</text:span></text:p>
              </text:list-item>
            </text:list>
            <text:p text:style-name="P3"><text:span text:style-name="T4">≥ </text:span><text:span text:style-name="T4">3 connecteurs</text:span><text:span text:style-name="T2"> — </text:span><text:span text:style-name="T3">Barème : 12 p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cite trois repères de la littérature de jeunesse</text:span></text:p>
              </text:list-item>
              <text:list-item>
                <text:p text:style-name="P6"><text:span text:style-name="T2">☐ </text:span><text:span text:style-name="T2">Je repère narrateur, thème, registre</text:span></text:p>
              </text:list-item>
              <text:list-item>
                <text:p text:style-name="P6"><text:span text:style-name="T2">☐ </text:span><text:span text:style-name="T2">Je reconnais le passé simple</text:span></text:p>
              </text:list-item>
              <text:list-item>
                <text:p text:style-name="P6"><text:span text:style-name="T2">☐ </text:span><text:span text:style-name="T2">Je rédige un avis structur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— 30 poi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— 30 poi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: Compréhension de l’écrit — 10 pts</text:span></text:p>
              </text:list-item>
              <text:list-item>
                <text:p text:style-name="P6"><text:span text:style-name="T2">Tâche 2 : Analyse (narrateur, thème, registre, figure) — 8 pts</text:span></text:p>
              </text:list-item>
              <text:list-item>
                <text:p text:style-name="P6"><text:span text:style-name="T2">Tâche 3 : Avis personnel ≈ 180 mots — 12 p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Littérature d’enfance et de jeunesse</text:span><text:span text:style-name="T2"> — Wikipédia, CC BY-SA</text:span></text:p>
              </text:list-item>
              <text:list-item>
                <text:p text:style-name="P6"><text:span text:style-name="T3">Comtesse de Ségur</text:span><text:span text:style-name="T2"> — Wikipédia, CC BY-SA</text:span></text:p>
              </text:list-item>
              <text:list-item>
                <text:p text:style-name="P6"><text:span text:style-name="T3">Bibliothèque rose</text:span><text:span text:style-name="T2"> — Wikipédia, CC BY-SA</text:span></text:p>
              </text:list-item>
              <text:list-item>
                <text:p text:style-name="P6"><text:span text:style-name="T3">Les Malheurs de Sophie</text:span><text:span text:style-name="T2"> (1858) — domaine publ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6:43</meta:creation-date>
    <dc:date>2026-07-21T15:46:43</dc:date>
    <meta:document-statistic meta:object-count="193"/>
    <meta:generator>LibreOffice/24.2.7.2$Linux_X86_64 LibreOffice_project/420$Build-2</meta:generator>
  </office:meta>
</office:document-meta>
</file>