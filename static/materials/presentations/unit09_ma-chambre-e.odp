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italic" style:text-underline-style="none" fo:font-weight="normal" fo:background-color="transparent" style:font-size-asian="33pt" style:font-style-asian="italic" style:font-weight-asian="normal" style:font-size-complex="33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Ma chambre, ma mais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Ma chambre, ma mais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6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les pièces et les meubles</text:span></text:p>
              </text:list-item>
              <text:list-item>
                <text:p text:style-name="P6"><text:span text:style-name="T2">Situer un objet avec les prépositions de lieu</text:span></text:p>
              </text:list-item>
              <text:list-item>
                <text:p text:style-name="P6"><text:span text:style-name="T2">Présenter ma chambre à l’oral (en continu)</text:span></text:p>
              </text:list-item>
              <text:list-item>
                <text:p text:style-name="P6"><text:span text:style-name="T2">Décrire ma chambre par écrit (~70 mots)</text:span></text:p>
              </text:list-item>
              <text:list-item>
                <text:p text:style-name="P6"><text:span text:style-name="T2">Utiliser la tournure </text:span><text:span text:style-name="T3">il y 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décrit sa nouvelle chambre à son amie Nour au téléphone.</text:span></text:p>
            <text:p text:style-name="P3"><text:span text:style-name="T2">« Il y a un lit sous la fenêtre, et à côté, un petit bureau. Dans l’armoire, à droite de la porte, je range mes affaires. »</text:span></text:p>
            <text:p text:style-name="P3"><text:span text:style-name="T2">Questions : Où est le lit ? Qu’y a-t-il à côté ? Comment est la chambr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aison ou appartement ?</text:span></text:p>
              </text:list-item>
              <text:list-item>
                <text:p text:style-name="P6"><text:span text:style-name="T2">Combien de pièces chez vous ?</text:span></text:p>
              </text:list-item>
              <text:list-item>
                <text:p text:style-name="P6"><text:span text:style-name="T2">Avez-vous une chambre à vous ?</text:span></text:p>
              </text:list-item>
              <text:list-item>
                <text:p text:style-name="P6"><text:span text:style-name="T2">Votre meuble préféré ?</text:span></text:p>
              </text:list-item>
            </text:list>
            <text:p text:style-name="P3"><text:span text:style-name="T2">Remue-méninges au tableau : tous les mots de la maison connu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piè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piè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chambre · la cuisine · le salon · la salle de bains · les toilettes · le couloi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meubl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meubl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 lit · un bureau · une chaise · une armoire · une étagère · un canapé · un tapi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il y a + préposit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</text:span><text:span text:style-name="T4">il y a</text:span><text:span text:style-name="T1"> + prépositi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Dans ma chambre, il y a un lit.</text:span><text:span text:style-name="T2"> (il y a = invariable)</text:span></text:p>
            <text:p text:style-name="P3"><text:span text:style-name="T2">sur · sous · dans · devant · derrière · à côté de</text:span></text:p>
            <text:p text:style-name="P3"><text:span text:style-name="T2">Attention : à côté </text:span><text:span text:style-name="T5">de + le → du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La chambre de Théo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La chambre de Théo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it à droite contre le mur · bureau devant la fenêtre · armoire à côté de la porte · étagère de BD dans un coin · carte du monde sur le mur.</text:span></text:p>
            <text:p text:style-name="P3"><text:span text:style-name="T2">« Ma chambre, c’est mon petit coin tranquill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Se loger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Se loger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Beaucoup de ménages vivent en </text:span><text:span text:style-name="T5">maison individuelle</text:span><text:span text:style-name="T2"> ; l’appartement domine en ville.</text:span></text:p>
              </text:list-item>
              <text:list-item>
                <text:p text:style-name="P6"><text:span text:style-name="T5">HLM</text:span><text:span text:style-name="T2"> = habitation à loyer modéré (logement social).</text:span></text:p>
              </text:list-item>
            </text:list>
            <text:p text:style-name="P3"><text:span text:style-name="T2">Source : Wikipédia « Logement en France » (CC BY-SA)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texte</text:span></text:p>
              </text:list-item>
              <text:list-item>
                <text:p text:style-name="P6"><text:span text:style-name="T2">Compléter les prépositions</text:span></text:p>
              </text:list-item>
              <text:list-item>
                <text:p text:style-name="P6"><text:span text:style-name="T2">Pièce ou meuble ?</text:span></text:p>
              </text:list-item>
              <text:list-item>
                <text:p text:style-name="P6"><text:span text:style-name="T2">Décrire un salon (production guidée)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z votre chambre à l’oral (6–8 phrases) :</text:span></text:p>
            <text:list text:style-name="L3">
              <text:list-item>
                <text:p text:style-name="P3"><text:span text:style-name="T2">taille / ambiance</text:span></text:p>
              </text:list-item>
              <text:list-item>
                <text:p text:style-name="P3"><text:span text:style-name="T2">4 meubles · </text:span><text:span text:style-name="T3">il y a</text:span></text:p>
              </text:list-item>
              <text:list-item>
                <text:p text:style-name="P3"><text:span text:style-name="T2">3 prépositions différentes</text:span></text:p>
              </text:list-item>
              <text:list-item>
                <text:p text:style-name="P3"><text:span text:style-name="T2">1 phrase personnel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pièces et meubles</text:span></text:p>
              </text:list-item>
              <text:list-item>
                <text:p text:style-name="P6"><text:span text:style-name="T2">J’utilise </text:span><text:span text:style-name="T3">il y a</text:span></text:p>
              </text:list-item>
              <text:list-item>
                <text:p text:style-name="P6"><text:span text:style-name="T2">J’emploie 3 prépositions</text:span></text:p>
              </text:list-item>
              <text:list-item>
                <text:p text:style-name="P6"><text:span text:style-name="T2">Je présente ma chambre à l’oral</text:span></text:p>
              </text:list-item>
              <text:list-item>
                <text:p text:style-name="P6"><text:span text:style-name="T2">J’écris un court tex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Vocabulaire (10 pts)</text:span></text:p>
              </text:list-item>
              <text:list-item>
                <text:p text:style-name="P6"><text:span text:style-name="T2">Tâche 2 — Prépositions (8 pts)</text:span></text:p>
              </text:list-item>
              <text:list-item>
                <text:p text:style-name="P6"><text:span text:style-name="T2">Tâche 3 — Écrire ma chambre, ~70 mots (12 pts)</text:span></text:p>
              </text:list-item>
            </text:list>
            <text:p text:style-name="P3"><text:span text:style-name="T2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, « Logement en France » (CC BY-SA)</text:span></text:p>
              </text:list-item>
              <text:list-item>
                <text:p text:style-name="P6"><text:span text:style-name="T2">Wikipédia, « Habitation à loyer modéré » (CC BY-SA)</text:span></text:p>
              </text:list-item>
            </text:list>
            <text:p text:style-name="P3"><text:span text:style-name="T2">Plateforme indépendante, sans affil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20</meta:creation-date>
    <dc:date>2026-07-21T15:47:20</dc:date>
    <meta:document-statistic meta:object-count="189"/>
    <meta:generator>LibreOffice/24.2.7.2$Linux_X86_64 LibreOffice_project/420$Build-2</meta:generator>
  </office:meta>
</office:document-meta>
</file>