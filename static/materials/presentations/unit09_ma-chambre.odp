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Unité 9 — Ma chambre, ma maison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Unité 9 — Ma chambre, ma maison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Parcours G+M · classe 6 · Niveau M</text:span></text:p>
            <text:p text:style-name="P3"><text:span text:style-name="T2">Furniture · prépositions de lieu · « il y a »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Objectif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Nommer les pièces (6) et les meubles (8)</text:span></text:p>
              </text:list-item>
              <text:list-item>
                <text:p text:style-name="P6"><text:span text:style-name="T2">Utiliser les prépositions de lieu</text:span></text:p>
              </text:list-item>
              <text:list-item>
                <text:p text:style-name="P6"><text:span text:style-name="T2">Dire « il y a … »</text:span></text:p>
              </text:list-item>
              <text:list-item>
                <text:p text:style-name="P6"><text:span text:style-name="T2">Décrire ma chambre en 5 phrase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uation de dépar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ituation de dépar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Théo montre sa chambre à Léa.</text:span></text:p>
            <text:p text:style-name="P3"><text:span text:style-name="T2">— </text:span><text:span text:style-name="T2">Voici ma chambre ! — Qu’est-ce qu’il y a sur ton bureau ? — Il y a mon ordinateur et mes cahiers. Mon lit est à côté de la fenêtre. — Et sous le lit ? — Il y a mon ballon… et mon chat qui dort !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 Activ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1. Activ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Combien de pièces chez toi ?</text:span></text:p>
              </text:list-item>
              <text:list-item>
                <text:p text:style-name="P6"><text:span text:style-name="T2">Cite 3 meubles dans la classe.</text:span></text:p>
              </text:list-item>
              <text:list-item>
                <text:p text:style-name="P6"><text:span text:style-name="T2">Où est ton cartable : sur, sous, à côté de… ?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Les pièc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Les pièc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la chambre · la cuisine · le salon la salle de bains · les toilettes le couloir · la salle à manger · le jardin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Les meubl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Les meubl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le lit · le bureau · la chaise · l’armoire la table · l’étagère · la fenêtre · la porte le tapis · la lampe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int de langue — « il y a »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Point de langue — « il y a »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3">il y a</text:span><text:span text:style-name="T2"> = </text:span><text:span text:style-name="T4">es gibt</text:span><text:span text:style-name="T2"> (invariable)</text:span></text:p>
            <text:list text:style-name="L3">
              <text:list-item>
                <text:p text:style-name="P3"><text:span text:style-name="T2">Dans ma chambre, </text:span><text:span text:style-name="T3">il y a</text:span><text:span text:style-name="T2"> un lit.</text:span></text:p>
              </text:list-item>
              <text:list-item>
                <text:p text:style-name="P3"><text:span text:style-name="T2">Sur le bureau, </text:span><text:span text:style-name="T3">il y a</text:span><text:span text:style-name="T2"> trois cahiers.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int de langue — Préposition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Point de langue — Préposition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sur · sous · dans · devant · derrière à côté de · entre … et …</text:span></text:p>
            <text:p text:style-name="P3"><text:span text:style-name="T2">Attention : à côté </text:span><text:span text:style-name="T3">du</text:span><text:span text:style-name="T2"> lit · à côté </text:span><text:span text:style-name="T3">des</text:span><text:span text:style-name="T2"> livres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a chambre de Léa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La chambre de Léa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Voici ma chambre. Elle est petite mais lumineuse. Mon lit est à côté de la fenêtre. Sur le bureau, il y a un ordinateur et une lampe. Mes vêtements sont dans l’armoire. Mon chat dort sous le lit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ote culturelle — Un « T3 » ?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Note culturelle — Un « T3 » ?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En France, on dit </text:span><text:span text:style-name="T3">« un T3 »</text:span><text:span text:style-name="T2"> = </text:span><text:span text:style-name="T4">type 3</text:span><text:span text:style-name="T2">.</text:span></text:p>
            <text:p text:style-name="P3"><text:span text:style-name="T2">Le chiffre = les pièces principales (salon + chambres). La cuisine et la salle de bains ne comptent pas.</text:span></text:p>
            <text:p text:style-name="P3"><text:span text:style-name="T2">T2 = salon + 1 chambre · T3 = salon + 2 chambres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3. S’entraîn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3. S’entraîn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Ex. 1 Compréhension du texte</text:span></text:p>
              </text:list-item>
              <text:list-item>
                <text:p text:style-name="P6"><text:span text:style-name="T2">Ex. 2 Prépositions à compléter</text:span></text:p>
              </text:list-item>
              <text:list-item>
                <text:p text:style-name="P6"><text:span text:style-name="T2">Ex. 3 Relier pièce et meuble</text:span></text:p>
              </text:list-item>
              <text:list-item>
                <text:p text:style-name="P6"><text:span text:style-name="T2">Ex. 4 Phrases avec « il y a »</text:span></text:p>
              </text:list-item>
            </text:list>
            <text:p text:style-name="P3"><text:span text:style-name="T2">Différenciation : G (4 prépositions + banque de mots) · M · E (au-dessus de, en face de)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4. Produ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4. Produ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Décris </text:span><text:span text:style-name="T3">ta chambre</text:span><text:span text:style-name="T2"> (~50-60 mots, 5 phrases) :</text:span></text:p>
            <text:list text:style-name="L3">
              <text:list-item>
                <text:p text:style-name="P3"><text:span text:style-name="T2">5 meubles</text:span></text:p>
              </text:list-item>
              <text:list-item>
                <text:p text:style-name="P3"><text:span text:style-name="T2">3 prépositions de lieu</text:span></text:p>
              </text:list-item>
              <text:list-item>
                <text:p text:style-name="P3"><text:span text:style-name="T2">« il y a » (×2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5. Réfléchi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5. Réfléchi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☐ </text:span><text:span text:style-name="T2">6 pièces + 8 meubles</text:span></text:p>
              </text:list-item>
              <text:list-item>
                <text:p text:style-name="P6"><text:span text:style-name="T2">☐ </text:span><text:span text:style-name="T2">5 prépositions de lieu</text:span></text:p>
              </text:list-item>
              <text:list-item>
                <text:p text:style-name="P6"><text:span text:style-name="T2">☐ </text:span><text:span text:style-name="T2">« il y a »</text:span></text:p>
              </text:list-item>
              <text:list-item>
                <text:p text:style-name="P6"><text:span text:style-name="T2">☐ </text:span><text:span text:style-name="T2">décrire ma chambre en 5 phrase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valuation (30 P.)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Évaluation (30 P.)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Tâche 1 Vocabulaire — 10 P.</text:span></text:p>
              </text:list-item>
              <text:list-item>
                <text:p text:style-name="P6"><text:span text:style-name="T2">Tâche 2 Prépositions + « il y a » — 10 P.</text:span></text:p>
              </text:list-item>
              <text:list-item>
                <text:p text:style-name="P6"><text:span text:style-name="T2">Tâche 3 Décris ta chambre (~50 mots) — 10 P.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urc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ourc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Wikipédia, « Appartement » (CC-BY-SA)</text:span></text:p>
              </text:list-item>
              <text:list-item>
                <text:p text:style-name="P6"><text:span text:style-name="T2">Wikipédia, « Taille des logements en France » (CC-BY-SA)</text:span></text:p>
              </text:list-item>
              <text:list-item>
                <text:p text:style-name="P6"><text:span text:style-name="T2">TV5MONDE — apprendre.tv5monde.com (sans affiliation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font-size="33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3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3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9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5pt" fo:hyphenate="false"/>
    </style:style>
    <style:style style:name="MP32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9.428cm" svg:x="1.27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9.428cm" svg:x="12.912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332cm" svg:x="1.27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8.231cm" svg:x="1.27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332cm" svg:x="12.903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8.231cm" svg:x="12.903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9.772cm" svg:x="1.27cm" svg:y="2.9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1.676cm" svg:x="4.979cm" svg:y="11.182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1T15:08:04</meta:creation-date>
    <dc:date>2026-07-21T15:08:04</dc:date>
    <meta:document-statistic meta:object-count="193"/>
    <meta:generator>LibreOffice/24.2.7.2$Linux_X86_64 LibreOffice_project/420$Build-2</meta:generator>
  </office:meta>
</office:document-meta>
</file>