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Mémoire et traumatism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Mémoire et traumatism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2 · Niveau E Introduit par Patrick Modiano (Nobel 2014)</text:span></text:p>
            <text:p text:style-name="P3"><text:span text:style-name="T3">Auteur vivant : on paraphrase, on ne cite pa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littéraire sur la mémoire et le non-dit</text:span></text:p>
              </text:list-item>
              <text:list-item>
                <text:p text:style-name="P6"><text:span text:style-name="T2">Analyser une « enquête mémorielle » (archive, trace, silence)</text:span></text:p>
              </text:list-item>
              <text:list-item>
                <text:p text:style-name="P6"><text:span text:style-name="T2">Situer Modiano et le « devoir de mémoire »</text:span></text:p>
              </text:list-item>
              <text:list-item>
                <text:p text:style-name="P6"><text:span text:style-name="T2">Distinguer imparfait / passé composé / plus-que-parfait</text:span></text:p>
              </text:list-item>
              <text:list-item>
                <text:p text:style-name="P6"><text:span text:style-name="T2">Rédiger une courte enquête mémorielle originale (~40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ans les archives du lycée, Léa trouve une fiche scolaire de 1942.</text:span></text:p>
            <text:list text:style-name="L3">
              <text:list-item>
                <text:p text:style-name="P3"><text:span text:style-name="T2">« Suzanne R. », rue des Lilas — pas de date de sortie, une croix au crayon.</text:span></text:p>
              </text:list-item>
              <text:list-item>
                <text:p text:style-name="P3"><text:span text:style-name="T2">« Comme si la fiche s’était arrêtée toute seule. »</text:span></text:p>
              </text:list-item>
              <text:list-item>
                <text:p text:style-name="P3"><text:span text:style-name="T2">« Tant qu’on lit son nom à voix haute, elle n’a pas complètement disparu. »</text:span></text:p>
              </text:list-item>
            </text:list>
            <text:p text:style-name="P3"><text:span text:style-name="T2">Questions : Qu’est-ce qui suggère une histoire interrompue ? Pourquoi lire le nom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Devoir de mémoire » : qu’est-ce que cela signifie ?</text:span></text:p>
              </text:list-item>
              <text:list-item>
                <text:p text:style-name="P6"><text:span text:style-name="T2">Souvenir personnel vs. mémoire collective</text:span></text:p>
              </text:list-item>
              <text:list-item>
                <text:p text:style-name="P6"><text:span text:style-name="T2">Un lieu peut-il garder une trace ?</text:span></text:p>
              </text:list-item>
              <text:list-item>
                <text:p text:style-name="P6"><text:span text:style-name="T2">Modiano, prix Nobel 2014 : pourquoi honorer un écrivain de la mémoir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5.844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Français</text:span></text:p>
              </table:table-cell>
              <table:table-cell>
                <text:p text:style-name="P7"><text:span text:style-name="T4">Alleman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la mémoire (trouée)</text:span></text:p>
              </table:table-cell>
              <table:table-cell>
                <text:p text:style-name="P7"><text:span text:style-name="T5">das (lückenhafte) Gedächtni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l’oubli</text:span></text:p>
              </table:table-cell>
              <table:table-cell>
                <text:p text:style-name="P7"><text:span text:style-name="T5">das Vergesse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une trace / une archive</text:span></text:p>
              </table:table-cell>
              <table:table-cell>
                <text:p text:style-name="P7"><text:span text:style-name="T5">eine Spur / ein Dokument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un témoin / le silence</text:span></text:p>
              </table:table-cell>
              <table:table-cell>
                <text:p text:style-name="P7"><text:span text:style-name="T5">ein Zeuge / das Schweige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la disparition / le deuil</text:span></text:p>
              </table:table-cell>
              <table:table-cell>
                <text:p text:style-name="P7"><text:span text:style-name="T5">das Verschwinden / die Traue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retrouver la trace de</text:span></text:p>
              </table:table-cell>
              <table:table-cell>
                <text:p text:style-name="P7"><text:span text:style-name="T5">die Spur wiederfinde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6">Trois temps du récit mémoriel</text:span></text:p>
            <text:list text:style-name="L3">
              <text:list-item>
                <text:p text:style-name="P3"><text:span text:style-name="T6">Imparfait</text:span><text:span text:style-name="T2"> — décor, habitude : </text:span><text:span text:style-name="T3">La rue était calme.</text:span></text:p>
              </text:list-item>
              <text:list-item>
                <text:p text:style-name="P3"><text:span text:style-name="T6">Passé composé</text:span><text:span text:style-name="T2"> — l’événement qui rompt : </text:span><text:span text:style-name="T3">Un jour, elle a disparu.</text:span></text:p>
              </text:list-item>
              <text:list-item>
                <text:p text:style-name="P3"><text:span text:style-name="T6">Plus-que-parfait</text:span><text:span text:style-name="T2"> — le fait antérieur : </text:span><text:span text:style-name="T3">Elle avait laissé ses cahiers.</text:span></text:p>
              </text:list-item>
            </text:list>
            <text:p text:style-name="P3"><text:span text:style-name="T2">Dans l’enquête, le plus-que-parfait dit ce qui </text:span><text:span text:style-name="T6">s’était produit avant</text:span><text:span text:style-name="T2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 « La boîte de fer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 « La boîte de fer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boîte de fer que personne n’ouvrait ; la grand-mère change de sujet.</text:span></text:p>
              </text:list-item>
              <text:list-item>
                <text:p text:style-name="P6"><text:span text:style-name="T2">Dedans : une photo jaunie, un ticket de tramway, une enveloppe sans adresse.</text:span></text:p>
              </text:list-item>
              <text:list-item>
                <text:p text:style-name="P6"><text:span text:style-name="T2">Au dos : un prénom, « Rachel », une date interrompue.</text:span></text:p>
              </text:list-item>
              <text:list-item>
                <text:p text:style-name="P6"><text:span text:style-name="T2">« Protéger un silence. » Chercher pour que le prénom « cesse d’être seul »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6">Devoir de mémoire</text:span><text:span text:style-name="T2"> : se souvenir publiquement des victimes.</text:span></text:p>
              </text:list-item>
              <text:list-item>
                <text:p text:style-name="P6"><text:span text:style-name="T6">Lieux de mémoire</text:span><text:span text:style-name="T2"> (Pierre Nora) : monument, plaque, archive comme supports du souvenir.</text:span></text:p>
              </text:list-item>
              <text:list-item>
                <text:p text:style-name="P6"><text:span text:style-name="T6">Modiano</text:span><text:span text:style-name="T2">, </text:span><text:span text:style-name="T3">Dora Bruder</text:span><text:span text:style-name="T2"> (1997) : à partir d’un avis de recherche de 1941, il reconstitue la vie d’une adolescente juive déportée.</text:span></text:p>
              </text:list-item>
              <text:list-item>
                <text:p text:style-name="P6"><text:span text:style-name="T2">Œuvre protégée → paraphrase, pas de citation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7">
              <text:list-item>
                <text:p text:style-name="P6"><text:span text:style-name="T2">Compréhension écrite (texte « La boîte de fer »)</text:span></text:p>
              </text:list-item>
              <text:list-item>
                <text:p text:style-name="P6"><text:span text:style-name="T2">Les temps du passé (imparfait / PC / PQP)</text:span></text:p>
              </text:list-item>
              <text:list-item>
                <text:p text:style-name="P6"><text:span text:style-name="T2">Vocabulaire — associations</text:span></text:p>
              </text:list-item>
              <text:list-item>
                <text:p text:style-name="P6"><text:span text:style-name="T2">Procédés de l’enquête mémorielle + effet</text:span></text:p>
              </text:list-item>
            </text:list>
            <text:p text:style-name="P3"><text:span text:style-name="T2">Différenciation G / M / E · Corrigés dans la fich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6">Enquête mémorielle originale (~400 mots)</text:span></text:p>
            <text:list text:style-name="L3">
              <text:list-item>
                <text:p text:style-name="P3"><text:span text:style-name="T2">une archive fictive (objet-trace)</text:span></text:p>
              </text:list-item>
              <text:list-item>
                <text:p text:style-name="P3"><text:span text:style-name="T2">au moins deux traces (nom, adresse, date, détail)</text:span></text:p>
              </text:list-item>
              <text:list-item>
                <text:p text:style-name="P3"><text:span text:style-name="T2">imparfait + passé composé + plus-que-parfait</text:span></text:p>
              </text:list-item>
              <text:list-item>
                <text:p text:style-name="P3"><text:span text:style-name="T2">une interprétation finale</text:span></text:p>
              </text:list-item>
            </text:list>
            <text:p text:style-name="P3"><text:span text:style-name="T2">Critères : contenu · procédés · temps · langue · longueur (15 pt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texte sur la mémoire et un non-dit</text:span></text:p>
              </text:list-item>
              <text:list-item>
                <text:p text:style-name="P6"><text:span text:style-name="T2">J’analyse deux procédés mémoriels</text:span></text:p>
              </text:list-item>
              <text:list-item>
                <text:p text:style-name="P6"><text:span text:style-name="T2">Je situe Modiano et le devoir de mémoire</text:span></text:p>
              </text:list-item>
              <text:list-item>
                <text:p text:style-name="P6"><text:span text:style-name="T2">Je maîtrise les trois temps du passé</text:span></text:p>
              </text:list-item>
              <text:list-item>
                <text:p text:style-name="P6"><text:span text:style-name="T2">Je rédige une enquête mémorielle origina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6">Tâche 1</text:span><text:span text:style-name="T2"> — Compréhension écrite (10 P.)</text:span></text:p>
              </text:list-item>
              <text:list-item>
                <text:p text:style-name="P6"><text:span text:style-name="T6">Tâche 2</text:span><text:span text:style-name="T2"> — Compétence textuelle et médiatique (12 P.)</text:span></text:p>
              </text:list-item>
              <text:list-item>
                <text:p text:style-name="P6"><text:span text:style-name="T6">Tâche 3</text:span><text:span text:style-name="T2"> — Langue : plus-que-parfait, présent de narration (8 P.)</text:span></text:p>
              </text:list-item>
            </text:list>
            <text:p text:style-name="P3"><text:span text:style-name="T6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trick Modiano — Wikipédia (CC BY-SA)</text:span></text:p>
              </text:list-item>
              <text:list-item>
                <text:p text:style-name="P6"><text:span text:style-name="T2">Dora Bruder — Wikipédia (CC BY-SA)</text:span></text:p>
              </text:list-item>
              <text:list-item>
                <text:p text:style-name="P6"><text:span text:style-name="T2">Devoir de mémoire — Wikipédia (CC BY-SA)</text:span></text:p>
              </text:list-item>
              <text:list-item>
                <text:p text:style-name="P6"><text:span text:style-name="T2">Lieux de mémoire (Pierre Nora) — Wikipédia (CC BY-SA)</text:span></text:p>
              </text:list-item>
            </text:list>
            <text:p text:style-name="P3"><text:span text:style-name="T3">Plateforme indépendante, sans affiliation. Textes de travail : originaux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23</meta:creation-date>
    <dc:date>2026-07-21T16:30:23</dc:date>
    <meta:document-statistic meta:object-count="185"/>
    <meta:generator>LibreOffice/24.2.7.2$Linux_X86_64 LibreOffice_project/420$Build-2</meta:generator>
  </office:meta>
</office:document-meta>
</file>