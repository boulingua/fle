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Monologue : présenter un dossi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Monologue : présenter un dossi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3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tructurer un exposé oral de 10-15 min autour d’une thèse</text:span></text:p>
              </text:list-item>
              <text:list-item>
                <text:p text:style-name="P6"><text:span text:style-name="T2">Enchaîner les idées : connecteurs et transitions (cohésion)</text:span></text:p>
              </text:list-item>
              <text:list-item>
                <text:p text:style-name="P6"><text:span text:style-name="T2">Présenter avec débit, regard, gestion du temps (délivrance)</text:span></text:p>
              </text:list-item>
              <text:list-item>
                <text:p text:style-name="P6"><text:span text:style-name="T2">Rédiger le plan écrit (~500-600 mots) qui soutient l’or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Nadia : « J’ai tout appris par cœur, mais on dirait que je récite une liste. »</text:span></text:p>
            <text:p text:style-name="P3"><text:span text:style-name="T2">Yann : « Le problème, c’est comment tu relies tes idées. Il faut montrer </text:span><text:span text:style-name="T3">le chemin</text:span><text:span text:style-name="T2">. »</text:span></text:p>
            <text:list text:style-name="L3">
              <text:list-item>
                <text:p text:style-name="P3"><text:span text:style-name="T2">Récité ≠ structuré</text:span></text:p>
              </text:list-item>
              <text:list-item>
                <text:p text:style-name="P3"><text:span text:style-name="T2">Les transitions sont les panneaux qui guident l’audito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fait un exposé de plus de 10 min ?</text:span></text:p>
              </text:list-item>
              <text:list-item>
                <text:p text:style-name="P6"><text:span text:style-name="T2">Le plus dur : trouver / organiser / dire les idées ?</text:span></text:p>
              </text:list-item>
              <text:list-item>
                <text:p text:style-name="P6"><text:span text:style-name="T2">À quoi reconnaît-on un exposé bien construit ?</text:span></text:p>
              </text:list-item>
              <text:list-item>
                <text:p text:style-name="P6"><text:span text:style-name="T2">Quels mots de transition connaissez-vous déjà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hèse · axe · transition · connecteur logique</text:span></text:p>
              </text:list-item>
              <text:list-item>
                <text:p text:style-name="P6"><text:span text:style-name="T2">étayer · référence · nuancer · ouverture</text:span></text:p>
              </text:list-item>
              <text:list-item>
                <text:p text:style-name="P6"><text:span text:style-name="T2">débit · prosodie</text:span></text:p>
              </text:list-item>
            </text:list>
            <text:p text:style-name="P3"><text:span text:style-name="T2">Une bonne présentation se voit à ses </text:span><text:span text:style-name="T4">articulations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rdre : d’abord, ensuite, enfin</text:span></text:p>
              </text:list-item>
              <text:list-item>
                <text:p text:style-name="P6"><text:span text:style-name="T2">Addition : de plus, par ailleurs</text:span></text:p>
              </text:list-item>
              <text:list-item>
                <text:p text:style-name="P6"><text:span text:style-name="T2">Cause / conséquence : car, en effet, ainsi, par conséquent</text:span></text:p>
              </text:list-item>
              <text:list-item>
                <text:p text:style-name="P6"><text:span text:style-name="T2">Opposition : mais, cependant, toutefois, certes… mais</text:span></text:p>
              </text:list-item>
              <text:list-item>
                <text:p text:style-name="P6"><text:span text:style-name="T2">Reformulation : autrement dit, c’est-à-dire</text:span></text:p>
              </text:list-item>
              <text:list-item>
                <text:p text:style-name="P6"><text:span text:style-name="T2">Conclusion : en somme, en définitive</text:span></text:p>
              </text:list-item>
            </text:list>
            <text:p text:style-name="P3"><text:span text:style-name="T2">Entre deux axes : une </text:span><text:span text:style-name="T4">phrase</text:span><text:span text:style-name="T2"> de transition, pas un seul mo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dossier-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dossier-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« Maupassant : le regard qui déshabille la société »</text:span></text:p>
            <text:list text:style-name="L3">
              <text:list-item>
                <text:p text:style-name="P3"><text:span text:style-name="T4">Thèse :</text:span><text:span text:style-name="T2"> son réalisme observe pour dénoncer</text:span></text:p>
              </text:list-item>
              <text:list-item>
                <text:p text:style-name="P3"><text:span text:style-name="T4">I.</text:span><text:span text:style-name="T2"> Le regard social — </text:span><text:span text:style-name="T3">Boule de suif</text:span><text:span text:style-name="T2"> (1880)</text:span></text:p>
              </text:list-item>
              <text:list-item>
                <text:p text:style-name="P3"><text:span text:style-name="T4">II.</text:span><text:span text:style-name="T2"> La mécanique de l’hypocrisie — </text:span><text:span text:style-name="T3">Bel-Ami</text:span><text:span text:style-name="T2"> (1885)</text:span></text:p>
              </text:list-item>
              <text:list-item>
                <text:p text:style-name="P3"><text:span text:style-name="T4">III.</text:span><text:span text:style-name="T2"> La fêlure intérieure — </text:span><text:span text:style-name="T3">Le Horla</text:span><text:span text:style-name="T2"> (1887)</text:span></text:p>
              </text:list-item>
              <text:list-item>
                <text:p text:style-name="P3"><text:span text:style-name="T4">Ouverture :</text:span><text:span text:style-name="T2"> le roman réaliste, miroir ou prise de positio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aupassant (1850-1893), maître de la </text:span><text:span text:style-name="T4">nouvelle</text:span></text:p>
              </text:list-item>
              <text:list-item>
                <text:p text:style-name="P6"><text:span text:style-name="T2">Réaliste et naturaliste ; élève de Flaubert, proche de Zola</text:span></text:p>
              </text:list-item>
              <text:list-item>
                <text:p text:style-name="P6"><text:span text:style-name="T2">Œuvres dans le </text:span><text:span text:style-name="T4">domaine public</text:span><text:span text:style-name="T2"> → citation libre</text:span></text:p>
              </text:list-item>
            </text:list>
            <text:p text:style-name="P3"><text:span text:style-name="T2">Source : Wikipédia (CC BY-SA) ; Wikisource (domaine public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Repérer la structure du dossier-modèle</text:span></text:p>
              </text:list-item>
              <text:list-item>
                <text:p text:style-name="P6"><text:span text:style-name="T2">Classer huit connecteurs par fonction</text:span></text:p>
              </text:list-item>
              <text:list-item>
                <text:p text:style-name="P6"><text:span text:style-name="T2">Combler une transition (phrase complète)</text:span></text:p>
              </text:list-item>
              <text:list-item>
                <text:p text:style-name="P6"><text:span text:style-name="T2">Plan-éclair : </text:span><text:span text:style-name="T3">Le fantastique chez Maupassant</text:span></text:p>
              </text:list-item>
            </text:list>
            <text:p text:style-name="P3"><text:span text:style-name="T2">Différenciation : G (liste fournie) · M (thèse + 3 axes) · E (ouverture + 2 réf. / ax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teur·e du </text:span><text:span text:style-name="T4">domaine public</text:span><text:span text:style-name="T2">.</text:span></text:p>
            <text:list text:style-name="L5">
              <text:list-item>
                <text:p text:style-name="P3"><text:span text:style-name="T2">Écrit : plan ~500-600 mots (thèse, 3 axes, 6 réf., 5 transitions, ouverture)</text:span></text:p>
              </text:list-item>
              <text:list-item>
                <text:p text:style-name="P3"><text:span text:style-name="T2">Oral : 10-15 min, sans lire ses notes</text:span></text:p>
              </text:list-item>
            </text:list>
            <text:p text:style-name="P3"><text:span text:style-name="T2">Critères : structure · cohésion · contenu · prosodie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Ma thèse tient en une phrase</text:span></text:p>
              </text:list-item>
              <text:list-item>
                <text:p text:style-name="P6"><text:span text:style-name="T2">☐ </text:span><text:span text:style-name="T2">Trois axes distincts et équilibrés</text:span></text:p>
              </text:list-item>
              <text:list-item>
                <text:p text:style-name="P6"><text:span text:style-name="T2">☐ </text:span><text:span text:style-name="T2">Une transition entre chaque axe</text:span></text:p>
              </text:list-item>
              <text:list-item>
                <text:p text:style-name="P6"><text:span text:style-name="T2">☐ </text:span><text:span text:style-name="T2">Connecteurs variés, non répétés</text:span></text:p>
              </text:list-item>
              <text:list-item>
                <text:p text:style-name="P6"><text:span text:style-name="T2">☐ </text:span><text:span text:style-name="T2">10-15 min sans lire</text:span></text:p>
              </text:list-item>
              <text:list-item>
                <text:p text:style-name="P6"><text:span text:style-name="T2">☐ </text:span><text:span text:style-name="T2">Regard adressé, débit maîtris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Épreuve orale (Leistungsfach — classe 13)</text:span></text:p>
            <text:list text:style-name="L3">
              <text:list-item>
                <text:p text:style-name="P3"><text:span text:style-name="T4">Phase 1 — Monologue (15 P.) :</text:span><text:span text:style-name="T2"> dossier 10-15 min</text:span></text:p>
              </text:list-item>
              <text:list-item>
                <text:p text:style-name="P3"><text:span text:style-name="T4">Phase 2 — Dialogue (15 P.) :</text:span><text:span text:style-name="T2"> questions env. 5 min</text:span></text:p>
              </text:list-item>
            </text:list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Guy de Maupassant</text:span><text:span text:style-name="T2"> — Wikipédia (2026), CC BY-SA 4.0</text:span></text:p>
              </text:list-item>
              <text:list-item>
                <text:p text:style-name="P6"><text:span text:style-name="T3">Pierre et Jean</text:span><text:span text:style-name="T2">, préface — Maupassant (1888), domaine public (Wikisource)</text:span></text:p>
              </text:list-item>
              <text:list-item>
                <text:p text:style-name="P6"><text:span text:style-name="T3">Nouvelle (littérature)</text:span><text:span text:style-name="T2"> — Wikipédia (2026)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1:00</meta:creation-date>
    <dc:date>2026-07-21T16:31:00</dc:date>
    <meta:document-statistic meta:object-count="185"/>
    <meta:generator>LibreOffice/24.2.7.2$Linux_X86_64 LibreOffice_project/420$Build-2</meta:generator>
  </office:meta>
</office:document-meta>
</file>