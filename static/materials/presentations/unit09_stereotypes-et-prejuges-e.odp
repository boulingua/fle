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9 — Stéréotypes et préjugé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9 — Stéréotypes et préjugé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E · classe 8 · Niveau E</text:span></text:p>
            <text:p text:style-name="P3"><text:span text:style-name="T2">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Distinguer stéréotype et préjugé</text:span></text:p>
              </text:list-item>
              <text:list-item>
                <text:p text:style-name="P6"><text:span text:style-name="T2">Nuancer un cliché avec des connecteurs</text:span></text:p>
              </text:list-item>
              <text:list-item>
                <text:p text:style-name="P6"><text:span text:style-name="T2">Interagir dans un dialogue respectueux</text:span></text:p>
              </text:list-item>
              <text:list-item>
                <text:p text:style-name="P6"><text:span text:style-name="T2">Rédiger un texte qui déconstruit un stéréotype</text:span></text:p>
              </text:list-item>
              <text:list-item>
                <text:p text:style-name="P6"><text:span text:style-name="T2">Employer le conditionnel présent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Dans la cour, avant le sport.</text:span></text:p>
            <text:p text:style-name="P3"><text:span text:style-name="T3">Léa :</text:span><text:span text:style-name="T2"> La nouvelle vient d’Espagne — elle doit adorer la sieste, c’est sûr !</text:span></text:p>
            <text:p text:style-name="P3"><text:span text:style-name="T3">Yanis :</text:span><text:span text:style-name="T2"> Tu ne la connais même pas. Et si on lui demandait, à elle ?</text:span></text:p>
            <text:p text:style-name="P3"><text:span text:style-name="T2">→ </text:span><text:span text:style-name="T2">Léa parle d’une personne ou d’un groupe ?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Un stéréotype sur les Français ? Sur les Allemands ?</text:span></text:p>
              </text:list-item>
              <text:list-item>
                <text:p text:style-name="P6"><text:span text:style-name="T2">Stéréotype ≠ préjugé : quelle différence ?</text:span></text:p>
              </text:list-item>
              <text:list-item>
                <text:p text:style-name="P6"><text:span text:style-name="T2">Un stéréotype peut-il être positif ?</text:span></text:p>
              </text:list-item>
              <text:list-item>
                <text:p text:style-name="P6"><text:span text:style-name="T2">« On dit souvent que… mais en réalité… »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un stéréotype = image toute faite d’un groupe</text:span></text:p>
              </text:list-item>
              <text:list-item>
                <text:p text:style-name="P6"><text:span text:style-name="T2">un préjugé = jugement négatif avant de connaître</text:span></text:p>
              </text:list-item>
              <text:list-item>
                <text:p text:style-name="P6"><text:span text:style-name="T2">un cliché = idée banale, très répétée</text:span></text:p>
              </text:list-item>
              <text:list-item>
                <text:p text:style-name="P6"><text:span text:style-name="T2">généraliser · nuancer · remettre en question</text:span></text:p>
              </text:list-item>
              <text:list-item>
                <text:p text:style-name="P6"><text:span text:style-name="T2">une part de vérité · le respect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Le conditionnel présen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Le conditionnel présen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Radical du futur + terminaisons de l’imparfait</text:span></text:p>
            <text:list text:style-name="L3">
              <text:list-item>
                <text:p text:style-name="P3"><text:span text:style-name="T2">j’aimerais · nous aimerions</text:span></text:p>
              </text:list-item>
              <text:list-item>
                <text:p text:style-name="P3"><text:span text:style-name="T2">je serais · je pourrais · j’aurais</text:span></text:p>
              </text:list-item>
            </text:list>
            <text:p text:style-name="P3"><text:span text:style-name="T2">Usages : politesse et hypothèse</text:span></text:p>
            <text:p text:style-name="P3"><text:span text:style-name="T2">Attention : </text:span><text:span text:style-name="T4">je verrai</text:span><text:span text:style-name="T2"> (futur) ≠ </text:span><text:span text:style-name="T4">je verrais</text:span><text:span text:style-name="T2"> (conditionnel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Karim et Anouk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Karim et Anouk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3">Karim :</text:span><text:span text:style-name="T2"> « Tous les Allemands seraient disciplinés. » Un cliché ?</text:span></text:p>
            <text:p text:style-name="P3"><text:span text:style-name="T3">Anouk :</text:span><text:span text:style-name="T2"> Un stéréotype. Certes, mais moi, je suis la reine du désordre !</text:span></text:p>
            <text:p text:style-name="P3"><text:span text:style-name="T3">Karim :</text:span><text:span text:style-name="T2"> Comme « les Français, toujours en grève ».</text:span></text:p>
            <text:p text:style-name="P3"><text:span text:style-name="T3">Anouk :</text:span><text:span text:style-name="T2"> Une part de vérité, mais ça généralise trop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Note culturel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Note culturel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« Stéréotype » vient de l’imprimerie : une plaque fixe, toujours la même image</text:span></text:p>
              </text:list-item>
              <text:list-item>
                <text:p text:style-name="P6"><text:span text:style-name="T2">Walter Lippmann, 1922 : les « images dans nos têtes »</text:span></text:p>
              </text:list-item>
              <text:list-item>
                <text:p text:style-name="P6"><text:span text:style-name="T2">Stéréotype (croyance) → préjugé (attitude) → discrimination (comportement)</text:span></text:p>
              </text:list-item>
            </text:list>
            <text:p text:style-name="P3"><text:span text:style-name="T4">(Wikipédia FR, CC BY-SA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— Compréhension du texte</text:span></text:p>
              </text:list-item>
              <text:list-item>
                <text:p text:style-name="P6"><text:span text:style-name="T2">Ex. 2 — Stéréotype ou préjugé ?</text:span></text:p>
              </text:list-item>
              <text:list-item>
                <text:p text:style-name="P6"><text:span text:style-name="T2">Ex. 3 — Conjuguer au conditionnel</text:span></text:p>
              </text:list-item>
              <text:list-item>
                <text:p text:style-name="P6"><text:span text:style-name="T2">Ex. 4 — Nuancer avec un connecteur</text:span></text:p>
              </text:list-item>
            </text:list>
            <text:p text:style-name="P3"><text:span text:style-name="T2">Différenciation G / M / 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En binôme, ~10 répliques :</text:span></text:p>
            <text:p text:style-name="P3"><text:span text:style-name="T2">Trois stéréotypes (FR / DE / libre), pour chacun :</text:span></text:p>
            <text:list text:style-name="L5">
              <text:list-item>
                <text:p text:style-name="P3"><text:span text:style-name="T2">une phrase « cliché »</text:span></text:p>
              </text:list-item>
              <text:list-item>
                <text:p text:style-name="P3"><text:span text:style-name="T2">une nuance avec connecteur</text:span></text:p>
              </text:list-item>
              <text:list-item>
                <text:p text:style-name="P3"><text:span text:style-name="T2">une phrase au conditionnel</text:span></text:p>
              </text:list-item>
            </text:list>
            <text:p text:style-name="P3"><text:span text:style-name="T2">Ton </text:span><text:span text:style-name="T3">respectueux</text:span><text:span text:style-name="T2"> : on questionne l’idée, pas la personne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Je distingue stéréotype et préjugé</text:span></text:p>
              </text:list-item>
              <text:list-item>
                <text:p text:style-name="P6"><text:span text:style-name="T2">J’ai utilisé 5 conditionnels</text:span></text:p>
              </text:list-item>
              <text:list-item>
                <text:p text:style-name="P6"><text:span text:style-name="T2">J’ai nuancé avec 3 connecteurs</text:span></text:p>
              </text:list-item>
              <text:list-item>
                <text:p text:style-name="P6"><text:span text:style-name="T2">J’ai gardé un ton respectueux</text:span></text:p>
              </text:list-item>
              <text:list-item>
                <text:p text:style-name="P6"><text:span text:style-name="T2">Je sais dépasser un préjugé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âche 1 — Compréhension écrite (8 P.)</text:span></text:p>
              </text:list-item>
              <text:list-item>
                <text:p text:style-name="P6"><text:span text:style-name="T2">Tâche 2 — Conditionnel (7 P.)</text:span></text:p>
              </text:list-item>
              <text:list-item>
                <text:p text:style-name="P6"><text:span text:style-name="T2">Tâche 3 — Expression écrite ~120 mots (15 P.)</text:span></text:p>
              </text:list-item>
            </text:list>
            <text:p text:style-name="P3"><text:span text:style-name="T3">Total : 30 P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Wikipédia FR — « Stéréotype » (CC BY-SA)</text:span></text:p>
              </text:list-item>
              <text:list-item>
                <text:p text:style-name="P6"><text:span text:style-name="T2">Wikipédia FR — « Préjugé » (CC BY-SA)</text:span></text:p>
              </text:list-item>
              <text:list-item>
                <text:p text:style-name="P6"><text:span text:style-name="T2">Wikipédia FR — « Walter Lippmann » (CC BY-SA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6:11:24</meta:creation-date>
    <dc:date>2026-07-21T16:11:24</dc:date>
    <meta:document-statistic meta:object-count="185"/>
    <meta:generator>LibreOffice/24.2.7.2$Linux_X86_64 LibreOffice_project/420$Build-2</meta:generator>
  </office:meta>
</office:document-meta>
</file>