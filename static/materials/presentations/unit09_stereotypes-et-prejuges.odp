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Stéréotypes et préjugé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Stéréotypes et préjugé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8 · Niveau M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stéréotype, préjugé, discrimination</text:span></text:p>
              </text:list-item>
              <text:list-item>
                <text:p text:style-name="P6"><text:span text:style-name="T2">Nommer des clichés sans les renforcer</text:span></text:p>
              </text:list-item>
              <text:list-item>
                <text:p text:style-name="P6"><text:span text:style-name="T2">Relativiser : </text:span><text:span text:style-name="T3">pas tous · cela dépend · la plupart</text:span></text:p>
              </text:list-item>
              <text:list-item>
                <text:p text:style-name="P6"><text:span text:style-name="T2">Mener un mini-dialogue poli de 3 min</text:span></text:p>
              </text:list-item>
              <text:list-item>
                <text:p text:style-name="P6"><text:span text:style-name="T2">Écrire un court texte qui questionne un clich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À la cantine, avant un échange scolaire : - « On va manger des saucisses tous les jours ? » - « Ma corres est végétarienne ! » - « Tous les Français parlent doucement ? Mon oncle crie ! » - « Dès qu’on dit </text:span><text:span text:style-name="T3">tous</text:span><text:span text:style-name="T2"> ou </text:span><text:span text:style-name="T3">toujours</text:span><text:span text:style-name="T2">, on se tromp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clichés sur les Français ?</text:span></text:p>
              </text:list-item>
              <text:list-item>
                <text:p text:style-name="P6"><text:span text:style-name="T2">Trois clichés sur les Allemands ?</text:span></text:p>
              </text:list-item>
              <text:list-item>
                <text:p text:style-name="P6"><text:span text:style-name="T2">D’où viennent ces images ?</text:span></text:p>
              </text:list-item>
              <text:list-item>
                <text:p text:style-name="P6"><text:span text:style-name="T2">Connaissez-vous quelqu’un qui les contredit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stéréotype — das Stereotyp</text:span></text:p>
              </text:list-item>
              <text:list-item>
                <text:p text:style-name="P6"><text:span text:style-name="T2">un préjugé — das Vorurteil</text:span></text:p>
              </text:list-item>
              <text:list-item>
                <text:p text:style-name="P6"><text:span text:style-name="T2">la discrimination — die Diskriminierung</text:span></text:p>
              </text:list-item>
              <text:list-item>
                <text:p text:style-name="P6"><text:span text:style-name="T2">relativiser / nuancer — relativieren / differenzieren</text:span></text:p>
              </text:list-item>
              <text:list-item>
                <text:p text:style-name="P6"><text:span text:style-name="T2">un contre-exemple — das Gegenbeispie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rop large : </text:span><text:span text:style-name="T3">tous les… · toujours · jamais</text:span><text:span text:style-name="T2"> Nuancé : </text:span><text:span text:style-name="T3">la plupart · beaucoup de · certains · peu de</text:span><text:span text:style-name="T2"> Négation nuance : </text:span><text:span text:style-name="T3">ne… pas tous · ne… pas toujours</text:span><text:span text:style-name="T2"> Accord : tou</text:span><text:span text:style-name="T4">s</text:span><text:span text:style-name="T2"> les garçon</text:span><text:span text:style-name="T4">s</text:span><text:span text:style-name="T2"> / tou</text:span><text:span text:style-name="T4">tes</text:span><text:span text:style-name="T2"> les fille</text:span><text:span text:style-name="T4">s</text:span><text:span text:style-name="T2"> </text:span><text:span text:style-name="T3">le</text:span><text:span text:style-name="T2"> stéréotype, </text:span><text:span text:style-name="T3">un</text:span><text:span text:style-name="T2"> préjugé (masculin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téréotype = croyance descriptive sur un groupe</text:span></text:p>
              </text:list-item>
              <text:list-item>
                <text:p text:style-name="P6"><text:span text:style-name="T2">Préjugé = attitude (souvent négative) — Allport, 1954</text:span></text:p>
              </text:list-item>
              <text:list-item>
                <text:p text:style-name="P6"><text:span text:style-name="T2">Discrimination = un acte concret</text:span></text:p>
              </text:list-item>
              <text:list-item>
                <text:p text:style-name="P6"><text:span text:style-name="T2">À l’origine : la catégorisation </text:span><text:span text:style-name="T3">(D’après Wikipédia, CC BY-SA 4.0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S, P ou D ?</text:span></text:p>
              </text:list-item>
              <text:list-item>
                <text:p text:style-name="P6"><text:span text:style-name="T2">Ex. 2 : relativiser des phrases</text:span></text:p>
              </text:list-item>
              <text:list-item>
                <text:p text:style-name="P6"><text:span text:style-name="T2">Ex. 3 : accord de </text:span><text:span text:style-name="T3">tout</text:span></text:p>
              </text:list-item>
              <text:list-item>
                <text:p text:style-name="P6"><text:span text:style-name="T2">Ex. 4 : compléter un mini-dialogue 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alogue 3 min en binôme : - A énonce un cliché - B réagit sans se moquer : 2 expressions + 1 question de relance - On échange les rôles Critères : tâche · langue · interac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tingue les trois notions</text:span></text:p>
              </text:list-item>
              <text:list-item>
                <text:p text:style-name="P6"><text:span text:style-name="T2">☐ </text:span><text:span text:style-name="T2">Je relativise une généralisation</text:span></text:p>
              </text:list-item>
              <text:list-item>
                <text:p text:style-name="P6"><text:span text:style-name="T2">☐ </text:span><text:span text:style-name="T2">J’accorde </text:span><text:span text:style-name="T3">tous / toutes</text:span></text:p>
              </text:list-item>
              <text:list-item>
                <text:p text:style-name="P6"><text:span text:style-name="T2">☐ </text:span><text:span text:style-name="T2">Je mène un dialogue de 3 min</text:span></text:p>
              </text:list-item>
              <text:list-item>
                <text:p text:style-name="P6"><text:span text:style-name="T2">☐ </text:span><text:span text:style-name="T2">J’écris un texte qui questionne un clich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notions S / P / D (8 P.)</text:span></text:p>
              </text:list-item>
              <text:list-item>
                <text:p text:style-name="P6"><text:span text:style-name="T2">Tâche 2 : dialogue oral (12 P.)</text:span></text:p>
              </text:list-item>
              <text:list-item>
                <text:p text:style-name="P6"><text:span text:style-name="T2">Tâche 3 : écrit, 6 phrases (10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Préjugé (psychologie) » — Wikipédia, CC BY-SA 4.0</text:span></text:p>
              </text:list-item>
              <text:list-item>
                <text:p text:style-name="P6"><text:span text:style-name="T2">« Stéréotype » — Wikipédia, CC BY-SA 4.0</text:span></text:p>
              </text:list-item>
              <text:list-item>
                <text:p text:style-name="P6"><text:span text:style-name="T2">Psychologie-sociale.com (référence, paraphras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00</meta:creation-date>
    <dc:date>2026-07-21T15:34:00</dc:date>
    <meta:document-statistic meta:object-count="181"/>
    <meta:generator>LibreOffice/24.2.7.2$Linux_X86_64 LibreOffice_project/420$Build-2</meta:generator>
  </office:meta>
</office:document-meta>
</file>