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rgumenter en public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rgumenter en public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10 · Parcours E · Classe 12 · Niveau E</text:span></text:p>
            <text:p text:style-name="P3"><text:span text:style-name="T2">Épreuve communicative : monologue + intera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ésenter mon point de vue ~5 min en continu</text:span></text:p>
              </text:list-item>
              <text:list-item>
                <text:p text:style-name="P6"><text:span text:style-name="T2">Structurer une argumentation (connecteurs)</text:span></text:p>
              </text:list-item>
              <text:list-item>
                <text:p text:style-name="P6"><text:span text:style-name="T2">Prendre part à un débat : défendre, concéder, nuancer</text:span></text:p>
              </text:list-item>
              <text:list-item>
                <text:p text:style-name="P6"><text:span text:style-name="T2">Réagir spontanément aux questions</text:span></text:p>
              </text:list-item>
              <text:list-item>
                <text:p text:style-name="P6"><text:span text:style-name="T2">Évaluer une prise de paro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héo : le monologue, ça allait — mais dès la première question, j’ai bloqué.</text:span></text:p>
            <text:p text:style-name="P3"><text:span text:style-name="T2">Naïma : moi c’est l’inverse. Le dialogue me sauve ; tenir 5 min seule, c’est le plus dur.</text:span></text:p>
            <text:p text:style-name="P3"><text:span text:style-name="T2">Il nous manque des « phrases-outils »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format : combien de temps de monologue, combien d’échange ?</text:span></text:p>
              </text:list-item>
              <text:list-item>
                <text:p text:style-name="P6"><text:span text:style-name="T2">Quels mots de liaison utilisez-vous déjà ?</text:span></text:p>
              </text:list-item>
              <text:list-item>
                <text:p text:style-name="P6"><text:span text:style-name="T2">Que faites-vous quand vous cherchez vos mots ?</text:span></text:p>
              </text:list-item>
              <text:list-item>
                <text:p text:style-name="P6"><text:span text:style-name="T2">Sur quel sujet parleriez-vous 5 min sans prépare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Annoncer :</text:span><text:span text:style-name="T2"> tout d’abord, en premier lieu</text:span></text:p>
              </text:list-item>
              <text:list-item>
                <text:p text:style-name="P6"><text:span text:style-name="T3">Ajouter :</text:span><text:span text:style-name="T2"> par ailleurs, de plus</text:span></text:p>
              </text:list-item>
              <text:list-item>
                <text:p text:style-name="P6"><text:span text:style-name="T3">Opposer :</text:span><text:span text:style-name="T2"> en revanche, cependant</text:span></text:p>
              </text:list-item>
              <text:list-item>
                <text:p text:style-name="P6"><text:span text:style-name="T3">Illustrer :</text:span><text:span text:style-name="T2"> par exemple, ainsi</text:span></text:p>
              </text:list-item>
              <text:list-item>
                <text:p text:style-name="P6"><text:span text:style-name="T3">Concéder :</text:span><text:span text:style-name="T2"> certes… mais</text:span></text:p>
              </text:list-item>
              <text:list-item>
                <text:p text:style-name="P6"><text:span text:style-name="T3">Conclure :</text:span><text:span text:style-name="T2"> en somme, pour concl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Organiser :</text:span><text:span text:style-name="T2"> d’abord → ensuite → enfin ; car → donc ; mais / pourtant</text:span></text:p>
              </text:list-item>
              <text:list-item>
                <text:p text:style-name="P6"><text:span text:style-name="T3">Opinion + indicatif :</text:span><text:span text:style-name="T2"> </text:span><text:span text:style-name="T4">je pense que c’est utile</text:span></text:p>
              </text:list-item>
              <text:list-item>
                <text:p text:style-name="P6"><text:span text:style-name="T3">Doute / volonté + subjonctif :</text:span><text:span text:style-name="T2"> </text:span><text:span text:style-name="T4">je ne pense pas que ce soit utile</text:span><text:span text:style-name="T2"> ; </text:span><text:span text:style-name="T4">il faut que nous prenions position</text:span></text:p>
              </text:list-item>
            </text:list>
            <text:p text:style-name="P3"><text:span text:style-name="T2">Un connecteur en tête de phrase = une seconde pour réfléchi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 plan de monolo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 plan de monolo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ujet : interdire les téléphones au lycée ?</text:span></text:p>
            <text:list text:style-name="L5">
              <text:list-item>
                <text:p text:style-name="P3"><text:span text:style-name="T2">Introduction + thèse</text:span></text:p>
              </text:list-item>
              <text:list-item>
                <text:p text:style-name="P3"><text:span text:style-name="T2">Argument 1 : outil de travail</text:span></text:p>
              </text:list-item>
              <text:list-item>
                <text:p text:style-name="P3"><text:span text:style-name="T2">Argument 2 : interdiction inapplicable</text:span></text:p>
              </text:list-item>
              <text:list-item>
                <text:p text:style-name="P3"><text:span text:style-name="T2">Concession : certes, distraction… mais éducation</text:span></text:p>
              </text:list-item>
              <text:list-item>
                <text:p text:style-name="P3"><text:span text:style-name="T2">Conclusion qui rela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Sengho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Sengho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oète et premier président du Sénégal (1960-1980)</text:span></text:p>
              </text:list-item>
              <text:list-item>
                <text:p text:style-name="P6"><text:span text:style-name="T2">Co-fondateur de la Négritude (avec Césaire, Damas)</text:span></text:p>
              </text:list-item>
              <text:list-item>
                <text:p text:style-name="P6"><text:span text:style-name="T2">Premier Africain à l’Académie française (1983)</text:span></text:p>
              </text:list-item>
              <text:list-item>
                <text:p text:style-name="P6"><text:span text:style-name="T2">La parole comme engagement public</text:span></text:p>
              </text:list-item>
              <text:list-item>
                <text:p text:style-name="P6"><text:span text:style-name="T2">Aujourd’hui : l’OIF et la francophonie mondiale</text:span></text:p>
              </text:list-item>
            </text:list>
            <text:p text:style-name="P3"><text:span text:style-name="T4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plan</text:span></text:p>
              </text:list-item>
              <text:list-item>
                <text:p text:style-name="P6"><text:span text:style-name="T2">Ex. 2 : choisir le bon connecteur</text:span></text:p>
              </text:list-item>
              <text:list-item>
                <text:p text:style-name="P6"><text:span text:style-name="T2">Ex. 3 : indicatif ou subjonctif ?</text:span></text:p>
              </text:list-item>
              <text:list-item>
                <text:p text:style-name="P6"><text:span text:style-name="T2">Ex. 4 : nommer la stratégie de rebond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atégies de rebond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tratégies de rebond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Reformuler :</text:span><text:span text:style-name="T2"> </text:span><text:span text:style-name="T4">Si je comprends bien…</text:span></text:p>
              </text:list-item>
              <text:list-item>
                <text:p text:style-name="P6"><text:span text:style-name="T3">Préciser :</text:span><text:span text:style-name="T2"> </text:span><text:span text:style-name="T4">Pouvez-vous préciser ?</text:span></text:p>
              </text:list-item>
              <text:list-item>
                <text:p text:style-name="P6"><text:span text:style-name="T3">Concéder + nuancer :</text:span><text:span text:style-name="T2"> </text:span><text:span text:style-name="T4">Certes, mais…</text:span></text:p>
              </text:list-item>
              <text:list-item>
                <text:p text:style-name="P6"><text:span text:style-name="T3">Illustrer :</text:span><text:span text:style-name="T2"> </text:span><text:span text:style-name="T4">Prenons par exemple…</text:span></text:p>
              </text:list-item>
              <text:list-item>
                <text:p text:style-name="P6"><text:span text:style-name="T3">Relancer :</text:span><text:span text:style-name="T2"> </text:span><text:span text:style-name="T4">Cela pose une autre question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onologue ~5 min + dialogue 5-10 min sur un sujet de société.</text:span></text:p>
            <text:p text:style-name="P3"><text:span text:style-name="T2">Critères : contenu · langue · interaction · fluidité</text:span></text:p>
            <text:p text:style-name="P3"><text:span text:style-name="T2">Rôles : orateur / examinateur / observateu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parle 5 min en continu</text:span></text:p>
              </text:list-item>
              <text:list-item>
                <text:p text:style-name="P6"><text:span text:style-name="T2">☐ </text:span><text:span text:style-name="T2">J’utilise des connecteurs variés</text:span></text:p>
              </text:list-item>
              <text:list-item>
                <text:p text:style-name="P6"><text:span text:style-name="T2">☐ </text:span><text:span text:style-name="T2">Je distingue indicatif / subjonctif</text:span></text:p>
              </text:list-item>
              <text:list-item>
                <text:p text:style-name="P6"><text:span text:style-name="T2">☐ </text:span><text:span text:style-name="T2">J’ai 3 stratégies de rebond</text:span></text:p>
              </text:list-item>
              <text:list-item>
                <text:p text:style-name="P6"><text:span text:style-name="T2">☐ </text:span><text:span text:style-name="T2">Je concède sans abandonner ma posi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Phase 1 — Monologue :</text:span><text:span text:style-name="T2"> ~5 min (15 pts)</text:span></text:p>
              </text:list-item>
              <text:list-item>
                <text:p text:style-name="P6"><text:span text:style-name="T3">Phase 2 — Dialogue :</text:span><text:span text:style-name="T2"> ~10 min (15 pts)</text:span></text:p>
              </text:list-item>
            </text:list>
            <text:p text:style-name="P3"><text:span text:style-name="T2">Barème /30 : structure 8 · langue 8 · interaction 8 · fluidité 6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enghor — Wikipédia (CC BY-SA)</text:span></text:p>
              </text:list-item>
              <text:list-item>
                <text:p text:style-name="P6"><text:span text:style-name="T2">Négritude — Wikipédia (CC BY-SA)</text:span></text:p>
              </text:list-item>
              <text:list-item>
                <text:p text:style-name="P6"><text:span text:style-name="T2">OIF — Wikipédia (CC BY-SA)</text:span></text:p>
              </text:list-item>
              <text:list-item>
                <text:p text:style-name="P6"><text:span text:style-name="T2">Bildungsplan 2016 BW — bildungsplaene-bw.d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26</meta:creation-date>
    <dc:date>2026-07-21T16:30:26</dc:date>
    <meta:document-statistic meta:object-count="189"/>
    <meta:generator>LibreOffice/24.2.7.2$Linux_X86_64 LibreOffice_project/420$Build-2</meta:generator>
  </office:meta>
</office:document-meta>
</file>