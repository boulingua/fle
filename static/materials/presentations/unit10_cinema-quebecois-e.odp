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Cinéma québéco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Cinéma québéco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8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l’essentiel d’une présentation orale de film</text:span></text:p>
              </text:list-item>
              <text:list-item>
                <text:p text:style-name="P6"><text:span text:style-name="T2">Situer le cinéma québécois dans la francophonie</text:span></text:p>
              </text:list-item>
              <text:list-item>
                <text:p text:style-name="P6"><text:span text:style-name="T2">Présenter un film en continu (~90 s)</text:span></text:p>
              </text:list-item>
              <text:list-item>
                <text:p text:style-name="P6"><text:span text:style-name="T2">Exprimer une opinion nuancée</text:span></text:p>
              </text:list-item>
              <text:list-item>
                <text:p text:style-name="P6"><text:span text:style-name="T2">Reconnaître quelques traits du français québéco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ina &amp; Théo, à la sortie d’un atelier « francophonie ».</text:span></text:p>
            <text:list text:style-name="L3">
              <text:list-item>
                <text:p text:style-name="P3"><text:span text:style-name="T2">Contrainte : parler d’un film </text:span><text:span text:style-name="T3">sans montrer d’extrait</text:span></text:p>
              </text:list-item>
              <text:list-item>
                <text:p text:style-name="P3"><text:span text:style-name="T2">Difficulté : l’</text:span><text:span text:style-name="T3">accent</text:span><text:span text:style-name="T2"> québécois, différent de Paris</text:span></text:p>
              </text:list-item>
              <text:list-item>
                <text:p text:style-name="P3"><text:span text:style-name="T2">Objectif : présenter en continu, </text:span><text:span text:style-name="T3">sans lire ses not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s films </text:span><text:span text:style-name="T3">francophones</text:span><text:span text:style-name="T2"> connaissez-vous ?</text:span></text:p>
              </text:list-item>
              <text:list-item>
                <text:p text:style-name="P6"><text:span text:style-name="T2">En quoi le </text:span><text:span text:style-name="T3">français du Québec</text:span><text:span text:style-name="T2"> peut-il surprendre ?</text:span></text:p>
              </text:list-item>
              <text:list-item>
                <text:p text:style-name="P6"><text:span text:style-name="T2">Doublage ou </text:span><text:span text:style-name="T3">version originale sous-titrée</text:span><text:span text:style-name="T2"> ?</text:span></text:p>
              </text:list-item>
              <text:list-item>
                <text:p text:style-name="P6"><text:span text:style-name="T2">Vos mots du </text:span><text:span text:style-name="T3">cinéma</text:span><text:span text:style-name="T2"> déjà connu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éalisateur·rice · acteur·rice · personnage</text:span></text:p>
              </text:list-item>
              <text:list-item>
                <text:p text:style-name="P6"><text:span text:style-name="T2">intrigue · scène · bande-annonce</text:span></text:p>
              </text:list-item>
              <text:list-item>
                <text:p text:style-name="P6"><text:span text:style-name="T2">générique · mise en scène</text:span></text:p>
              </text:list-item>
              <text:list-item>
                <text:p text:style-name="P6"><text:span text:style-name="T2">primé·e · émouvant·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Exprimer et nuancer une opinion</text:span></text:p>
            <text:list text:style-name="L3">
              <text:list-item>
                <text:p text:style-name="P3"><text:span text:style-name="T2">Positive : </text:span><text:span text:style-name="T4">J’ai adoré… · m’a beaucoup touché·e</text:span></text:p>
              </text:list-item>
              <text:list-item>
                <text:p text:style-name="P3"><text:span text:style-name="T2">Nuancée : </text:span><text:span text:style-name="T4">J’ai aimé, </text:span><text:span text:style-name="T5">mais</text:span><text:span text:style-name="T4">… · </text:span><text:span text:style-name="T5">même si</text:span><text:span text:style-name="T4">…</text:span></text:p>
              </text:list-item>
              <text:list-item>
                <text:p text:style-name="P3"><text:span text:style-name="T2">Négative polie : </text:span><text:span text:style-name="T4">Je n’ai pas été convaincu·e…</text:span></text:p>
              </text:list-item>
              <text:list-item>
                <text:p text:style-name="P3"><text:span text:style-name="T4">Ne pas penser que</text:span><text:span text:style-name="T2"> + </text:span><text:span text:style-name="T3">subjonctif</text:span><text:span text:style-name="T2"> : </text:span><text:span text:style-name="T4">… que ce </text:span><text:span text:style-name="T5">soit</text:span><text:span text:style-name="T4">…</text:span></text:p>
              </text:list-item>
              <text:list-item>
                <text:p text:style-name="P3"><text:span text:style-name="T2">Connecteurs : d’abord · ensuite · de plus · en revanche · pour fin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Modèle ora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Modèle ora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’abord le contexte → ensuite l’intrigue → de plus une scène émouvante → pour finir l’avis.</text:span></text:p>
            <text:p text:style-name="P3"><text:span text:style-name="T2">« J’ai bien aimé ce film, </text:span><text:span text:style-name="T3">même si</text:span><text:span text:style-name="T2"> le rythme est calme. Je le recommand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ONF</text:span><text:span text:style-name="T2"> : Office national du film du Canada, fondé en 1939</text:span></text:p>
              </text:list-item>
              <text:list-item>
                <text:p text:style-name="P6"><text:span text:style-name="T2">Années 1960 : le </text:span><text:span text:style-name="T3">« cinéma direct »</text:span><text:span text:style-name="T2"> (tournage sur le vif)</text:span></text:p>
              </text:list-item>
              <text:list-item>
                <text:p text:style-name="P6"><text:span text:style-name="T2">Des films québécois </text:span><text:span text:style-name="T3">primés</text:span><text:span text:style-name="T2"> en festivals</text:span></text:p>
              </text:list-item>
            </text:list>
            <text:p text:style-name="P3"><text:span text:style-name="T4">Français québécois : même grammaire, prononciation et lexique propres — des variantes, non des fautes.</text:span><text:span text:style-name="T2"> 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Ex. 1</text:span><text:span text:style-name="T2"> Compréhension orale (texte lu) — 4 questions</text:span></text:p>
              </text:list-item>
              <text:list-item>
                <text:p text:style-name="P6"><text:span text:style-name="T3">Ex. 2</text:span><text:span text:style-name="T2"> Vocabulaire — relier mots / définitions</text:span></text:p>
              </text:list-item>
              <text:list-item>
                <text:p text:style-name="P6"><text:span text:style-name="T3">Ex. 3</text:span><text:span text:style-name="T2"> Point de langue — verbes et connecteurs d’opinion</text:span></text:p>
              </text:list-item>
              <text:list-item>
                <text:p text:style-name="P6"><text:span text:style-name="T3">Ex. 4</text:span><text:span text:style-name="T2"> Expression guidée — notes → 2 phrases reliée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Présentation orale ~90 s (sans lire)</text:span></text:p>
            <text:list text:style-name="L5">
              <text:list-item>
                <text:p text:style-name="P3"><text:span text:style-name="T2">Titre + année + réalisateur·rice</text:span></text:p>
              </text:list-item>
              <text:list-item>
                <text:p text:style-name="P3"><text:span text:style-name="T2">Intrigue en 3 phrases</text:span></text:p>
              </text:list-item>
              <text:list-item>
                <text:p text:style-name="P3"><text:span text:style-name="T2">Une scène marquante</text:span></text:p>
              </text:list-item>
              <text:list-item>
                <text:p text:style-name="P3"><text:span text:style-name="T2">Avis nuancé + connecteur</text:span></text:p>
              </text:list-item>
            </text:list>
            <text:p text:style-name="P3"><text:span text:style-name="T2">Barème : 12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mprends une présentation orale</text:span></text:p>
              </text:list-item>
              <text:list-item>
                <text:p text:style-name="P6"><text:span text:style-name="T2">☐ </text:span><text:span text:style-name="T2">Je nomme 2 repères du cinéma québécois</text:span></text:p>
              </text:list-item>
              <text:list-item>
                <text:p text:style-name="P6"><text:span text:style-name="T2">☐ </text:span><text:span text:style-name="T2">J’emploie 6+ mots de cinéma</text:span></text:p>
              </text:list-item>
              <text:list-item>
                <text:p text:style-name="P6"><text:span text:style-name="T2">☐ </text:span><text:span text:style-name="T2">Je présente un film sans lire (~90 s)</text:span></text:p>
              </text:list-item>
              <text:list-item>
                <text:p text:style-name="P6"><text:span text:style-name="T2">☐ </text:span><text:span text:style-name="T2">J’exprime une opinion nuanc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âche 1</text:span><text:span text:style-name="T2"> Compréhension orale/audiovisuelle — 10 pts</text:span></text:p>
              </text:list-item>
              <text:list-item>
                <text:p text:style-name="P6"><text:span text:style-name="T3">Tâche 2</text:span><text:span text:style-name="T2"> Vocabulaire du cinéma — 8 pts</text:span></text:p>
              </text:list-item>
              <text:list-item>
                <text:p text:style-name="P6"><text:span text:style-name="T3">Tâche 3</text:span><text:span text:style-name="T2"> Production orale en continu — 12 pts</text:span></text:p>
              </text:list-item>
            </text:list>
            <text:p text:style-name="P3"><text:span text:style-name="T3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Cinéma québécois » — Wikipédia, CC BY-SA 4.0</text:span></text:p>
              </text:list-item>
              <text:list-item>
                <text:p text:style-name="P6"><text:span text:style-name="T2">« Français québécois » — Wikipédia, CC BY-SA 4.0</text:span></text:p>
              </text:list-item>
              <text:list-item>
                <text:p text:style-name="P6"><text:span text:style-name="T2">« Office national du film du Canada » — Wikipédia, CC BY-SA 4.0</text:span></text:p>
              </text:list-item>
              <text:list-item>
                <text:p text:style-name="P6"><text:span text:style-name="T2">ONF · Cinémathèque québécoise (références, non affilié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28</meta:creation-date>
    <dc:date>2026-07-21T16:11:28</dc:date>
    <meta:document-statistic meta:object-count="185"/>
    <meta:generator>LibreOffice/24.2.7.2$Linux_X86_64 LibreOffice_project/420$Build-2</meta:generator>
  </office:meta>
</office:document-meta>
</file>