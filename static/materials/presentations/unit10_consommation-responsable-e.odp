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nsommation responsab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nsommation responsab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9 · Niveau E Choisir, argumenter : chaque achat est un vo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dentifier cinq labels et ce qu’ils garantissent</text:span></text:p>
              </text:list-item>
              <text:list-item>
                <text:p text:style-name="P6"><text:span text:style-name="T2">Comprendre les arguments d’une chronique</text:span></text:p>
              </text:list-item>
              <text:list-item>
                <text:p text:style-name="P6"><text:span text:style-name="T2">Employer le vocabulaire de l’achat éthique + les connecteurs</text:span></text:p>
              </text:list-item>
              <text:list-item>
                <text:p text:style-name="P6"><text:span text:style-name="T2">Comparer avantages et limites d’un produit responsable</text:span></text:p>
              </text:list-item>
              <text:list-item>
                <text:p text:style-name="P6"><text:span text:style-name="T2">Rédiger une chronique argumentée (~18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supermarché, deux cafés : - 2,50 € — ordinaire - 4,80 € — « Max Havelaar » (équitable)</text:span></text:p>
            <text:p text:style-name="P3"><text:span text:style-name="T2">Mehdi : « Presque le double ! » Anouk : « Tu paies plus, donc le producteur gagne mieux sa vie. » « Chaque achat est un petit vot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isez-vous les étiquettes en faisant vos courses ?</text:span></text:p>
              </text:list-item>
              <text:list-item>
                <text:p text:style-name="P6"><text:span text:style-name="T2">Que signifie le label AB ?</text:span></text:p>
              </text:list-item>
              <text:list-item>
                <text:p text:style-name="P6"><text:span text:style-name="T2">Payer plus cher pour la planète : oui ou non ? Pourquoi ?</text:span></text:p>
              </text:list-item>
              <text:list-item>
                <text:p text:style-name="P6"><text:span text:style-name="T2">Deux raisons d’acheter local, deux obstacles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label · une étiquette · le commerce équitable</text:span></text:p>
              </text:list-item>
              <text:list-item>
                <text:p text:style-name="P6"><text:span text:style-name="T2">l’empreinte écologique · la fast-fashion</text:span></text:p>
              </text:list-item>
              <text:list-item>
                <text:p text:style-name="P6"><text:span text:style-name="T2">privilégier · éviter · gaspiller</text:span></text:p>
              </text:list-item>
              <text:list-item>
                <text:p text:style-name="P6"><text:span text:style-name="T2">durable ≠ jetab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: argument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: argument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is : </text:span><text:span text:style-name="T3">je pense que…</text:span><text:span text:style-name="T2">, </text:span><text:span text:style-name="T3">à mon avis…</text:span></text:p>
              </text:list-item>
              <text:list-item>
                <text:p text:style-name="P6"><text:span text:style-name="T2">Cause : </text:span><text:span text:style-name="T3">parce que</text:span><text:span text:style-name="T2">, </text:span><text:span text:style-name="T3">car</text:span><text:span text:style-name="T2">, </text:span><text:span text:style-name="T3">puisque</text:span><text:span text:style-name="T2">, </text:span><text:span text:style-name="T3">grâce à</text:span></text:p>
              </text:list-item>
              <text:list-item>
                <text:p text:style-name="P6"><text:span text:style-name="T2">Conséquence : </text:span><text:span text:style-name="T3">donc</text:span><text:span text:style-name="T2">, </text:span><text:span text:style-name="T3">c’est pourquoi</text:span><text:span text:style-name="T2">, </text:span><text:span text:style-name="T3">par conséquent</text:span></text:p>
              </text:list-item>
              <text:list-item>
                <text:p text:style-name="P6"><text:span text:style-name="T2">Opposition : </text:span><text:span text:style-name="T3">mais</text:span><text:span text:style-name="T2">, </text:span><text:span text:style-name="T3">pourtant</text:span><text:span text:style-name="T2">, </text:span><text:span text:style-name="T3">même si</text:span></text:p>
              </text:list-item>
            </text:list>
            <text:p text:style-name="P3"><text:span text:style-name="T2">Schéma : </text:span><text:span text:style-name="T4">opinion → cause → nuanc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ronique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hronique de Lé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Consommer moins, mais mieux » - Produits locaux et de saison : moins de transport, plus de goût - Vêtements : friperie et seconde main, pas de fast-fashion - Plus cher, mais plus durable, donc remplacé moins souvent - Conseil : commencer petit, lire les étiquett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: le label AB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: le label AB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gne officiel français créé au milieu des années 1980</text:span></text:p>
              </text:list-item>
              <text:list-item>
                <text:p text:style-name="P6"><text:span text:style-name="T2">Garantit une origine « agriculture biologique »</text:span></text:p>
              </text:list-item>
              <text:list-item>
                <text:p text:style-name="P6"><text:span text:style-name="T2">Sans pesticides ni engrais chimiques de synthèse</text:span></text:p>
              </text:list-item>
              <text:list-item>
                <text:p text:style-name="P6"><text:span text:style-name="T2">Produit transformé : au moins 95 % d’ingrédients bio</text:span></text:p>
              </text:list-item>
              <text:list-item>
                <text:p text:style-name="P6"><text:span text:style-name="T2">Coexiste avec l’écolabel européen (la « feuille »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texte de Léa</text:span></text:p>
              </text:list-item>
              <text:list-item>
                <text:p text:style-name="P6"><text:span text:style-name="T2">Vocabulaire à compléter</text:span></text:p>
              </text:list-item>
              <text:list-item>
                <text:p text:style-name="P6"><text:span text:style-name="T2">Relier deux phrases avec un connecteur</text:span></text:p>
              </text:list-item>
              <text:list-item>
                <text:p text:style-name="P6"><text:span text:style-name="T2">Argumenter : opinion → cause → nuance (seconde main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hronique argumentée « Consommer autrement » (~180 mots) - Opinion claire - 2 notions de l’unité - 3 connecteurs différents - 1 nuance + 1 consei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cinq labels</text:span></text:p>
              </text:list-item>
              <text:list-item>
                <text:p text:style-name="P6"><text:span text:style-name="T2">Je retrouve les arguments d’une chronique</text:span></text:p>
              </text:list-item>
              <text:list-item>
                <text:p text:style-name="P6"><text:span text:style-name="T2">J’utilise le vocabulaire de l’achat responsable</text:span></text:p>
              </text:list-item>
              <text:list-item>
                <text:p text:style-name="P6"><text:span text:style-name="T2">J’emploie cause, conséquence, opposition</text:span></text:p>
              </text:list-item>
              <text:list-item>
                <text:p text:style-name="P6"><text:span text:style-name="T2">Je rédige une chronique argumentée avec nua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· 45 min · 40 pts - Leseverstehen : chronique de Léa (16 pts) - Schreiben : chronique argumentée ~180 mots (24 pt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FR — </text:span><text:span text:style-name="T3">Label agriculture biologique</text:span><text:span text:style-name="T2"> (CC BY-SA)</text:span></text:p>
              </text:list-item>
              <text:list-item>
                <text:p text:style-name="P6"><text:span text:style-name="T2">Wikipédia FR — </text:span><text:span text:style-name="T3">Commerce équitable</text:span><text:span text:style-name="T2"> (CC BY-SA)</text:span></text:p>
              </text:list-item>
              <text:list-item>
                <text:p text:style-name="P6"><text:span text:style-name="T2">Agence Bio (référence institutionnelle, non affilié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32</meta:creation-date>
    <dc:date>2026-07-21T16:16:32</dc:date>
    <meta:document-statistic meta:object-count="185"/>
    <meta:generator>LibreOffice/24.2.7.2$Linux_X86_64 LibreOffice_project/420$Build-2</meta:generator>
  </office:meta>
</office:document-meta>
</file>