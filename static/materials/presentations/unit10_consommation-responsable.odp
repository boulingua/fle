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Consommation responsab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Consommation responsab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9 · Niveau M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sur la consommation responsable</text:span></text:p>
              </text:list-item>
              <text:list-item>
                <text:p text:style-name="P6"><text:span text:style-name="T2">Distinguer achat ordinaire / achat responsable</text:span></text:p>
              </text:list-item>
              <text:list-item>
                <text:p text:style-name="P6"><text:span text:style-name="T2">Reconnaître les labels (Fairtrade, GOTS, Oeko-Tex, AB, PEFC)</text:span></text:p>
              </text:list-item>
              <text:list-item>
                <text:p text:style-name="P6"><text:span text:style-name="T2">Argumenter avec parce que, donc, cependant</text:span></text:p>
              </text:list-item>
              <text:list-item>
                <text:p text:style-name="P6"><text:span text:style-name="T2">Rédiger un court texte argumen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supermarché, deux tablettes de chocolat. - Nora : « Celle-ci coûte 1,20 €, celle-là 2,50 €. » - Malik : « Pourquoi la plus chère ? » - Nora : « Elle porte le label Fairtrade : les producteurs sont mieux payés. »</text:span></text:p>
            <text:p text:style-name="P3"><text:span text:style-name="T2">Et vous, quelle tablette ? Pourquoi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chetez-vous bio ou équitable ?</text:span></text:p>
              </text:list-item>
              <text:list-item>
                <text:p text:style-name="P6"><text:span text:style-name="T2">Connaissez-vous des labels ?</text:span></text:p>
              </text:list-item>
              <text:list-item>
                <text:p text:style-name="P6"><text:span text:style-name="T2">Faut-il payer plus cher pour consommer responsable ?</text:span></text:p>
              </text:list-item>
              <text:list-item>
                <text:p text:style-name="P6"><text:span text:style-name="T2">Qu’achetez-vous d’occasio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consommation responsable — nachhaltiger Konsum</text:span></text:p>
              </text:list-item>
              <text:list-item>
                <text:p text:style-name="P6"><text:span text:style-name="T2">le commerce équitable — der faire Handel</text:span></text:p>
              </text:list-item>
              <text:list-item>
                <text:p text:style-name="P6"><text:span text:style-name="T2">un label — ein Siegel</text:span></text:p>
              </text:list-item>
              <text:list-item>
                <text:p text:style-name="P6"><text:span text:style-name="T2">durable — nachhaltig</text:span></text:p>
              </text:list-item>
              <text:list-item>
                <text:p text:style-name="P6"><text:span text:style-name="T2">d’occasion / seconde main — gebraucht</text:span></text:p>
              </text:list-item>
              <text:list-item>
                <text:p text:style-name="P6"><text:span text:style-name="T2">gaspiller — verschwenden</text:span></text:p>
              </text:list-item>
              <text:list-item>
                <text:p text:style-name="P6"><text:span text:style-name="T2">l’empreinte carbone — der CO₂-Fußabdruck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Argument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Argument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ause : parce que, car, grâce à</text:span></text:p>
              </text:list-item>
              <text:list-item>
                <text:p text:style-name="P6"><text:span text:style-name="T2">Conséquence : donc, alors, c’est pourquoi</text:span></text:p>
              </text:list-item>
              <text:list-item>
                <text:p text:style-name="P6"><text:span text:style-name="T2">Opposition : mais, cependant, par contre</text:span></text:p>
              </text:list-item>
            </text:list>
            <text:p text:style-name="P3"><text:span text:style-name="T2">Bon argument = opinion + parce que…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Consommer autrement, c’est possible » - Léa achetait un tee-shirt par semaine - Un reportage la fait changer - Elle achète moins, mais mieux : seconde main, coton bio, garder plus longtemps - Même budget, moins d’affaires, mais fiè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commerce équitab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commerce équitab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munération plus juste des producteurs</text:span></text:p>
              </text:list-item>
              <text:list-item>
                <text:p text:style-name="P6"><text:span text:style-name="T2">Prix minimum garanti + prime pour la communauté</text:span></text:p>
              </text:list-item>
              <text:list-item>
                <text:p text:style-name="P6"><text:span text:style-name="T2">Label Fairtrade / Max Havelaar (fin des années 1980)</text:span></text:p>
              </text:list-item>
              <text:list-item>
                <text:p text:style-name="P6"><text:span text:style-name="T2">Café, cacao, banane, coton (Source :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 (5 questions)</text:span></text:p>
              </text:list-item>
              <text:list-item>
                <text:p text:style-name="P6"><text:span text:style-name="T2">Ex. 2 : relier vocabulaire et définitions</text:span></text:p>
              </text:list-item>
              <text:list-item>
                <text:p text:style-name="P6"><text:span text:style-name="T2">Ex. 3 : parce que / donc / mais</text:span></text:p>
              </text:list-item>
              <text:list-item>
                <text:p text:style-name="P6"><text:span text:style-name="T2">Ex. 4 : écrire un argument (opinion + parce que…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Consommer responsable, c’est trop cher. » Réponds en trois paragraphes : 1. Ton opinion 2. Deux arguments avec connecteurs 3. Une action concrète</text:span></text:p>
            <text:p text:style-name="P3"><text:span text:style-name="T2">~120–150 mo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le texte</text:span></text:p>
              </text:list-item>
              <text:list-item>
                <text:p text:style-name="P6"><text:span text:style-name="T2">☐ </text:span><text:span text:style-name="T2">Je distingue achat ordinaire / responsable</text:span></text:p>
              </text:list-item>
              <text:list-item>
                <text:p text:style-name="P6"><text:span text:style-name="T2">☐ </text:span><text:span text:style-name="T2">Je connais 5 labels ou notions</text:span></text:p>
              </text:list-item>
              <text:list-item>
                <text:p text:style-name="P6"><text:span text:style-name="T2">☐ </text:span><text:span text:style-name="T2">J’utilise parce que / donc / cependant</text:span></text:p>
              </text:list-item>
              <text:list-item>
                <text:p text:style-name="P6"><text:span text:style-name="T2">☐ </text:span><text:span text:style-name="T2">Je rédige un texte argumen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0 P.</text:span></text:p>
              </text:list-item>
              <text:list-item>
                <text:p text:style-name="P6"><text:span text:style-name="T2">Tâche 2 — Vocabulaire et langue : 8 P.</text:span></text:p>
              </text:list-item>
              <text:list-item>
                <text:p text:style-name="P6"><text:span text:style-name="T2">Tâche 3 — Expression écrite (~120–150 mots) :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rce équitable — Wikipédia, CC BY-SA 4.0</text:span></text:p>
              </text:list-item>
              <text:list-item>
                <text:p text:style-name="P6"><text:span text:style-name="T2">Consommation responsable — Wikipédia, CC BY-SA 4.0</text:span></text:p>
              </text:list-item>
              <text:list-item>
                <text:p text:style-name="P6"><text:span text:style-name="T2">Fairtrade / Max Havelaar — Wikipédia, CC BY-SA 4.0 Plateforme indépendante, sans affiliation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42</meta:creation-date>
    <dc:date>2026-07-21T15:34:42</dc:date>
    <meta:document-statistic meta:object-count="185"/>
    <meta:generator>LibreOffice/24.2.7.2$Linux_X86_64 LibreOffice_project/420$Build-2</meta:generator>
  </office:meta>
</office:document-meta>
</file>