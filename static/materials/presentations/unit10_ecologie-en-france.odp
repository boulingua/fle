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Écologie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Écologie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1 · Niveau E Débattre avec des faits, citer ses sour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argumentatif écologique</text:span></text:p>
              </text:list-item>
              <text:list-item>
                <text:p text:style-name="P6"><text:span text:style-name="T2">Distinguer un fait chiffré d’une opinion</text:span></text:p>
              </text:list-item>
              <text:list-item>
                <text:p text:style-name="P6"><text:span text:style-name="T2">Exprimer un point de vue nuancé et réagir</text:span></text:p>
              </text:list-item>
              <text:list-item>
                <text:p text:style-name="P6"><text:span text:style-name="T2">Employer les connecteurs (cause, conséquence, concession)</text:span></text:p>
              </text:list-item>
              <text:list-item>
                <text:p text:style-name="P6"><text:span text:style-name="T2">Comparer les politiques climatiques FR / 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et Karim préparent un débat : « Le nucléaire est-il écologique ? » - Karim part des chiffres (~70 % d’électricité nucléaire en France) - Léa : un argument n’est solide que si l’on cite sa source - Débattre = peser le pour et le contre avec des fai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s débats écologiques FR / DE connaissez-vous ?</text:span></text:p>
              </text:list-item>
              <text:list-item>
                <text:p text:style-name="P6"><text:span text:style-name="T2">Fait ou opinion ?</text:span></text:p>
              </text:list-item>
              <text:list-item>
                <text:p text:style-name="P6"><text:span text:style-name="T2">Comment nuancer un avis ? (</text:span><text:span text:style-name="T3">certes… mais…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argument · une source · un fait chiffré</text:span></text:p>
              </text:list-item>
              <text:list-item>
                <text:p text:style-name="P6"><text:span text:style-name="T2">la transition énergétique · l’empreinte carbone</text:span></text:p>
              </text:list-item>
              <text:list-item>
                <text:p text:style-name="P6"><text:span text:style-name="T2">les énergies renouvelables · les déchets radioactifs</text:span></text:p>
              </text:list-item>
              <text:list-item>
                <text:p text:style-name="P6"><text:span text:style-name="T2">la neutralité carbone · nuancer · étayer une thè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ause : parce que, car, étant donné que</text:span></text:p>
              </text:list-item>
              <text:list-item>
                <text:p text:style-name="P6"><text:span text:style-name="T2">Conséquence : donc, par conséquent, c’est pourquoi</text:span></text:p>
              </text:list-item>
              <text:list-item>
                <text:p text:style-name="P6"><text:span text:style-name="T2">Concession : certes… mais, bien que + subj., en revanche</text:span></text:p>
              </text:list-item>
              <text:list-item>
                <text:p text:style-name="P6"><text:span text:style-name="T2">Conditionnel : </text:span><text:span text:style-name="T3">S’il n’y avait pas de nucléaire, la France émettrait plus de CO₂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nvention citoyenne pour le climat (2019-2020) - 150 citoyens tirés au sort - ~150 propositions - A nourri la loi Climat et résilience (22 août 2021) Source : Wikipédia FR, CC-BY-S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texte</text:span></text:p>
              </text:list-item>
              <text:list-item>
                <text:p text:style-name="P6"><text:span text:style-name="T2">Ex. 2 : fait ou opinion ?</text:span></text:p>
              </text:list-item>
              <text:list-item>
                <text:p text:style-name="P6"><text:span text:style-name="T2">Ex. 3 : connecteurs logiques</text:span></text:p>
              </text:list-item>
              <text:list-item>
                <text:p text:style-name="P6"><text:span text:style-name="T2">Ex. 4 : conditionnel de l’hypothèse 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ébat en binôme (~12 répliques) - 3 faits chiffrés ou datés - 4 connecteurs logiques - 1 nuance (</text:span><text:span text:style-name="T3">certes… mais…</text:span><text:span text:style-name="T2">) - 1 renvoi à une source Grille : contenu · interaction · langue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distingue fait et opinion</text:span></text:p>
              </text:list-item>
              <text:list-item>
                <text:p text:style-name="P6"><text:span text:style-name="T2">J’emploie les connecteurs logiques</text:span></text:p>
              </text:list-item>
              <text:list-item>
                <text:p text:style-name="P6"><text:span text:style-name="T2">Je nuance mon point de vue</text:span></text:p>
              </text:list-item>
              <text:list-item>
                <text:p text:style-name="P6"><text:span text:style-name="T2">Je cite une source</text:span></text:p>
              </text:list-item>
              <text:list-item>
                <text:p text:style-name="P6"><text:span text:style-name="T2">Je réagis à mon interlocuteur·ri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éhension écrite : 12</text:span></text:p>
              </text:list-item>
              <text:list-item>
                <text:p text:style-name="P6"><text:span text:style-name="T2">Lexique et langue : 8</text:span></text:p>
              </text:list-item>
              <text:list-item>
                <text:p text:style-name="P6"><text:span text:style-name="T2">Interaction orale : 1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nvention citoyenne pour le climat — Wikipédia FR, CC-BY-SA</text:span></text:p>
              </text:list-item>
              <text:list-item>
                <text:p text:style-name="P6"><text:span text:style-name="T2">Loi Climat et résilience — Wikipédia FR, CC-BY-SA</text:span></text:p>
              </text:list-item>
              <text:list-item>
                <text:p text:style-name="P6"><text:span text:style-name="T2">Sortie du nucléaire civil en Allemagne — Wikipédia FR, CC-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49</meta:creation-date>
    <dc:date>2026-07-21T16:29:49</dc:date>
    <meta:document-statistic meta:object-count="181"/>
    <meta:generator>LibreOffice/24.2.7.2$Linux_X86_64 LibreOffice_project/420$Build-2</meta:generator>
  </office:meta>
</office:document-meta>
</file>