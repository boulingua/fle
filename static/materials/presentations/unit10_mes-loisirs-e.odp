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es loisi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es loisi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</text:span></text:p>
            <text:p text:style-name="P3"><text:span text:style-name="T2">Hobbies et temps libre : </text:span><text:span text:style-name="T3">faire / jouer</text:span><text:span text:style-name="T2"> et la fréqu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au moins huit loisirs</text:span></text:p>
              </text:list-item>
              <text:list-item>
                <text:p text:style-name="P6"><text:span text:style-name="T2">Employer </text:span><text:span text:style-name="T3">faire de / jouer à / jouer de</text:span></text:p>
              </text:list-item>
              <text:list-item>
                <text:p text:style-name="P6"><text:span text:style-name="T2">Indiquer la fréquence (</text:span><text:span text:style-name="T3">toujours → jamais</text:span><text:span text:style-name="T2">)</text:span></text:p>
              </text:list-item>
              <text:list-item>
                <text:p text:style-name="P6"><text:span text:style-name="T2">Comprendre un court texte sur les loisirs</text:span></text:p>
              </text:list-item>
              <text:list-item>
                <text:p text:style-name="P6"><text:span text:style-name="T2">Échanger en binôme et inviter à essay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e collège, un lundi après-midi.</text:span></text:p>
            <text:list text:style-name="L3">
              <text:list-item>
                <text:p text:style-name="P3"><text:span text:style-name="T2">Tristan : « Qu’est-ce que tu fais ce soir ? »</text:span></text:p>
              </text:list-item>
              <text:list-item>
                <text:p text:style-name="P3"><text:span text:style-name="T2">Anouk : « J’ai judo. Je fais du judo tous les mardis. »</text:span></text:p>
              </text:list-item>
              <text:list-item>
                <text:p text:style-name="P3"><text:span text:style-name="T2">Tristan : « Moi, je joue de la guitare et je joue au foot. »</text:span></text:p>
              </text:list-item>
              <text:list-item>
                <text:p text:style-name="P3"><text:span text:style-name="T2">Anouk : « Tu joues souvent ?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sport pratiquez-vous ?</text:span></text:p>
              </text:list-item>
              <text:list-item>
                <text:p text:style-name="P6"><text:span text:style-name="T2">Jouez-vous d’un instrument ?</text:span></text:p>
              </text:list-item>
              <text:list-item>
                <text:p text:style-name="P6"><text:span text:style-name="T2">Que faites-vous le week-end ?</text:span></text:p>
              </text:list-item>
              <text:list-item>
                <text:p text:style-name="P6"><text:span text:style-name="T2">Au tableau : tous les loisirs connus en franç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football, la danse, le judo</text:span></text:p>
              </text:list-item>
              <text:list-item>
                <text:p text:style-name="P6"><text:span text:style-name="T2">la natation, le théâtre</text:span></text:p>
              </text:list-item>
              <text:list-item>
                <text:p text:style-name="P6"><text:span text:style-name="T2">la guitare, le piano</text:span></text:p>
              </text:list-item>
              <text:list-item>
                <text:p text:style-name="P6"><text:span text:style-name="T2">la lecture, l’escalade, le dess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Gramm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Gramm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faire + de</text:span><text:span text:style-name="T2"> → activité : </text:span><text:span text:style-name="T3">je fais </text:span><text:span text:style-name="T5">du</text:span><text:span text:style-name="T3"> judo, </text:span><text:span text:style-name="T5">de la</text:span><text:span text:style-name="T3"> natation</text:span></text:p>
              </text:list-item>
              <text:list-item>
                <text:p text:style-name="P6"><text:span text:style-name="T4">jouer + à</text:span><text:span text:style-name="T2"> → sport collectif : </text:span><text:span text:style-name="T3">je joue </text:span><text:span text:style-name="T5">au</text:span><text:span text:style-name="T3"> foot</text:span></text:p>
              </text:list-item>
              <text:list-item>
                <text:p text:style-name="P6"><text:span text:style-name="T4">jouer + de</text:span><text:span text:style-name="T2"> → instrument : </text:span><text:span text:style-name="T3">je joue </text:span><text:span text:style-name="T5">du</text:span><text:span text:style-name="T3"> piano, </text:span><text:span text:style-name="T5">de la</text:span><text:span text:style-name="T3"> guitare</text:span></text:p>
              </text:list-item>
              <text:list-item>
                <text:p text:style-name="P6"><text:span text:style-name="T2">Contractés : du · de la · de l’ · au · à la · 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fréque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fréque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oujours → souvent → parfois → rarement → </text:span><text:span text:style-name="T4">ne… jamais</text:span></text:p>
            <text:p text:style-name="P3"><text:span text:style-name="T2">Aussi : </text:span><text:span text:style-name="T3">une fois par semaine · tous les mardis · le week-end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Une semaine bien remplie » (Anouk, 11 ans, Strasbourg)</text:span></text:p>
            <text:list text:style-name="L3">
              <text:list-item>
                <text:p text:style-name="P3"><text:span text:style-name="T2">mardi soir : judo</text:span></text:p>
              </text:list-item>
              <text:list-item>
                <text:p text:style-name="P3"><text:span text:style-name="T2">mercredi : foot au stade</text:span></text:p>
              </text:list-item>
              <text:list-item>
                <text:p text:style-name="P3"><text:span text:style-name="T2">dimanche matin : piano</text:span></text:p>
              </text:list-item>
              <text:list-item>
                <text:p text:style-name="P3"><text:span text:style-name="T2">Tristan : guitare + escalade, presque jamais de nat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France, le football est le sport le plus pratiqué en club : la Fédération française de football compte plusieurs millions de licenciés.</text:span></text:p>
            <text:p text:style-name="P3"><text:span text:style-name="T3">(Paraphrasé 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écrite (4 questions)</text:span></text:p>
              </text:list-item>
              <text:list-item>
                <text:p text:style-name="P6"><text:span text:style-name="T2">Ex. 2 : </text:span><text:span text:style-name="T3">faire de / jouer à / jouer de</text:span><text:span text:style-name="T2"> (6 phrases)</text:span></text:p>
              </text:list-item>
              <text:list-item>
                <text:p text:style-name="P6"><text:span text:style-name="T2">Ex. 3 : la fréquence (4 phrases)</text:span></text:p>
              </text:list-item>
              <text:list-item>
                <text:p text:style-name="P6"><text:span text:style-name="T2">Ex. 4 : mini-interview du voisin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G</text:span><text:span text:style-name="T2"> : banque de mots, phrases courtes</text:span></text:p>
              </text:list-item>
              <text:list-item>
                <text:p text:style-name="P6"><text:span text:style-name="T4">M</text:span><text:span text:style-name="T2"> : ajouter un adverbe de fréquence</text:span></text:p>
              </text:list-item>
              <text:list-item>
                <text:p text:style-name="P6"><text:span text:style-name="T4">E</text:span><text:span text:style-name="T2"> : justifier (</text:span><text:span text:style-name="T3">parce que…</text:span><text:span text:style-name="T2">) et relier (</text:span><text:span text:style-name="T3">et, mais, aussi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6–8 répliques) :</text:span></text:p>
            <text:list text:style-name="L3">
              <text:list-item>
                <text:p text:style-name="P3"><text:span text:style-name="T2">2 sports + 1 instrument</text:span></text:p>
              </text:list-item>
              <text:list-item>
                <text:p text:style-name="P3"><text:span text:style-name="T2">2 adverbes de fréquence</text:span></text:p>
              </text:list-item>
              <text:list-item>
                <text:p text:style-name="P3"><text:span text:style-name="T2">1 invitation + 1 réa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huit loisirs</text:span></text:p>
              </text:list-item>
              <text:list-item>
                <text:p text:style-name="P6"><text:span text:style-name="T2">☐ </text:span><text:span text:style-name="T2">J’utilise </text:span><text:span text:style-name="T3">faire de / jouer à / jouer de</text:span></text:p>
              </text:list-item>
              <text:list-item>
                <text:p text:style-name="P6"><text:span text:style-name="T2">☐ </text:span><text:span text:style-name="T2">J’emploie les adverbes de fréquence</text:span></text:p>
              </text:list-item>
              <text:list-item>
                <text:p text:style-name="P6"><text:span text:style-name="T2">☐ </text:span><text:span text:style-name="T2">Je comprends un court texte</text:span></text:p>
              </text:list-item>
              <text:list-item>
                <text:p text:style-name="P6"><text:span text:style-name="T2">☐ </text:span><text:span text:style-name="T2">J’échange et j’invite un·e camara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— 10 P.</text:span></text:p>
              </text:list-item>
              <text:list-item>
                <text:p text:style-name="P6"><text:span text:style-name="T2">Grammaire (</text:span><text:span text:style-name="T3">faire / jouer</text:span><text:span text:style-name="T2">) — 8 P.</text:span></text:p>
              </text:list-item>
              <text:list-item>
                <text:p text:style-name="P6"><text:span text:style-name="T2">Expression écrite (dialogue ~80 mots) —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ootball en France — Wikipédia, CC BY-SA 4.0</text:span></text:p>
              </text:list-item>
              <text:list-item>
                <text:p text:style-name="P6"><text:span text:style-name="T2">Fédération française de football — Wikipédia, CC BY-SA 4.0</text:span></text:p>
              </text:list-item>
              <text:list-item>
                <text:p text:style-name="P6"><text:span text:style-name="T2">TV5MONDE Apprendre (référence, sans affiliatio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23</meta:creation-date>
    <dc:date>2026-07-21T15:47:23</dc:date>
    <meta:document-statistic meta:object-count="193"/>
    <meta:generator>LibreOffice/24.2.7.2$Linux_X86_64 LibreOffice_project/420$Build-2</meta:generator>
  </office:meta>
</office:document-meta>
</file>