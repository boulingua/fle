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0 — Mes loisi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0 — Mes loisi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6 · Niveau M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au moins huit loisirs en français</text:span></text:p>
              </text:list-item>
              <text:list-item>
                <text:p text:style-name="P6"><text:span text:style-name="T2">Utiliser </text:span><text:span text:style-name="T3">faire de</text:span><text:span text:style-name="T2">, </text:span><text:span text:style-name="T3">jouer à</text:span><text:span text:style-name="T2">, </text:span><text:span text:style-name="T3">jouer de</text:span></text:p>
              </text:list-item>
              <text:list-item>
                <text:p text:style-name="P6"><text:span text:style-name="T2">Dire la fréquence (</text:span><text:span text:style-name="T3">souvent, parfois, ne… jamais</text:span><text:span text:style-name="T2">)</text:span></text:p>
              </text:list-item>
              <text:list-item>
                <text:p text:style-name="P6"><text:span text:style-name="T2">Comprendre une annonce de club</text:span></text:p>
              </text:list-item>
              <text:list-item>
                <text:p text:style-name="P6"><text:span text:style-name="T2">Interviewer un·e camarade et racont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ans le couloir, à midi :</text:span></text:p>
            <text:list text:style-name="L3">
              <text:list-item>
                <text:p text:style-name="P3"><text:span text:style-name="T2">Léa : Il y a un nouveau club le mercredi !</text:span></text:p>
              </text:list-item>
              <text:list-item>
                <text:p text:style-name="P3"><text:span text:style-name="T2">Théo : Moi, le mercredi, je joue au foot.</text:span></text:p>
              </text:list-item>
              <text:list-item>
                <text:p text:style-name="P3"><text:span text:style-name="T2">Léa : Tu joues souvent ?</text:span></text:p>
              </text:list-item>
              <text:list-item>
                <text:p text:style-name="P3"><text:span text:style-name="T2">Théo : Deux fois par semaine. Et toi, tu fais du sport ?</text:span></text:p>
              </text:list-item>
              <text:list-item>
                <text:p text:style-name="P3"><text:span text:style-name="T2">Léa : Je fais de la guitare et je joue aux échecs. Jamais de foot 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ois activités après l’école</text:span></text:p>
              </text:list-item>
              <text:list-item>
                <text:p text:style-name="P6"><text:span text:style-name="T2">Combien de fois par semaine ?</text:span></text:p>
              </text:list-item>
              <text:list-item>
                <text:p text:style-name="P6"><text:span text:style-name="T2">On classe : sport · musique · maison · dehor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ouer </text:span><text:span text:style-name="T4">au</text:span><text:span text:style-name="T2"> foot / basket / tennis</text:span></text:p>
              </text:list-item>
              <text:list-item>
                <text:p text:style-name="P6"><text:span text:style-name="T2">jouer </text:span><text:span text:style-name="T4">aux</text:span><text:span text:style-name="T2"> échecs / cartes</text:span></text:p>
              </text:list-item>
              <text:list-item>
                <text:p text:style-name="P6"><text:span text:style-name="T2">jouer </text:span><text:span text:style-name="T4">de la</text:span><text:span text:style-name="T2"> guitare, </text:span><text:span text:style-name="T4">du</text:span><text:span text:style-name="T2"> piano</text:span></text:p>
              </text:list-item>
              <text:list-item>
                <text:p text:style-name="P6"><text:span text:style-name="T2">faire </text:span><text:span text:style-name="T4">du</text:span><text:span text:style-name="T2"> vélo / sport / dessin</text:span></text:p>
              </text:list-item>
              <text:list-item>
                <text:p text:style-name="P6"><text:span text:style-name="T2">faire </text:span><text:span text:style-name="T4">de la</text:span><text:span text:style-name="T2"> danse, </text:span><text:span text:style-name="T4">de l’</text:span><text:span text:style-name="T2">escalad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jouer à</text:span><text:span text:style-name="T2"> + jeu ou sport</text:span></text:p>
              </text:list-item>
              <text:list-item>
                <text:p text:style-name="P6"><text:span text:style-name="T4">jouer de</text:span><text:span text:style-name="T2"> + instrument de musique</text:span></text:p>
              </text:list-item>
              <text:list-item>
                <text:p text:style-name="P6"><text:span text:style-name="T4">faire de</text:span><text:span text:style-name="T2"> + activité (le passe-partout)</text:span></text:p>
              </text:list-item>
              <text:list-item>
                <text:p text:style-name="P6"><text:span text:style-name="T2">Fréquence : </text:span><text:span text:style-name="T3">toujours · souvent · parfois · rarement · ne… jamais</text:span></text:p>
              </text:list-item>
              <text:list-item>
                <text:p text:style-name="P6"><text:span text:style-name="T2">Place : </text:span><text:span text:style-name="T4">après le verbe</text:span><text:span text:style-name="T2"> — </text:span><text:span text:style-name="T3">Je fais souvent du sport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nonce de club (texte C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nnonce de club (texte C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ollège Jean-Moulin — clubs de la semaine</text:span></text:p>
            <text:list text:style-name="L3">
              <text:list-item>
                <text:p text:style-name="P3"><text:span text:style-name="T2">Lundi 16 h 30 : lecture (salle 12)</text:span></text:p>
              </text:list-item>
              <text:list-item>
                <text:p text:style-name="P3"><text:span text:style-name="T2">Mardi 17 h : échecs (CDI)</text:span></text:p>
              </text:list-item>
              <text:list-item>
                <text:p text:style-name="P3"><text:span text:style-name="T2">Mercredi 14 h : guitare (salle de musique)</text:span></text:p>
              </text:list-item>
              <text:list-item>
                <text:p text:style-name="P3"><text:span text:style-name="T2">Jeudi 16 h : danse (gymnase B)</text:span></text:p>
              </text:list-item>
              <text:list-item>
                <text:p text:style-name="P3"><text:span text:style-name="T2">Vendredi 16 h 30 : vélo (cour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pétanq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pétanq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u de boules très populaire dans le sud de la France</text:span></text:p>
              </text:list-item>
              <text:list-item>
                <text:p text:style-name="P6"><text:span text:style-name="T2">Né vers 1910 à La Ciotat, en Provence</text:span></text:p>
              </text:list-item>
              <text:list-item>
                <text:p text:style-name="P6"><text:span text:style-name="T2">On lance les boules </text:span><text:span text:style-name="T4">les pieds joints</text:span><text:span text:style-name="T2"> (</text:span><text:span text:style-name="T3">pès tancats</text:span><text:span text:style-name="T2">)</text:span></text:p>
              </text:list-item>
              <text:list-item>
                <text:p text:style-name="P6"><text:span text:style-name="T2">On y joue sur les places, entre ami·e·s et en famille</text:span></text:p>
              </text:list-item>
              <text:list-item>
                <text:p text:style-name="P6"><text:span text:style-name="T2">Source :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endre l’annonce (texte C)</text:span></text:p>
              </text:list-item>
              <text:list-item>
                <text:p text:style-name="P6"><text:span text:style-name="T2">Ex. 2 : la bonne préposition</text:span></text:p>
              </text:list-item>
              <text:list-item>
                <text:p text:style-name="P6"><text:span text:style-name="T2">Ex. 3 : placer l’adverbe de fréquence</text:span></text:p>
              </text:list-item>
              <text:list-item>
                <text:p text:style-name="P6"><text:span text:style-name="T2">Ex. 4 : compléter le texte de Léa</text:span></text:p>
              </text:list-item>
              <text:list-item>
                <text:p text:style-name="P6"><text:span text:style-name="T2">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Interview loisi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Interview loisi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n binôme, quatre questions 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Tu fais quel sport ? À quelle fréquence ?</text:span></text:p>
                  </text:list-item>
                  <text:list-item>
                    <text:p text:style-name="P7"><text:span text:style-name="T5">Tu joues d’un instrument ?</text:span></text:p>
                  </text:list-item>
                  <text:list-item>
                    <text:p text:style-name="P7"><text:span text:style-name="T5">Tu vas à un club ?</text:span></text:p>
                  </text:list-item>
                  <text:list-item>
                    <text:p text:style-name="P7"><text:span text:style-name="T5">Qu’est-ce que tu ne fais jamais ?</text:span></text:p>
                  </text:list-item>
                </text:list>
              </text:list-item>
              <text:list-item>
                <text:p text:style-name="P6"><text:span text:style-name="T2">Restitution : </text:span><text:span text:style-name="T3">« Noah fait souvent du vélo. Il joue de la batterie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nnais huit loisirs</text:span></text:p>
              </text:list-item>
              <text:list-item>
                <text:p text:style-name="P6"><text:span text:style-name="T2">Je distingue </text:span><text:span text:style-name="T3">jouer à / jouer de / faire de</text:span></text:p>
              </text:list-item>
              <text:list-item>
                <text:p text:style-name="P6"><text:span text:style-name="T2">Je place l’adverbe de fréquence</text:span></text:p>
              </text:list-item>
              <text:list-item>
                <text:p text:style-name="P6"><text:span text:style-name="T2">Je peux interviewer et racont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(10 pts)</text:span></text:p>
              </text:list-item>
              <text:list-item>
                <text:p text:style-name="P6"><text:span text:style-name="T2">Tâche 2 — Grammaire : prépositions + fréquence (10 pts)</text:span></text:p>
              </text:list-item>
              <text:list-item>
                <text:p text:style-name="P6"><text:span text:style-name="T2">Tâche 3 — Expression orale en interaction (10 p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étanque — Wikipédia, CC BY-SA 4.0</text:span></text:p>
              </text:list-item>
              <text:list-item>
                <text:p text:style-name="P6"><text:span text:style-name="T2">La Ciotat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0:40</meta:creation-date>
    <dc:date>2026-07-21T16:10:40</dc:date>
    <meta:document-statistic meta:object-count="185"/>
    <meta:generator>LibreOffice/24.2.7.2$Linux_X86_64 LibreOffice_project/420$Build-2</meta:generator>
  </office:meta>
</office:document-meta>
</file>