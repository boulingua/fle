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0 — Mobilité (Erasmus jeune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0 — Mobilité (Erasmus jeune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10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témoignage oral d’élève en mobilité</text:span></text:p>
              </text:list-item>
              <text:list-item>
                <text:p text:style-name="P6"><text:span text:style-name="T2">Repérer des informations précises (durée, pays, niveau)</text:span></text:p>
              </text:list-item>
              <text:list-item>
                <text:p text:style-name="P6"><text:span text:style-name="T2">Expliquer ce qu’est Erasmus+</text:span></text:p>
              </text:list-item>
              <text:list-item>
                <text:p text:style-name="P6"><text:span text:style-name="T2">Rédiger un courriel de candidature (~180 mots)</text:span></text:p>
              </text:list-item>
              <text:list-item>
                <text:p text:style-name="P6"><text:span text:style-name="T2">Exprimer motivation et hypothèse au conditionnel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e affiche : échange Erasmus+ de deux semaines à Lille.</text:span></text:p>
            <text:p text:style-name="P3"><text:span text:style-name="T2">Anouk hésite (« je ne parle pas si bien »). Sofian la rassure : « Si tu hésites, vas-y. »</text:span></text:p>
            <text:p text:style-name="P3"><text:span text:style-name="T2">→ </text:span><text:span text:style-name="T2">Pourquoi Anouk hésite-t-elle ? Partiriez-vous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nnaissez-vous Erasmus+ ?</text:span></text:p>
              </text:list-item>
              <text:list-item>
                <text:p text:style-name="P6"><text:span text:style-name="T2">À partir de quel âge peut-on partir ?</text:span></text:p>
              </text:list-item>
              <text:list-item>
                <text:p text:style-name="P6"><text:span text:style-name="T2">Quel pays choisiriez-vous ? Pourquoi ?</text:span></text:p>
              </text:list-item>
              <text:list-item>
                <text:p text:style-name="P6"><text:span text:style-name="T2">Avantages et difficultés d’un séjour à l’étranger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 séjour · une bourse · un·e correspondant·e</text:span></text:p>
            <text:p text:style-name="P3"><text:span text:style-name="T2">l’hébergement · la famille d’accueil · une candidature</text:span></text:p>
            <text:p text:style-name="P3"><text:span text:style-name="T2">la motivation · s’inscrire · postuler · progresse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’hypothès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l’hypothès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Si + imparfait → conditionnel présent</text:span></text:p>
            <text:list text:style-name="L3">
              <text:list-item>
                <text:p text:style-name="P3"><text:span text:style-name="T2">Si je partais en Erasmus, je progresserais vite.</text:span></text:p>
              </text:list-item>
              <text:list-item>
                <text:p text:style-name="P3"><text:span text:style-name="T2">Si tu choisissais l’Espagne, tu découvrirais une culture.</text:span></text:p>
              </text:list-item>
            </text:list>
            <text:p text:style-name="P3"><text:span text:style-name="T2">Conditionnel = radical du futur + terminaisons de l’imparfait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émoignage de Léa (podcast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émoignage de Léa (podcast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rois mois à Salamanque, en Espagne, en seconde</text:span></text:p>
              </text:list-item>
              <text:list-item>
                <text:p text:style-name="P6"><text:span text:style-name="T2">Famille d’accueil formidable (paella, espagnol à table)</text:span></text:p>
              </text:list-item>
              <text:list-item>
                <text:p text:style-name="P6"><text:span text:style-name="T2">Passée d’un A2 à un B2 en trois mois</text:span></text:p>
              </text:list-item>
              <text:list-item>
                <text:p text:style-name="P6"><text:span text:style-name="T2">« Si vous hésitez, lancez-vous.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Erasmus+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Erasmus+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rogramme créé en 1987 (Communauté européenne)</text:span></text:p>
              </text:list-item>
              <text:list-item>
                <text:p text:style-name="P6"><text:span text:style-name="T2">Nom : hommage à Érasme de Rotterdam</text:span></text:p>
              </text:list-item>
              <text:list-item>
                <text:p text:style-name="P6"><text:span text:style-name="T2">2014 : Erasmus+ (éducation, formation, jeunesse, sport)</text:span></text:p>
              </text:list-item>
              <text:list-item>
                <text:p text:style-name="P6"><text:span text:style-name="T2">Ouvert aux lycéens ; mobilité courte ou longue ; bourse</text:span></text:p>
              </text:list-item>
            </text:list>
            <text:p text:style-name="P3"><text:span text:style-name="T4">(Source : Wikipédia « Erasmus+ », CC-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Compréhension orale : 5 questions de repérage</text:span></text:p>
              </text:list-item>
              <text:list-item>
                <text:p text:style-name="P6"><text:span text:style-name="T2">Vocabulaire : phrases à trous</text:span></text:p>
              </text:list-item>
              <text:list-item>
                <text:p text:style-name="P6"><text:span text:style-name="T2">Conditionnel : transformer les hypothèses</text:span></text:p>
              </text:list-item>
              <text:list-item>
                <text:p text:style-name="P6"><text:span text:style-name="T2">Production guidée : 2-3 phrases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Courriel de candidature (~180 mots)</text:span></text:p>
            <text:p text:style-name="P3"><text:span text:style-name="T2">Objet · politesse · présentation · motivation (3 raisons) · engagement (3 verbes) · une hypothèse au conditionnel · clôture</text:span></text:p>
            <text:p text:style-name="P3"><text:span text:style-name="T2">Critères : consigne · contenu · langue · conditionnel — /15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comprends un témoignage oral</text:span></text:p>
              </text:list-item>
              <text:list-item>
                <text:p text:style-name="P6"><text:span text:style-name="T2">Je repère des informations précises</text:span></text:p>
              </text:list-item>
              <text:list-item>
                <text:p text:style-name="P6"><text:span text:style-name="T2">J’explique Erasmus+</text:span></text:p>
              </text:list-item>
              <text:list-item>
                <text:p text:style-name="P6"><text:span text:style-name="T2">Je forme une hypothèse au conditionnel</text:span></text:p>
              </text:list-item>
              <text:list-item>
                <text:p text:style-name="P6"><text:span text:style-name="T2">Je rédige un courriel de 180 mo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— 30 point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— 30 point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: Compréhension orale (10 P.)</text:span></text:p>
              </text:list-item>
              <text:list-item>
                <text:p text:style-name="P6"><text:span text:style-name="T2">Tâche 2 : Vocabulaire (8 P.)</text:span></text:p>
              </text:list-item>
              <text:list-item>
                <text:p text:style-name="P6"><text:span text:style-name="T2">Tâche 3 : Expression écrite — courriel (12 P.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, « Erasmus+ » — CC-BY-SA</text:span></text:p>
              </text:list-item>
              <text:list-item>
                <text:p text:style-name="P6"><text:span text:style-name="T2">Wikipédia, « Programme Erasmus » — CC-BY-SA</text:span></text:p>
              </text:list-item>
              <text:list-item>
                <text:p text:style-name="P6"><text:span text:style-name="T2">Textes et dialogues : originaux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28:53</meta:creation-date>
    <dc:date>2026-07-21T16:28:53</dc:date>
    <meta:document-statistic meta:object-count="185"/>
    <meta:generator>LibreOffice/24.2.7.2$Linux_X86_64 LibreOffice_project/420$Build-2</meta:generator>
  </office:meta>
</office:document-meta>
</file>