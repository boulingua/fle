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715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Mobilité (Erasmus jeun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Mobilité (Erasmus jeun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10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et distinguer trois programmes de mobilité</text:span></text:p>
              </text:list-item>
              <text:list-item>
                <text:p text:style-name="P6"><text:span text:style-name="T2">Comprendre un témoignage oral et en relever les informations clés</text:span></text:p>
              </text:list-item>
              <text:list-item>
                <text:p text:style-name="P6"><text:span text:style-name="T2">Repérer et reformuler des motivations</text:span></text:p>
              </text:list-item>
              <text:list-item>
                <text:p text:style-name="P6"><text:span text:style-name="T2">Rédiger une courte lettre de motivation (120–150 mots)</text:span></text:p>
              </text:list-item>
              <text:list-item>
                <text:p text:style-name="P6"><text:span text:style-name="T2">Réutiliser le vocabulaire de la mobil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Yasmin :</text:span><text:span text:style-name="T2"> Le lycée propose un échange de trois semaines à Lyon !</text:span></text:p>
            <text:p text:style-name="P3"><text:span text:style-name="T3">Tobias :</text:span><text:span text:style-name="T2"> Ça me fait un peu peur… loger dans une famille inconnue, parler français toute la journée.</text:span></text:p>
            <text:p text:style-name="P3"><text:span text:style-name="T3">Yasmin :</text:span><text:span text:style-name="T2"> Justement ! Mon français ne progresse plus. Et il faut écrire une lettre de motivation.</text:span></text:p>
            <text:p text:style-name="P3"><text:span text:style-name="T3">Tobias :</text:span><text:span text:style-name="T2"> Je ne sais jamais quoi mettre dans ce genre de lettre.</text:span></text:p>
            <text:p text:style-name="P3"><text:span text:style-name="T3">Yasmin :</text:span><text:span text:style-name="T2"> On la prépare ensembl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imeriez-vous vivre à l’étranger quelques mois ? Pourquoi ?</text:span></text:p>
              </text:list-item>
              <text:list-item>
                <text:p text:style-name="P6"><text:span text:style-name="T2">Quel pays vous attire le plus ?</text:span></text:p>
              </text:list-item>
              <text:list-item>
                <text:p text:style-name="P6"><text:span text:style-name="T2">Que savez-vous du programme Erasmus ?</text:span></text:p>
              </text:list-item>
              <text:list-item>
                <text:p text:style-name="P6"><text:span text:style-name="T2">Avantages et difficultés d’un séjour à l’étranger ?</text:span></text:p>
              </text:list-item>
            </text:list>
            <text:p text:style-name="P3"><text:span text:style-name="T4">Au tableau : deux colonnes « avantages » / « difficultés »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rois programm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rois programmes</text:span></text:p>
          </draw:text-box>
        </draw:frame>
        <draw:frame draw:name="Content Placeholder 5" draw:style-name="gr2" draw:layer="layout" svg:width="22.859cm" svg:height="3.339cm" svg:x="1.27cm" svg:y="3.3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Programme</text:span></text:p>
              </table:table-cell>
              <table:table-cell>
                <text:p text:style-name="P7"><text:span text:style-name="T5">Pour qui ?</text:span></text:p>
              </table:table-cell>
              <table:table-cell>
                <text:p text:style-name="P7"><text:span text:style-name="T5">Durée</text:span></text:p>
              </table:table-cell>
              <table:table-cell>
                <text:p text:style-name="P7"><text:span text:style-name="T5">Soutie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Erasmus+</text:span></text:p>
              </table:table-cell>
              <table:table-cell>
                <text:p text:style-name="P7"><text:span text:style-name="T6">dès le secondaire</text:span></text:p>
              </table:table-cell>
              <table:table-cell>
                <text:p text:style-name="P7"><text:span text:style-name="T6">2–12 mois</text:span></text:p>
              </table:table-cell>
              <table:table-cell>
                <text:p text:style-name="P7"><text:span text:style-name="T6">bourse mensuell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OFAJ / DFJW</text:span></text:p>
              </table:table-cell>
              <table:table-cell>
                <text:p text:style-name="P7"><text:span text:style-name="T6">13–30 ans (FR–DE)</text:span></text:p>
              </table:table-cell>
              <table:table-cell>
                <text:p text:style-name="P7"><text:span text:style-name="T6">2 sem.–12 mois</text:span></text:p>
              </table:table-cell>
              <table:table-cell>
                <text:p text:style-name="P7"><text:span text:style-name="T6">aide voyage + séjou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Service civique</text:span></text:p>
              </table:table-cell>
              <table:table-cell>
                <text:p text:style-name="P7"><text:span text:style-name="T6">16–25 ans</text:span></text:p>
              </table:table-cell>
              <table:table-cell>
                <text:p text:style-name="P7"><text:span text:style-name="T6">6–12 mois</text:span></text:p>
              </table:table-cell>
              <table:table-cell>
                <text:p text:style-name="P7"><text:span text:style-name="T6">indemnité mensuel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échange (scolaire) — </text:span><text:span text:style-name="T4">ein (Schüler-)Austausch</text:span></text:p>
              </text:list-item>
              <text:list-item>
                <text:p text:style-name="P6"><text:span text:style-name="T2">un séjour à l’étranger — </text:span><text:span text:style-name="T4">ein Auslandsaufenthalt</text:span></text:p>
              </text:list-item>
              <text:list-item>
                <text:p text:style-name="P6"><text:span text:style-name="T2">une famille d’accueil — </text:span><text:span text:style-name="T4">eine Gastfamilie</text:span></text:p>
              </text:list-item>
              <text:list-item>
                <text:p text:style-name="P6"><text:span text:style-name="T2">une lettre de motivation — </text:span><text:span text:style-name="T4">ein Motivationsschreiben</text:span></text:p>
              </text:list-item>
              <text:list-item>
                <text:p text:style-name="P6"><text:span text:style-name="T2">un dossier de candidature — </text:span><text:span text:style-name="T4">eine Bewerbungsmappe</text:span></text:p>
              </text:list-item>
              <text:list-item>
                <text:p text:style-name="P6"><text:span text:style-name="T2">une bourse — </text:span><text:span text:style-name="T4">ein Stipendium</text:span></text:p>
              </text:list-item>
              <text:list-item>
                <text:p text:style-name="P6"><text:span text:style-name="T2">une certification linguistique — </text:span><text:span text:style-name="T4">ein Sprachzertifikat</text:span></text:p>
              </text:list-item>
              <text:list-item>
                <text:p text:style-name="P6"><text:span text:style-name="T2">candidater — </text:span><text:span text:style-name="T4">sich bewerb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a motiv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a motiv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parce que / car</text:span><text:span text:style-name="T2"> + indicatif : </text:span><text:span text:style-name="T4">… parce que je veux progresser.</text:span></text:p>
              </text:list-item>
              <text:list-item>
                <text:p text:style-name="P6"><text:span text:style-name="T3">pour</text:span><text:span text:style-name="T2"> + infinitif : </text:span><text:span text:style-name="T4">… pour découvrir une autre culture.</text:span></text:p>
              </text:list-item>
              <text:list-item>
                <text:p text:style-name="P6"><text:span text:style-name="T3">afin de</text:span><text:span text:style-name="T2"> + infinitif : </text:span><text:span text:style-name="T4">… afin d’acquérir de l’autonomie.</text:span></text:p>
              </text:list-item>
              <text:list-item>
                <text:p text:style-name="P6"><text:span text:style-name="T3">grâce à</text:span><text:span text:style-name="T2"> + nom : </text:span><text:span text:style-name="T4">J’ai progressé grâce à l’échange.</text:span></text:p>
              </text:list-item>
            </text:list>
            <text:p text:style-name="P3"><text:span text:style-name="T2">À l’écrit : préférez </text:span><text:span text:style-name="T4">afin de</text:span><text:span text:style-name="T2"> et </text:span><text:span text:style-name="T4">pour</text:span><text:span text:style-name="T2"> + infinitif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émoignage — Nour (17 ans, OFAJ, Fribourg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émoignage — Nour (17 ans, OFAJ, Fribourg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Trois semaines à Fribourg, dans une famille d’accueil.</text:span></text:p>
            <text:p text:style-name="P3"><text:span text:style-name="T2">Pourquoi l’Allemagne ? Pour progresser, mais surtout pour sortir de ma zone de confort.</text:span></text:p>
            <text:p text:style-name="P3"><text:span text:style-name="T2">Le plus dur, ce sont les premiers jours. Au bout d’une semaine, ça change.</text:span></text:p>
            <text:p text:style-name="P3"><text:span text:style-name="T2">Mon conseil : commencez tôt et soignez votre lettre de motivation. Foncez !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OFAJ / DFJW</text:span><text:span text:style-name="T2"> : créé par le </text:span><text:span text:style-name="T3">traité de l’Élysée</text:span><text:span text:style-name="T2"> (22 janvier 1963), pour rapprocher jeunes Français et Allemands.</text:span></text:p>
              </text:list-item>
              <text:list-item>
                <text:p text:style-name="P6"><text:span text:style-name="T3">Erasmus+</text:span><text:span text:style-name="T2"> : forme actuelle depuis 2014 ; prolonge Erasmus (1987).</text:span></text:p>
              </text:list-item>
              <text:list-item>
                <text:p text:style-name="P6"><text:span text:style-name="T2">Nom en hommage à </text:span><text:span text:style-name="T3">Érasme de Rotterdam</text:span><text:span text:style-name="T2">, humaniste voyageur.</text:span></text:p>
              </text:list-item>
            </text:list>
            <text:p text:style-name="P3"><text:span text:style-name="T4">(D’après Wikipédia, CC-BY-SA.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6"><text:span text:style-name="T3">Compréhension orale</text:span><text:span text:style-name="T2"> — 5 questions sur le témoignage</text:span></text:p>
              </text:list-item>
              <text:list-item>
                <text:p text:style-name="P6"><text:span text:style-name="T3">Vocabulaire</text:span><text:span text:style-name="T2"> — définir 4 termes</text:span></text:p>
              </text:list-item>
              <text:list-item>
                <text:p text:style-name="P6"><text:span text:style-name="T3">Quel programme ?</text:span><text:span text:style-name="T2"> — 3 cas à orienter + justification</text:span></text:p>
              </text:list-item>
              <text:list-item>
                <text:p text:style-name="P6"><text:span text:style-name="T3">Motivation</text:span><text:span text:style-name="T2"> — compléter avec </text:span><text:span text:style-name="T4">pour / parce que / afin de / grâce à</text:span></text:p>
              </text:list-item>
            </text:list>
            <text:p text:style-name="P3"><text:span text:style-name="T4">Différenciation G / M / 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ettre de motivation (120–150 mots)</text:span><text:span text:style-name="T2"> pour l’échange avec Lyon :</text:span></text:p>
            <text:list text:style-name="L7">
              <text:list-item>
                <text:p text:style-name="P3"><text:span text:style-name="T2">Formule d’appel</text:span></text:p>
              </text:list-item>
              <text:list-item>
                <text:p text:style-name="P3"><text:span text:style-name="T2">Qui vous êtes</text:span></text:p>
              </text:list-item>
              <text:list-item>
                <text:p text:style-name="P3"><text:span text:style-name="T2">Trois motivations (</text:span><text:span text:style-name="T4">pour</text:span><text:span text:style-name="T2"> / </text:span><text:span text:style-name="T4">afin de</text:span><text:span text:style-name="T2"> / </text:span><text:span text:style-name="T4">parce que</text:span><text:span text:style-name="T2">)</text:span></text:p>
              </text:list-item>
              <text:list-item>
                <text:p text:style-name="P3"><text:span text:style-name="T2">Votre projet</text:span></text:p>
              </text:list-item>
              <text:list-item>
                <text:p text:style-name="P3"><text:span text:style-name="T2">Formule de politesse finale</text:span></text:p>
              </text:list-item>
            </text:list>
            <text:p text:style-name="P3"><text:span text:style-name="T4">Critères : structure · motivations · langue · vocabulaire · longueu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nomme trois programmes de mobilité</text:span></text:p>
              </text:list-item>
              <text:list-item>
                <text:p text:style-name="P6"><text:span text:style-name="T2">☐ </text:span><text:span text:style-name="T2">Je comprends un témoignage oral</text:span></text:p>
              </text:list-item>
              <text:list-item>
                <text:p text:style-name="P6"><text:span text:style-name="T2">☐ </text:span><text:span text:style-name="T2">J’exprime des motivations</text:span></text:p>
              </text:list-item>
              <text:list-item>
                <text:p text:style-name="P6"><text:span text:style-name="T2">☐ </text:span><text:span text:style-name="T2">Je rédige une lettre de motivation structurée</text:span></text:p>
              </text:list-item>
              <text:list-item>
                <text:p text:style-name="P6"><text:span text:style-name="T2">☐ </text:span><text:span text:style-name="T2">Je connais six mots de la mobil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âche 1 — Hörverstehen</text:span><text:span text:style-name="T2"> (12 P.) : 6 questions sur le témoignage</text:span></text:p>
              </text:list-item>
              <text:list-item>
                <text:p text:style-name="P6"><text:span text:style-name="T3">Tâche 2 — Programmes</text:span><text:span text:style-name="T2"> (6 P.) : 3 cas + justification</text:span></text:p>
              </text:list-item>
              <text:list-item>
                <text:p text:style-name="P6"><text:span text:style-name="T3">Tâche 3 — Schreiben</text:span><text:span text:style-name="T2"> (12 P.) : lettre de motivation (120–15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rasmus+</text:span><text:span text:style-name="T2"> — Wikipédia, CC-BY-SA 4.0</text:span></text:p>
              </text:list-item>
              <text:list-item>
                <text:p text:style-name="P6"><text:span text:style-name="T4">Office franco-allemand pour la jeunesse</text:span><text:span text:style-name="T2"> — Wikipédia, CC-BY-SA 4.0</text:span></text:p>
              </text:list-item>
              <text:list-item>
                <text:p text:style-name="P6"><text:span text:style-name="T4">Traité de l’Élysée</text:span><text:span text:style-name="T2"> — Wikipédia, CC-BY-SA 4.0</text:span></text:p>
              </text:list-item>
              <text:list-item>
                <text:p text:style-name="P6"><text:span text:style-name="T2">ofaj.org · service-civique.gouv.fr (référenc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46</meta:creation-date>
    <dc:date>2026-07-21T15:46:46</dc:date>
    <meta:document-statistic meta:object-count="189"/>
    <meta:generator>LibreOffice/24.2.7.2$Linux_X86_64 LibreOffice_project/420$Build-2</meta:generator>
  </office:meta>
</office:document-meta>
</file>