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0 — Musique et chanson francophon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0 — Musique et chanson francophon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(lycée) · classe 7 · Niveau 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primer et justifier mes goûts musicaux</text:span></text:p>
              </text:list-item>
              <text:list-item>
                <text:p text:style-name="P6"><text:span text:style-name="T2">Comprendre l’essentiel d’un clip ou d’un audio francophone</text:span></text:p>
              </text:list-item>
              <text:list-item>
                <text:p text:style-name="P6"><text:span text:style-name="T2">Situer 5 artistes (pays + style)</text:span></text:p>
              </text:list-item>
              <text:list-item>
                <text:p text:style-name="P6"><text:span text:style-name="T2">Nommer 6 styles et le vocabulaire de base</text:span></text:p>
              </text:list-item>
              <text:list-item>
                <text:p text:style-name="P6"><text:span text:style-name="T2">Rédiger un court avis (~80 mot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éa et Karim, au foyer : - Léa adore la chanson, pas trop le rap - Karim écoute du rap français et de l’afropop - « Francophone » ≠ « français·e » : Belgique, Québec, Sénégal, Côte d’Ivoire…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·e chanteur/chanteuse francophone que vous connaissez ?</text:span></text:p>
              </text:list-item>
              <text:list-item>
                <text:p text:style-name="P6"><text:span text:style-name="T2">Votre style : rap ? pop ? chanson ? électro ?</text:span></text:p>
              </text:list-item>
              <text:list-item>
                <text:p text:style-name="P6"><text:span text:style-name="T2">Comprenez-vous les paroles en français ?</text:span></text:p>
              </text:list-item>
              <text:list-item>
                <text:p text:style-name="P6"><text:span text:style-name="T2">Que veulent dire </text:span><text:span text:style-name="T3">les paroles</text:span><text:span text:style-name="T2"> et </text:span><text:span text:style-name="T3">le refrain</text:span><text:span text:style-name="T2">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e chanson · les paroles · le refrain · le couplet</text:span></text:p>
              </text:list-item>
              <text:list-item>
                <text:p text:style-name="P6"><text:span text:style-name="T2">la mélodie · le rythme</text:span></text:p>
              </text:list-item>
              <text:list-item>
                <text:p text:style-name="P6"><text:span text:style-name="T2">un·e chanteur/chanteuse · un groupe</text:span></text:p>
              </text:list-item>
              <text:list-item>
                <text:p text:style-name="P6"><text:span text:style-name="T2">un tube · un clip</text:span></text:p>
              </text:list-item>
              <text:list-item>
                <text:p text:style-name="P6"><text:span text:style-name="T2">aimer · adorer · préférer · détest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inq artistes francophones (par référence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inq artistes francophones (par référence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éline Dion — Québec — chanson / pop</text:span></text:p>
              </text:list-item>
              <text:list-item>
                <text:p text:style-name="P6"><text:span text:style-name="T2">Stromae — Belgique — électropop / hip-hop</text:span></text:p>
              </text:list-item>
              <text:list-item>
                <text:p text:style-name="P6"><text:span text:style-name="T2">Aya Nakamura — France (née au Mali) — R’n’B / afropop</text:span></text:p>
              </text:list-item>
              <text:list-item>
                <text:p text:style-name="P6"><text:span text:style-name="T2">Magic System — Côte d’Ivoire — zouglou</text:span></text:p>
              </text:list-item>
              <text:list-item>
                <text:p text:style-name="P6"><text:span text:style-name="T2">Youssou N’Dour — Sénégal — mbalax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x styl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x styl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a chanson · la pop · le rap · le R’n’B · l’électro · la musique du mond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exprimer ses goût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exprimer ses goût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imer / adorer / préférer / détester + </text:span><text:span text:style-name="T4">le, la, l’, les</text:span></text:p>
              </text:list-item>
              <text:list-item>
                <text:p text:style-name="P6"><text:span text:style-name="T2">aimer + </text:span><text:span text:style-name="T4">infinitif</text:span><text:span text:style-name="T2"> (j’aime écouter)</text:span></text:p>
              </text:list-item>
              <text:list-item>
                <text:p text:style-name="P6"><text:span text:style-name="T2">intensité : beaucoup · bien · un peu · pas du tout</text:span></text:p>
              </text:list-item>
              <text:list-item>
                <text:p text:style-name="P6"><text:span text:style-name="T2">comparer : préférer X </text:span><text:span text:style-name="T4">à</text:span><text:span text:style-name="T2"> Y</text:span></text:p>
              </text:list-item>
              <text:list-item>
                <text:p text:style-name="P6"><text:span text:style-name="T2">justifier : … </text:span><text:span text:style-name="T4">parce que</text:span><text:span text:style-name="T2"> …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a francophonie musica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a francophonie musica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Francophone = tous les pays qui utilisent le français</text:span></text:p>
              </text:list-item>
              <text:list-item>
                <text:p text:style-name="P6"><text:span text:style-name="T2">La chanson d’expression française est aussi belge, québécoise, sénégalaise, ivoirienne…</text:span></text:p>
              </text:list-item>
              <text:list-item>
                <text:p text:style-name="P6"><text:span text:style-name="T2">Grande variété de styles : zouglou, mbalax, pop, rap</text:span></text:p>
              </text:list-item>
              <text:list-item>
                <text:p text:style-name="P6"><text:span text:style-name="T2">(D’après Wikipédia, CC BY-SA 4.0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du dialogue</text:span></text:p>
              </text:list-item>
              <text:list-item>
                <text:p text:style-name="P6"><text:span text:style-name="T2">Ex. 2 : artiste → style → pays</text:span></text:p>
              </text:list-item>
              <text:list-item>
                <text:p text:style-name="P6"><text:span text:style-name="T2">Ex. 3 : article ou préposition après un verbe de goût</text:span></text:p>
              </text:list-item>
              <text:list-item>
                <text:p text:style-name="P6"><text:span text:style-name="T2">Ex. 4 : 3 phrases sur vos goûts (parce que)</text:span></text:p>
              </text:list-item>
              <text:list-item>
                <text:p text:style-name="P6"><text:span text:style-name="T2">Différenciation G / M / 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 — « Ma sélection francophone »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 — « Ma sélection francophone »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 clip francophone (3–4 min), présenté PAR RÉFÉRENCE</text:span></text:p>
              </text:list-item>
              <text:list-item>
                <text:p text:style-name="P6"><text:span text:style-name="T2">Titre + artiste + pays + style</text:span></text:p>
              </text:list-item>
              <text:list-item>
                <text:p text:style-name="P6"><text:span text:style-name="T2">2 impressions + avis justifié</text:span></text:p>
              </text:list-item>
              <text:list-item>
                <text:p text:style-name="P6"><text:span text:style-name="T2">Ne pas recopier les paroles (droit d’auteur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’exprime et je justifie un goût</text:span></text:p>
              </text:list-item>
              <text:list-item>
                <text:p text:style-name="P6"><text:span text:style-name="T2">Je comprends un clip francophone</text:span></text:p>
              </text:list-item>
              <text:list-item>
                <text:p text:style-name="P6"><text:span text:style-name="T2">Je situe 5 artistes</text:span></text:p>
              </text:list-item>
              <text:list-item>
                <text:p text:style-name="P6"><text:span text:style-name="T2">Je nomme 6 styles</text:span></text:p>
              </text:list-item>
              <text:list-item>
                <text:p text:style-name="P6"><text:span text:style-name="T2">Je parle par référence, sans copier de parol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.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.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1 Compréhension orale / audiovisuelle — 12 P.</text:span></text:p>
              </text:list-item>
              <text:list-item>
                <text:p text:style-name="P6"><text:span text:style-name="T2">T2 Vocabulaire + point de langue — 8 P.</text:span></text:p>
              </text:list-item>
              <text:list-item>
                <text:p text:style-name="P6"><text:span text:style-name="T2">T3 Expression écrite (~80 mots) — 10 P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Wikipédia « Francophonie » — CC BY-SA 4.0</text:span></text:p>
              </text:list-item>
              <text:list-item>
                <text:p text:style-name="P6"><text:span text:style-name="T2">Wikipédia « Chanson française » — CC BY-SA 4.0</text:span></text:p>
              </text:list-item>
              <text:list-item>
                <text:p text:style-name="P6"><text:span text:style-name="T2">Wikipédia « OIF » — CC BY-SA 4.0</text:span></text:p>
              </text:list-item>
              <text:list-item>
                <text:p text:style-name="P6"><text:span text:style-name="T2">Textes originaux ; plateforme non affiliée aux artist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09:47</meta:creation-date>
    <dc:date>2026-07-21T16:09:47</dc:date>
    <meta:document-statistic meta:object-count="189"/>
    <meta:generator>LibreOffice/24.2.7.2$Linux_X86_64 LibreOffice_project/420$Build-2</meta:generator>
  </office:meta>
</office:document-meta>
</file>