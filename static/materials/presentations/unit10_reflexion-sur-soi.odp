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10 — Réflexion sur son parcours F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10 — Réflexion sur son parcours F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· classe 13 · Niveau E</text:span></text:p>
            <text:p text:style-name="P3"><text:span text:style-name="T2">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Faire le bilan de mon parcours d’apprentissage</text:span></text:p>
              </text:list-item>
              <text:list-item>
                <text:p text:style-name="P6"><text:span text:style-name="T2">Nommer mes stratégies d’apprentissage</text:span></text:p>
              </text:list-item>
              <text:list-item>
                <text:p text:style-name="P6"><text:span text:style-name="T2">Présenter un monologue : bilan + projet</text:span></text:p>
              </text:list-item>
              <text:list-item>
                <text:p text:style-name="P6"><text:span text:style-name="T2">Rédiger un texte réflexif structuré</text:span></text:p>
              </text:list-item>
              <text:list-item>
                <text:p text:style-name="P6"><text:span text:style-name="T2">Me fixer des objectifs pour l’avenir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Léa et Malik, deux semaines avant l’examen :</text:span></text:p>
            <text:list text:style-name="L3">
              <text:list-item>
                <text:p text:style-name="P3"><text:span text:style-name="T2">Malik : « Je ne sais pas ce que j’ai vraiment appris… »</text:span></text:p>
              </text:list-item>
              <text:list-item>
                <text:p text:style-name="P3"><text:span text:style-name="T2">Léa : « Moi, j’ai appris </text:span><text:span text:style-name="T3">comment</text:span><text:span text:style-name="T2"> j’apprends. »</text:span></text:p>
              </text:list-item>
            </text:list>
            <text:p text:style-name="P3"><text:span text:style-name="T2">Et vous : plutôt Léa ou plutôt Malik 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Quand avez-vous commencé le français ?</text:span></text:p>
              </text:list-item>
              <text:list-item>
                <text:p text:style-name="P6"><text:span text:style-name="T2">Un moment de vrai progrès ?</text:span></text:p>
              </text:list-item>
              <text:list-item>
                <text:p text:style-name="P6"><text:span text:style-name="T2">Une difficulté qui revient encore ?</text:span></text:p>
              </text:list-item>
              <text:list-item>
                <text:p text:style-name="P6"><text:span text:style-name="T2">Que faites-vous quand vous ne comprenez pas ?</text:span></text:p>
              </text:list-item>
              <text:list-item>
                <text:p text:style-name="P6"><text:span text:style-name="T2">Outil, plaisir ou contrainte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e parcours d’apprentissage</text:span></text:p>
              </text:list-item>
              <text:list-item>
                <text:p text:style-name="P6"><text:span text:style-name="T2">la métacognition · apprendre à apprendre</text:span></text:p>
              </text:list-item>
              <text:list-item>
                <text:p text:style-name="P6"><text:span text:style-name="T2">une stratégie d’apprentissage</text:span></text:p>
              </text:list-item>
              <text:list-item>
                <text:p text:style-name="P6"><text:span text:style-name="T2">faire le bilan · s’autoévaluer</text:span></text:p>
              </text:list-item>
              <text:list-item>
                <text:p text:style-name="P6"><text:span text:style-name="T2">un point fort / un point faible</text:span></text:p>
              </text:list-item>
              <text:list-item>
                <text:p text:style-name="P6"><text:span text:style-name="T2">surmonter une difficulté · persévérer</text:span></text:p>
              </text:list-item>
              <text:list-item>
                <text:p text:style-name="P6"><text:span text:style-name="T2">se fixer un objectif · désormais · à l’avenir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Point de langu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Point de langu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Bilan et projection :</text:span></text:p>
            <text:list text:style-name="L3">
              <text:list-item>
                <text:p text:style-name="P3"><text:span text:style-name="T4">Passé</text:span><text:span text:style-name="T2"> : passé composé (</text:span><text:span text:style-name="T3">j’ai compris</text:span><text:span text:style-name="T2">) + imparfait (</text:span><text:span text:style-name="T3">je n’osais pas</text:span><text:span text:style-name="T2">)</text:span></text:p>
              </text:list-item>
              <text:list-item>
                <text:p text:style-name="P3"><text:span text:style-name="T4">Futur</text:span><text:span text:style-name="T2"> : futur simple (</text:span><text:span text:style-name="T3">je continuerai</text:span><text:span text:style-name="T2">) + conditionnel (</text:span><text:span text:style-name="T3">j’aimerais</text:span><text:span text:style-name="T2">)</text:span></text:p>
              </text:list-item>
              <text:list-item>
                <text:p text:style-name="P3"><text:span text:style-name="T4">Connecteurs</text:span><text:span text:style-name="T2"> : au début… peu à peu… désormais… à l’avenir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Text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Text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« Ce que le français m’a appris »</text:span></text:p>
            <text:list text:style-name="L3">
              <text:list-item>
                <text:p text:style-name="P3"><text:span text:style-name="T2">Au début : mémoriser des mots → tout disparaissait</text:span></text:p>
              </text:list-item>
              <text:list-item>
                <text:p text:style-name="P3"><text:span text:style-name="T2">Une question : « Comment fais-tu pour retenir ? »</text:span></text:p>
              </text:list-item>
              <text:list-item>
                <text:p text:style-name="P3"><text:span text:style-name="T2">Prise de conscience : je peux choisir </text:span><text:span text:style-name="T3">comment</text:span><text:span text:style-name="T2"> j’apprends</text:span></text:p>
              </text:list-item>
              <text:list-item>
                <text:p text:style-name="P3"><text:span text:style-name="T2">Une méthode : observer, essayer, corriger, recommencer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Note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Note culture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Le CECRL (Conseil de l’Europe, 2001) :</text:span></text:p>
            <text:list text:style-name="L3">
              <text:list-item>
                <text:p text:style-name="P3"><text:span text:style-name="T2">niveaux A1 à C2</text:span></text:p>
              </text:list-item>
              <text:list-item>
                <text:p text:style-name="P3"><text:span text:style-name="T2">descriptions « Je peux… » à la première personne</text:span></text:p>
              </text:list-item>
              <text:list-item>
                <text:p text:style-name="P3"><text:span text:style-name="T2">Portfolio européen des langues → s’autoévaluer</text:span></text:p>
              </text:list-item>
            </text:list>
            <text:p text:style-name="P3"><text:span text:style-name="T3">(D’après Wikipédia, CC-BY-SA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— Compréhension du texte</text:span></text:p>
              </text:list-item>
              <text:list-item>
                <text:p text:style-name="P6"><text:span text:style-name="T2">Ex. 2 — Vocabulaire à compléter</text:span></text:p>
              </text:list-item>
              <text:list-item>
                <text:p text:style-name="P6"><text:span text:style-name="T2">Ex. 3 — Grammaire : bilan / projection</text:span></text:p>
              </text:list-item>
              <text:list-item>
                <text:p text:style-name="P6"><text:span text:style-name="T2">Ex. 4 — Trois phrases (passé / présent / futur)</text:span></text:p>
              </text:list-item>
            </text:list>
            <text:p text:style-name="P3"><text:span text:style-name="T2">Différenciation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Monologue suivi (2–3 min) : </text:span><text:span text:style-name="T4">« Mon parcours de français : bilan et projet »</text:span></text:p>
            <text:list text:style-name="L5">
              <text:list-item>
                <text:p text:style-name="P3"><text:span text:style-name="T2">Bilan (passé)</text:span></text:p>
              </text:list-item>
              <text:list-item>
                <text:p text:style-name="P3"><text:span text:style-name="T2">Aujourd’hui (point fort / faible / stratégie)</text:span></text:p>
              </text:list-item>
              <text:list-item>
                <text:p text:style-name="P3"><text:span text:style-name="T2">Projet (futur / conditionnel)</text:span></text:p>
              </text:list-item>
            </text:list>
            <text:p text:style-name="P3"><text:span text:style-name="T2">Notes en mots-clés seulement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Je peux…</text:span></text:p>
            <text:list text:style-name="L3">
              <text:list-item>
                <text:p text:style-name="P3"><text:span text:style-name="T2">distinguer mes points forts et faibles</text:span></text:p>
              </text:list-item>
              <text:list-item>
                <text:p text:style-name="P3"><text:span text:style-name="T2">nommer mes stratégies</text:span></text:p>
              </text:list-item>
              <text:list-item>
                <text:p text:style-name="P3"><text:span text:style-name="T2">raconter au passé, projeter au futur</text:span></text:p>
              </text:list-item>
              <text:list-item>
                <text:p text:style-name="P3"><text:span text:style-name="T2">parler en continu 2–3 min</text:span></text:p>
              </text:list-item>
              <text:list-item>
                <text:p text:style-name="P3"><text:span text:style-name="T2">me fixer un objectif concret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A — Oral</text:span><text:span text:style-name="T2"> : monologue 2–3 min (18 pts)</text:span></text:p>
              </text:list-item>
              <text:list-item>
                <text:p text:style-name="P6"><text:span text:style-name="T4">B — Écrit</text:span><text:span text:style-name="T2"> : texte réflexif 180–220 mots (12 pts)</text:span></text:p>
              </text:list-item>
            </text:list>
            <text:p text:style-name="P3"><text:span text:style-name="T2">Total : 30 point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ECRL — Wikipédia, CC-BY-SA</text:span></text:p>
              </text:list-item>
              <text:list-item>
                <text:p text:style-name="P6"><text:span text:style-name="T2">Portfolio européen des langues — Wikipédia, CC-BY-SA</text:span></text:p>
              </text:list-item>
              <text:list-item>
                <text:p text:style-name="P6"><text:span text:style-name="T2">Métacognition — Wikipédia, CC-BY-SA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31:03</meta:creation-date>
    <dc:date>2026-07-21T16:31:03</dc:date>
    <meta:document-statistic meta:object-count="185"/>
    <meta:generator>LibreOffice/24.2.7.2$Linux_X86_64 LibreOffice_project/420$Build-2</meta:generator>
  </office:meta>
</office:document-meta>
</file>