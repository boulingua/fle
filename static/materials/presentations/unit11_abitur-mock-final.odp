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11 — Épreuve finale : examen blanc en conditions réell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11 — Épreuve finale : examen blanc en conditions réell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13 · Niveau E Compréhension écrite + expression écrite Thème : la francophonie, une langue en partag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ire un texte d’actualité et repérer l’essentiel</text:span></text:p>
              </text:list-item>
              <text:list-item>
                <text:p text:style-name="P6"><text:span text:style-name="T2">Organiser une réponse écrite (T–A–E)</text:span></text:p>
              </text:list-item>
              <text:list-item>
                <text:p text:style-name="P6"><text:span text:style-name="T2">Gérer mon temps dans une épreuve longue</text:span></text:p>
              </text:list-item>
              <text:list-item>
                <text:p text:style-name="P6"><text:span text:style-name="T2">Relire et corriger ma copie</text:span></text:p>
              </text:list-item>
              <text:list-item>
                <text:p text:style-name="P6"><text:span text:style-name="T2">M’auto-évaluer et nommer deux axes de progrè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Salle 214, dernière semaine avant l’épreuve.</text:span></text:p>
            <text:list text:style-name="L3">
              <text:list-item>
                <text:p text:style-name="P3"><text:span text:style-name="T2">« Lisez d’abord tout le sujet. » (Mme Renard)</text:span></text:p>
              </text:list-item>
              <text:list-item>
                <text:p text:style-name="P3"><text:span text:style-name="T2">« On ne rédige jamais avant d’avoir compris la consigne. »</text:span></text:p>
              </text:list-item>
              <text:list-item>
                <text:p text:style-name="P3"><text:span text:style-name="T2">« Une copie finie vaut mieux qu’une copie parfaite mais inachevée. »</text:span></text:p>
              </text:list-item>
            </text:list>
            <text:p text:style-name="P3"><text:span text:style-name="T2">À vous : par quoi commencez-vous ? Que faites-vous si vous bloquez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Votre note moyenne aux derniers examens blancs ?</text:span></text:p>
              </text:list-item>
              <text:list-item>
                <text:p text:style-name="P6"><text:span text:style-name="T2">Deux progrès réalisés depuis</text:span></text:p>
              </text:list-item>
              <text:list-item>
                <text:p text:style-name="P6"><text:span text:style-name="T2">La tâche qui vous inquiète : compréhension ou expression ?</text:span></text:p>
              </text:list-item>
              <text:list-item>
                <text:p text:style-name="P6"><text:span text:style-name="T2">Un objectif chiffré pour aujourd’hui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a consigne · le barème · la relecture</text:span></text:p>
              </text:list-item>
              <text:list-item>
                <text:p text:style-name="P6"><text:span text:style-name="T2">la compréhension écrite · l’expression écrite</text:span></text:p>
              </text:list-item>
              <text:list-item>
                <text:p text:style-name="P6"><text:span text:style-name="T2">la francophonie · un·e locuteur·rice · une langue en partage</text:span></text:p>
              </text:list-item>
              <text:list-item>
                <text:p text:style-name="P6"><text:span text:style-name="T2">Connecteurs : en effet · néanmoins · par conséquen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 paragraphe T–A–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 paragraphe T–A–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T (thèse)</text:span><text:span text:style-name="T2"> : votre idée affirmée</text:span></text:p>
              </text:list-item>
              <text:list-item>
                <text:p text:style-name="P6"><text:span text:style-name="T3">A (argument)</text:span><text:span text:style-name="T2"> : la raison + un connecteur</text:span></text:p>
              </text:list-item>
              <text:list-item>
                <text:p text:style-name="P6"><text:span text:style-name="T3">E (exemple)</text:span><text:span text:style-name="T2"> : un fait précis</text:span></text:p>
              </text:list-item>
              <text:list-item>
                <text:p text:style-name="P6"><text:span text:style-name="T2">Reliez les paragraphes : d’abord, ensuite, néanmoins, enfi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« Une langue, plusieurs voix »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« Une langue, plusieurs voix »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e 20 mars : Journée internationale de la francophonie</text:span></text:p>
              </text:list-item>
              <text:list-item>
                <text:p text:style-name="P6"><text:span text:style-name="T2">Le français : Dakar, Montréal, Bruxelles, Port-au-Prince, Paris</text:span></text:p>
              </text:list-item>
              <text:list-item>
                <text:p text:style-name="P6"><text:span text:style-name="T2">L’image de la rivière : une langue vivante qui coule et se transforme</text:span></text:p>
              </text:list-item>
              <text:list-item>
                <text:p text:style-name="P6"><text:span text:style-name="T2">« Plus on est nombreux à la parler, plus elle a de voix. »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l’OIF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l’OIF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Organisation internationale de la Francophonie</text:span></text:p>
              </text:list-item>
              <text:list-item>
                <text:p text:style-name="P6"><text:span text:style-name="T2">Racines en 1970 (Niamey) ; forme actuelle fin des années 1990</text:span></text:p>
              </text:list-item>
              <text:list-item>
                <text:p text:style-name="P6"><text:span text:style-name="T2">~300 millions de locuteurs, cinq continents</text:span></text:p>
              </text:list-item>
              <text:list-item>
                <text:p text:style-name="P6"><text:span text:style-name="T2">Source : Wikipédia « Francophonie », CC BY-SA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— Compréhension écrite : repérage</text:span></text:p>
              </text:list-item>
              <text:list-item>
                <text:p text:style-name="P6"><text:span text:style-name="T2">Ex. 2 — Connecteurs à compléter</text:span></text:p>
              </text:list-item>
              <text:list-item>
                <text:p text:style-name="P6"><text:span text:style-name="T2">Ex. 3 — Rédiger un paragraphe T–A–E</text:span></text:p>
              </text:list-item>
              <text:list-item>
                <text:p text:style-name="P6"><text:span text:style-name="T2">Ex. 4 — Répartir 90 minutes (+ relecture)</text:span></text:p>
              </text:list-item>
              <text:list-item>
                <text:p text:style-name="P6"><text:span text:style-name="T2">Différenciation G / M / 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exte de 250–300 mots</text:span></text:p>
              </text:list-item>
              <text:list-item>
                <text:p text:style-name="P6"><text:span text:style-name="T2">« Une langue partagée peut-elle appartenir à un seul pays ? »</text:span></text:p>
              </text:list-item>
              <text:list-item>
                <text:p text:style-name="P6"><text:span text:style-name="T2">Intro + 2 paragraphes T–A–E + conclusion</text:span></text:p>
              </text:list-item>
              <text:list-item>
                <text:p text:style-name="P6"><text:span text:style-name="T2">Au moins 4 connecteurs différent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’ai lu toutes les consignes avant de rédiger</text:span></text:p>
              </text:list-item>
              <text:list-item>
                <text:p text:style-name="P6"><text:span text:style-name="T2">Mes paragraphes suivent le modèle T–A–E</text:span></text:p>
              </text:list-item>
              <text:list-item>
                <text:p text:style-name="P6"><text:span text:style-name="T2">J’ai employé 4 connecteurs différents</text:span></text:p>
              </text:list-item>
              <text:list-item>
                <text:p text:style-name="P6"><text:span text:style-name="T2">J’ai gardé du temps pour la relecture</text:span></text:p>
              </text:list-item>
              <text:list-item>
                <text:p text:style-name="P6"><text:span text:style-name="T2">Je nomme deux axes de progrè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préhension écrite : 10 points</text:span></text:p>
              </text:list-item>
              <text:list-item>
                <text:p text:style-name="P6"><text:span text:style-name="T2">Expression écrite (300–350 mots) : 20 points</text:span></text:p>
              </text:list-item>
              <text:list-item>
                <text:p text:style-name="P6"><text:span text:style-name="T3">Total : 30 points</text:span></text:p>
              </text:list-item>
              <text:list-item>
                <text:p text:style-name="P6"><text:span text:style-name="T2">Barème : contenu, structure, langue, correct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Wikipédia — « Francophonie » (CC BY-SA)</text:span></text:p>
              </text:list-item>
              <text:list-item>
                <text:p text:style-name="P6"><text:span text:style-name="T2">Wikipédia — « Organisation internationale de la Francophonie » (CC BY-SA)</text:span></text:p>
              </text:list-item>
              <text:list-item>
                <text:p text:style-name="P6"><text:span text:style-name="T2">Textes originaux de l’unité (2026)</text:span></text:p>
              </text:list-item>
              <text:list-item>
                <text:p text:style-name="P6"><text:span text:style-name="T2">Plateforme indépendante, sans affiliation officiell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31:06</meta:creation-date>
    <dc:date>2026-07-21T16:31:06</dc:date>
    <meta:document-statistic meta:object-count="185"/>
    <meta:generator>LibreOffice/24.2.7.2$Linux_X86_64 LibreOffice_project/420$Build-2</meta:generator>
  </office:meta>
</office:document-meta>
</file>