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Discours politique : analys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Discours politique : analys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1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discours écrit : thèse, arguments, plan</text:span></text:p>
              </text:list-item>
              <text:list-item>
                <text:p text:style-name="P6"><text:span text:style-name="T2">Repérer les procédés rhétoriques et nommer leur effet</text:span></text:p>
              </text:list-item>
              <text:list-item>
                <text:p text:style-name="P6"><text:span text:style-name="T2">Analyser le cadrage (framing) d’un même fait</text:span></text:p>
              </text:list-item>
              <text:list-item>
                <text:p text:style-name="P6"><text:span text:style-name="T2">Présenter oralement une analyse (~5 min)</text:span></text:p>
              </text:list-item>
              <text:list-item>
                <text:p text:style-name="P6"><text:span text:style-name="T2">Prendre du recul : information vs persuas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éa : « Le contenu tient en une phrase. »</text:span></text:p>
              </text:list-item>
              <text:list-item>
                <text:p text:style-name="P6"><text:span text:style-name="T2">Yanis : « Alors pourquoi ça sonne aussi fort ? Il répète </text:span><text:span text:style-name="T3">Nous voulons…</text:span><text:span text:style-name="T2"> »</text:span></text:p>
              </text:list-item>
              <text:list-item>
                <text:p text:style-name="P6"><text:span text:style-name="T2">Léa : « C’est ça, la rhétorique. »</text:span></text:p>
              </text:list-item>
              <text:list-item>
                <text:p text:style-name="P6"><text:span text:style-name="T2">Bilan : analyser, ce n’est pas résumer </text:span><text:span text:style-name="T3">ce que</text:span><text:span text:style-name="T2"> dit un discours, mais expliquer </text:span><text:span text:style-name="T3">comment</text:span><text:span text:style-name="T2"> il le di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discours qui vous a marqué·e ? Pourquoi ?</text:span></text:p>
              </text:list-item>
              <text:list-item>
                <text:p text:style-name="P6"><text:span text:style-name="T2">Convaincre : par la logique, l’émotion ou la personne ?</text:span></text:p>
              </text:list-item>
              <text:list-item>
                <text:p text:style-name="P6"><text:span text:style-name="T2">« Analyser un discours, c’est expliquer les ______ qui le rendent efficac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discours · l’orateur / l’oratrice · l’auditoire</text:span></text:p>
              </text:list-item>
              <text:list-item>
                <text:p text:style-name="P6"><text:span text:style-name="T2">la thèse · un procédé rhétorique · le cadrage</text:span></text:p>
              </text:list-item>
              <text:list-item>
                <text:p text:style-name="P6"><text:span text:style-name="T2">convaincre / persuader · souligner, mettre en relief</text:span></text:p>
              </text:list-item>
              <text:list-item>
                <text:p text:style-name="P6"><text:span text:style-name="T2">l’auditoire adhère à… · prendre du recu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x procédés rhétoriqu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x procédés rhétoriqu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naphore → martèlement, rythme</text:span></text:p>
              </text:list-item>
              <text:list-item>
                <text:p text:style-name="P6"><text:span text:style-name="T2">Triade (tricolon) → plénitude</text:span></text:p>
              </text:list-item>
              <text:list-item>
                <text:p text:style-name="P6"><text:span text:style-name="T2">Antithèse → contraste net</text:span></text:p>
              </text:list-item>
              <text:list-item>
                <text:p text:style-name="P6"><text:span text:style-name="T2">Question rhétorique → implication de l’auditoire</text:span></text:p>
              </text:list-item>
              <text:list-item>
                <text:p text:style-name="P6"><text:span text:style-name="T2">« Nous » inclusif → communauté</text:span></text:p>
              </text:list-item>
              <text:list-item>
                <text:p text:style-name="P6"><text:span text:style-name="T2">Chute → effet final mémorab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a mise en relie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a mise en relie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’est … qui / que : </text:span><text:span text:style-name="T3">C’est le climat qui décidera.</text:span></text:p>
              </text:list-item>
              <text:list-item>
                <text:p text:style-name="P6"><text:span text:style-name="T2">Ce qui …, c’est : </text:span><text:span text:style-name="T3">Ce qui compte, c’est d’agir.</text:span></text:p>
              </text:list-item>
              <text:list-item>
                <text:p text:style-name="P6"><text:span text:style-name="T2">Quant à … : </text:span><text:span text:style-name="T3">Quant au budget, il attendra.</text:span></text:p>
              </text:list-item>
              <text:list-item>
                <text:p text:style-name="P6"><text:span text:style-name="T2">Utile pour dire ce que l’orateur met en avan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C — discours (fictif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C — discours (fictif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On nous répète que… On nous répète que… » (anaphore)</text:span></text:p>
              </text:list-item>
              <text:list-item>
                <text:p text:style-name="P6"><text:span text:style-name="T2">« Faut-il vraiment les croire ? » (question rhétorique)</text:span></text:p>
              </text:list-item>
              <text:list-item>
                <text:p text:style-name="P6"><text:span text:style-name="T2">« Nous voulons… Nous voulons… Nous voulons… »</text:span></text:p>
              </text:list-item>
              <text:list-item>
                <text:p text:style-name="P6"><text:span text:style-name="T2">« Ce n’est pas un caprice : c’est un besoin. » (antithèse)</text:span></text:p>
              </text:list-item>
              <text:list-item>
                <text:p text:style-name="P6"><text:span text:style-name="T2">« Ouvrons la porte. » (chut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hétorique = art de convaincre, depuis l’Antiquité</text:span></text:p>
              </text:list-item>
              <text:list-item>
                <text:p text:style-name="P6"><text:span text:style-name="T2">Trois moyens (tradition d’Aristote) : ethos, pathos, logos</text:span></text:p>
              </text:list-item>
              <text:list-item>
                <text:p text:style-name="P6"><text:span text:style-name="T2">Cadrage (framing) : l’angle oriente déjà l’interprétation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 C</text:span></text:p>
              </text:list-item>
              <text:list-item>
                <text:p text:style-name="P6"><text:span text:style-name="T2">Ex. 2 : identifier les procédés (a–e)</text:span></text:p>
              </text:list-item>
              <text:list-item>
                <text:p text:style-name="P6"><text:span text:style-name="T2">Ex. 3 : cadrage — reformuler un fait en positif / négatif</text:span></text:p>
              </text:list-item>
              <text:list-item>
                <text:p text:style-name="P6"><text:span text:style-name="T2">Ex. 4 : de l’effet au procédé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ologue ~5 min : 1. contexte · 2. thèse · 3. quatre procédés + effet 4. cadrage · 5. prise de position Critères : contenu, structure, langue, recul,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</text:span><text:span text:style-name="T3">ce que</text:span><text:span text:style-name="T2"> / </text:span><text:span text:style-name="T3">comment</text:span></text:p>
              </text:list-item>
              <text:list-item>
                <text:p text:style-name="P6"><text:span text:style-name="T2">Je nomme 6 procédés + effets</text:span></text:p>
              </text:list-item>
              <text:list-item>
                <text:p text:style-name="P6"><text:span text:style-name="T2">J’explique le cadrage</text:span></text:p>
              </text:list-item>
              <text:list-item>
                <text:p text:style-name="P6"><text:span text:style-name="T2">J’emploie la mise en relief</text:span></text:p>
              </text:list-item>
              <text:list-item>
                <text:p text:style-name="P6"><text:span text:style-name="T2">Je présente ~5 min sans tout l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2 P.</text:span></text:p>
              </text:list-item>
              <text:list-item>
                <text:p text:style-name="P6"><text:span text:style-name="T2">Tâche 2 — Repérage des procédés : 8 P.</text:span></text:p>
              </text:list-item>
              <text:list-item>
                <text:p text:style-name="P6"><text:span text:style-name="T2">Tâche 3 — Exposé oral (monologue) :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Rhétorique » — Wikipédia, CC BY-SA</text:span></text:p>
              </text:list-item>
              <text:list-item>
                <text:p text:style-name="P6"><text:span text:style-name="T2">« Cadrage (sciences sociales) » — Wikipédia, CC BY-SA</text:span></text:p>
              </text:list-item>
              <text:list-item>
                <text:p text:style-name="P6"><text:span text:style-name="T2">« Anaphore (rhétorique) » — Wikipédia, CC BY-SA</text:span></text:p>
              </text:list-item>
              <text:list-item>
                <text:p text:style-name="P6"><text:span text:style-name="T2">Textes originaux, fictifs, à but pédagogi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52</meta:creation-date>
    <dc:date>2026-07-21T16:29:52</dc:date>
    <meta:document-statistic meta:object-count="189"/>
    <meta:generator>LibreOffice/24.2.7.2$Linux_X86_64 LibreOffice_project/420$Build-2</meta:generator>
  </office:meta>
</office:document-meta>
</file>