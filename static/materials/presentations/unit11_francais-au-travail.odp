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Français au travai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Français au travai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11 · Parcours G+M · Classe 9 · Niveau M</text:span></text:p>
            <text:p text:style-name="P3"><text:span text:style-name="T2">Un peu de jargon et le bon registre au burea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10 à 12 expressions du registre professionnel</text:span></text:p>
              </text:list-item>
              <text:list-item>
                <text:p text:style-name="P6"><text:span text:style-name="T2">Médier un message allemand → français</text:span></text:p>
              </text:list-item>
              <text:list-item>
                <text:p text:style-name="P6"><text:span text:style-name="T2">Interagir dans un dialogue de réunion</text:span></text:p>
              </text:list-item>
              <text:list-item>
                <text:p text:style-name="P6"><text:span text:style-name="T2">Rédiger un mail poli (objet, salutation, formule finale)</text:span></text:p>
              </text:list-item>
              <text:list-item>
                <text:p text:style-name="P6"><text:span text:style-name="T2">Choisir le bon registre (vous / conditionnel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commence un stage à Strasbourg.</text:span></text:p>
            <text:p text:style-name="P3"><text:span text:style-name="T2">Caroline : Bienvenue ! On commence par un petit </text:span><text:span text:style-name="T3">brief</text:span><text:span text:style-name="T2"> à 9 h ? Léa : Un « brief » ? Caroline : Une courte réunion. Le délai est serré : il faut livrer avant midi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vez-vous déjà fait un stage ou un petit job ?</text:span></text:p>
              </text:list-item>
              <text:list-item>
                <text:p text:style-name="P6"><text:span text:style-name="T2">École vs. travail : quelles différences de langue ?</text:span></text:p>
              </text:list-item>
              <text:list-item>
                <text:p text:style-name="P6"><text:span text:style-name="T2">Notez 3 anglicismes de bureau que vous connaissez</text:span></text:p>
              </text:list-item>
              <text:list-item>
                <text:p text:style-name="P6"><text:span text:style-name="T2">Quand dit-on </text:span><text:span text:style-name="T3">vous</text:span><text:span text:style-name="T2"> et non </text:span><text:span text:style-name="T3">tu</text:span><text:span text:style-name="T2">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5" draw:style-name="gr2" draw:layer="layout" svg:width="22.859cm" svg:height="5.844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4">Registre pro</text:span></text:p>
              </table:table-cell>
              <table:table-cell>
                <text:p text:style-name="P7"><text:span text:style-name="T4">Français soigné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un brief</text:span></text:p>
              </table:table-cell>
              <table:table-cell>
                <text:p text:style-name="P7"><text:span text:style-name="T5">une réunion d’information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une deadline</text:span></text:p>
              </table:table-cell>
              <table:table-cell>
                <text:p text:style-name="P7"><text:span text:style-name="T5">un délai, une date limit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le feedback</text:span></text:p>
              </table:table-cell>
              <table:table-cell>
                <text:p text:style-name="P7"><text:span text:style-name="T5">le retour, l’avis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faire un point</text:span></text:p>
              </table:table-cell>
              <table:table-cell>
                <text:p text:style-name="P7"><text:span text:style-name="T5">courte réunion de suivi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onboarder</text:span></text:p>
              </table:table-cell>
              <table:table-cell>
                <text:p text:style-name="P7"><text:span text:style-name="T5">accueillir un nouveau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solliciter</text:span></text:p>
              </table:table-cell>
              <table:table-cell>
                <text:p text:style-name="P7"><text:span text:style-name="T5">demander poli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 registre poli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 registre poli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Vouvoiement : avec un supérieur, un client, un inconnu</text:span></text:p>
              </text:list-item>
              <text:list-item>
                <text:p text:style-name="P6"><text:span text:style-name="T2">Conditionnel de politesse 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Vous pouvez ? → </text:span><text:span text:style-name="T7">Pourriez-vous ?</text:span></text:p>
                  </text:list-item>
                  <text:list-item>
                    <text:p text:style-name="P8"><text:span text:style-name="T6">Je veux → </text:span><text:span text:style-name="T7">Je voudrais</text:span></text:p>
                  </text:list-item>
                </text:list>
              </text:list-item>
              <text:list-item>
                <text:p text:style-name="P6"><text:span text:style-name="T2">Mail : </text:span><text:span text:style-name="T3">Bonjour Madame,</text:span><text:span text:style-name="T2"> … </text:span><text:span text:style-name="T3">Cordialement,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édier, pas tra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édier, pas tra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ource (DE) : </text:span><text:span text:style-name="T3">Morgen 9 Uhr Brief, Raum 3. USB-Stick mitbringen. Debrief um 11 Uhr. Deadline: Freitagabend.</text:span></text:p>
            <text:p text:style-name="P3"><text:span text:style-name="T2">Médiation (FR) : </text:span><text:span text:style-name="T3">Demain 9 h, réunion en salle 3. Apporte la clé USB. Bilan à 11 h. Date limite : vendredi soi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oi Toubon (1994) : le français obligatoire dans les documents essentiels de l’entreprise</text:span></text:p>
              </text:list-item>
              <text:list-item>
                <text:p text:style-name="P6"><text:span text:style-name="T2">Commission d’enrichissement de la langue française : propose des équivalents (courriel, mot-dièse)</text:span></text:p>
              </text:list-item>
              <text:list-item>
                <text:p text:style-name="P6"><text:span text:style-name="T2">Base publique : FranceTerm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7">
              <text:list-item>
                <text:p text:style-name="P6"><text:span text:style-name="T2">Compréhension du message [G/M]</text:span></text:p>
              </text:list-item>
              <text:list-item>
                <text:p text:style-name="P6"><text:span text:style-name="T2">Relier jargon ↔ français soigné [G/M]</text:span></text:p>
              </text:list-item>
              <text:list-item>
                <text:p text:style-name="P6"><text:span text:style-name="T2">Récrire au conditionnel de politesse [M]</text:span></text:p>
              </text:list-item>
              <text:list-item>
                <text:p text:style-name="P6"><text:span text:style-name="T2">Médiation guidée DE → FR [M/E]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ialogue en binôme (~10 répliques) - Accueil → tâches → délai → question → bilan - 5 expressions du tableau + 1 conditionnel de politesse</text:span></text:p>
            <text:p text:style-name="P3"><text:span text:style-name="T2">Critères : contenu · lexique pro · registre · interact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mprends le vocabulaire pro</text:span></text:p>
              </text:list-item>
              <text:list-item>
                <text:p text:style-name="P6"><text:span text:style-name="T2">Je médie un message DE → FR</text:span></text:p>
              </text:list-item>
              <text:list-item>
                <text:p text:style-name="P6"><text:span text:style-name="T2">Je choisis </text:span><text:span text:style-name="T3">tu</text:span><text:span text:style-name="T2"> / </text:span><text:span text:style-name="T3">vous</text:span></text:p>
              </text:list-item>
              <text:list-item>
                <text:p text:style-name="P6"><text:span text:style-name="T2">J’emploie le conditionnel de politesse</text:span></text:p>
              </text:list-item>
              <text:list-item>
                <text:p text:style-name="P6"><text:span text:style-name="T2">Je joue un dialogue sans bloqu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Médiation (15 P.)</text:span></text:p>
              </text:list-item>
              <text:list-item>
                <text:p text:style-name="P6"><text:span text:style-name="T2">Tâche 2 — Vocabulaire (8 P.)</text:span></text:p>
              </text:list-item>
              <text:list-item>
                <text:p text:style-name="P6"><text:span text:style-name="T2">Tâche 3 — Mail-réponse poli (7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oi Toubon — Wikipédia, CC BY-SA 4.0</text:span></text:p>
              </text:list-item>
              <text:list-item>
                <text:p text:style-name="P6"><text:span text:style-name="T2">Commission d’enrichissement de la langue française — Wikipédia, CC BY-SA 4.0</text:span></text:p>
              </text:list-item>
              <text:list-item>
                <text:p text:style-name="P6"><text:span text:style-name="T2">FranceTerme — DGLFLF (données publiques)</text:span></text:p>
              </text:list-item>
              <text:list-item>
                <text:p text:style-name="P6"><text:span text:style-name="T2">Dire, ne pas dire — Académie français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4:45</meta:creation-date>
    <dc:date>2026-07-21T15:34:45</dc:date>
    <meta:document-statistic meta:object-count="185"/>
    <meta:generator>LibreOffice/24.2.7.2$Linux_X86_64 LibreOffice_project/420$Build-2</meta:generator>
  </office:meta>
</office:document-meta>
</file>