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1 — Médiation de ba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1 — Médiation de ba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7 · Niveau M Transmettre l’essentiel d’un message allemand en frança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èle de la sé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odèle de la sé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ctiver → Apporter → S’entraîner → Produire → Réfléchir Durée : 45 minut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l’essentiel d’un court texte allemand</text:span></text:p>
              </text:list-item>
              <text:list-item>
                <text:p text:style-name="P6"><text:span text:style-name="T2">Transmettre les informations principales en français</text:span></text:p>
              </text:list-item>
              <text:list-item>
                <text:p text:style-name="P6"><text:span text:style-name="T2">Distinguer </text:span><text:span text:style-name="T3">traduire</text:span><text:span text:style-name="T2"> et </text:span><text:span text:style-name="T3">médier</text:span></text:p>
              </text:list-item>
              <text:list-item>
                <text:p text:style-name="P6"><text:span text:style-name="T2">Adapter le message au destinataire</text:span></text:p>
              </text:list-item>
              <text:list-item>
                <text:p text:style-name="P6"><text:span text:style-name="T2">Rédiger un court texte à partir d’infos médié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ès rentre de Karlsruhe avec un dépliant en allemand. Léa (québécoise) : « Dis-moi juste l’essentiel : c’est quoi, ça ouvre quand, ça coûte combien ? » → Léa veut un </text:span><text:span text:style-name="T3">résumé</text:span><text:span text:style-name="T2">, pas une traduction mot à mo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s-tu déjà « traduit » pour ta famille ?</text:span></text:p>
              </text:list-item>
              <text:list-item>
                <text:p text:style-name="P6"><text:span text:style-name="T2">Traduire ≠ résumer : quelle différence ?</text:span></text:p>
              </text:list-item>
              <text:list-item>
                <text:p text:style-name="P6"><text:span text:style-name="T4">Médiation linguistique</text:span><text:span text:style-name="T2"> = </text:span><text:span text:style-name="T4">Sprachmittlung</text:span></text:p>
              </text:list-item>
              <text:list-item>
                <text:p text:style-name="P6"><text:span text:style-name="T2">Où fait-on de la médiation au quotidien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3 règles d’o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3 règles d’o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On ne traduit </text:span><text:span text:style-name="T3">pas mot à mot</text:span><text:span text:style-name="T2"> → on transmet le </text:span><text:span text:style-name="T3">sens</text:span></text:p>
              </text:list-item>
              <text:list-item>
                <text:p text:style-name="P6"><text:span text:style-name="T2">On garde </text:span><text:span text:style-name="T3">l’essentiel</text:span><text:span text:style-name="T2"> : qui ? quoi ? où ? quand ? combien ?</text:span></text:p>
              </text:list-item>
              <text:list-item>
                <text:p text:style-name="P6"><text:span text:style-name="T2">On </text:span><text:span text:style-name="T3">adapte la langue</text:span><text:span text:style-name="T2"> au destinataire (</text:span><text:span text:style-name="T4">tu</text:span><text:span text:style-name="T2"> / </text:span><text:span text:style-name="T4">vous</text:span><text:span text:style-name="T2">) Astuce : garde toujours les </text:span><text:span text:style-name="T3">chiffres</text:span><text:span text:style-name="T2">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5.009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5">Français</text:span></text:p>
              </table:table-cell>
              <table:table-cell>
                <text:p text:style-name="P7"><text:span text:style-name="T5">Alleman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le sens</text:span></text:p>
              </table:table-cell>
              <table:table-cell>
                <text:p text:style-name="P7"><text:span text:style-name="T6">der Sinn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l’essentiel</text:span></text:p>
              </table:table-cell>
              <table:table-cell>
                <text:p text:style-name="P7"><text:span text:style-name="T6">das Wesentlich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l’entrée</text:span></text:p>
              </table:table-cell>
              <table:table-cell>
                <text:p text:style-name="P7"><text:span text:style-name="T6">der Eintritt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gratuit / payant</text:span></text:p>
              </table:table-cell>
              <table:table-cell>
                <text:p text:style-name="P7"><text:span text:style-name="T6">kostenlos / kostenpflichtig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selon</text:span></text:p>
              </table:table-cell>
              <table:table-cell>
                <text:p text:style-name="P7"><text:span text:style-name="T6">laut / nac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 sour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 sour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Karlsruher Schloss</text:span><text:span text:style-name="T2"> </text:span><text:span text:style-name="T4">Das Karlsruher Schloss ist heute ein Museum. Geöffnet von Dienstag bis Sonntag, 10–18 Uhr. Montags geschlossen. Eintritt 8 €, Schüler 4 €. Der Schlosspark ist kostenlo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Médiation modè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Médiation modè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château de Karlsruhe est aujourd’hui un musée. Ouvert du mardi au dimanche, 10 h–18 h ; fermé le lundi. Entrée : 8 € (4 € pour les élèves). Le parc est gratuit. → Plus </text:span><text:span text:style-name="T3">court</text:span><text:span text:style-name="T2"> que l’original, mais l’essentiel y es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« ville en éventail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« ville en éventail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hâteau baroque commencé en </text:span><text:span text:style-name="T3">1715</text:span><text:span text:style-name="T2"> pour le margrave Karl Wilhelm. 32 avenues rayonnent depuis la tour → </text:span><text:span text:style-name="T4">Fächerstadt</text:span><text:span text:style-name="T2">. Reconstruit après 1945, aujourd’hui un musée. </text:span><text:span text:style-name="T4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Vrai / Faux</text:span></text:p>
              </text:list-item>
              <text:list-item>
                <text:p text:style-name="P6"><text:span text:style-name="T2">Ex. 2 : Traduire ou médier ?</text:span></text:p>
              </text:list-item>
              <text:list-item>
                <text:p text:style-name="P6"><text:span text:style-name="T2">Ex. 3 : Médiez en 3 phrases (bibliothèque)</text:span></text:p>
              </text:list-item>
              <text:list-item>
                <text:p text:style-name="P6"><text:span text:style-name="T2">Ex. 4 : Le bon registre (formel / familier) 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exte de la piscine (allemand) → 4 phrases en français pour Léa (</text:span><text:span text:style-name="T4">tu</text:span><text:span text:style-name="T2">) Critères : contenu · médiation · registre · lang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omprends l’essentiel d’un texte allemand</text:span></text:p>
              </text:list-item>
              <text:list-item>
                <text:p text:style-name="P6"><text:span text:style-name="T2">☐ </text:span><text:span text:style-name="T2">Je transmets le sens (pas mot à mot)</text:span></text:p>
              </text:list-item>
              <text:list-item>
                <text:p text:style-name="P6"><text:span text:style-name="T2">☐ </text:span><text:span text:style-name="T2">Je garde les chiffres importants</text:span></text:p>
              </text:list-item>
              <text:list-item>
                <text:p text:style-name="P6"><text:span text:style-name="T2">☐ </text:span><text:span text:style-name="T2">J’adapte au destinata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âche 1 — Médiation (15 pts) Tâche 2 — Compréhension V/F (8 pts) Tâche 3 — Courriel (~50 mots) (7 pts) </text:span><text:span text:style-name="T3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— </text:span><text:span text:style-name="T4">Schloss Karlsruhe</text:span><text:span text:style-name="T2"> / </text:span><text:span text:style-name="T4">Karlsruhe Palace</text:span><text:span text:style-name="T2">, CC BY-SA</text:span></text:p>
              </text:list-item>
              <text:list-item>
                <text:p text:style-name="P6"><text:span text:style-name="T2">Conseil de l’Europe — Médiation (CECR)</text:span></text:p>
              </text:list-item>
              <text:list-item>
                <text:p text:style-name="P6"><text:span text:style-name="T2">Bildungsplan Baden-Württemberg — Französisch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8:29</meta:creation-date>
    <dc:date>2026-07-21T15:08:29</dc:date>
    <meta:document-statistic meta:object-count="193"/>
    <meta:generator>LibreOffice/24.2.7.2$Linux_X86_64 LibreOffice_project/420$Build-2</meta:generator>
  </office:meta>
</office:document-meta>
</file>