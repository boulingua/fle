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Première médiation DE → F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Première médiation DE → F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pliquer ce qu’est une médiation</text:span></text:p>
              </text:list-item>
              <text:list-item>
                <text:p text:style-name="P6"><text:span text:style-name="T2">Repérer l’essentiel d’un texte allemand</text:span></text:p>
              </text:list-item>
              <text:list-item>
                <text:p text:style-name="P6"><text:span text:style-name="T2">Transmettre le sens en cinq phrases françaises</text:span></text:p>
              </text:list-item>
              <text:list-item>
                <text:p text:style-name="P6"><text:span text:style-name="T2">Adapter le message au destinataire</text:span></text:p>
              </text:list-item>
              <text:list-item>
                <text:p text:style-name="P6"><text:span text:style-name="T2">Utiliser des tournures d’intro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revient de Karlsruhe avec un dépliant en allemand.</text:span></text:p>
            <text:p text:style-name="P3"><text:span text:style-name="T2">Anouk : « C’est en allemand… je n’y comprends rien ! » Inès : « Attends, je te dis l’essentiel. Pas mot à mot. »</text:span></text:p>
            <text:p text:style-name="P3"><text:span text:style-name="T2">→ </text:span><text:span text:style-name="T2">Que fait Inès : traduire ou médie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s-tu déjà expliqué un message d’une autre langue ?</text:span></text:p>
              </text:list-item>
              <text:list-item>
                <text:p text:style-name="P6"><text:span text:style-name="T2">Racontes-tu un film phrase par phrase, ou l’essentiel ?</text:span></text:p>
              </text:list-item>
              <text:list-item>
                <text:p text:style-name="P6"><text:span text:style-name="T3">Sprachmittlung</text:span><text:span text:style-name="T2"> : fait-on passer les mots ou le sen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Allemand</text:span></text:p>
              </table:table-cell>
              <table:table-cell>
                <text:p text:style-name="P7"><text:span text:style-name="T4">Françai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die Öffnungszeiten</text:span></text:p>
              </table:table-cell>
              <table:table-cell>
                <text:p text:style-name="P7"><text:span text:style-name="T5">les horaire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der Eintritt</text:span></text:p>
              </table:table-cell>
              <table:table-cell>
                <text:p text:style-name="P7"><text:span text:style-name="T5">le tarif d’entré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kostenlos</text:span></text:p>
              </table:table-cell>
              <table:table-cell>
                <text:p text:style-name="P7"><text:span text:style-name="T5">gratuit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die Ausstellung</text:span></text:p>
              </table:table-cell>
              <table:table-cell>
                <text:p text:style-name="P7"><text:span text:style-name="T5">l’exposi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das Wesentliche</text:span></text:p>
              </table:table-cell>
              <table:table-cell>
                <text:p text:style-name="P7"><text:span text:style-name="T5">l’essenti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s tournu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s tournur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Verbe + que :</text:span><text:span text:style-name="T2"> le texte dit que… / on apprend que…</text:span></text:p>
              </text:list-item>
              <text:list-item>
                <text:p text:style-name="P6"><text:span text:style-name="T6">Préposition :</text:span><text:span text:style-name="T2"> selon…, d’après le document…</text:span></text:p>
              </text:list-item>
              <text:list-item>
                <text:p text:style-name="P6"><text:span text:style-name="T6">Reformuler :</text:span><text:span text:style-name="T2"> en résumé…, l’important, c’est que…</text:span></text:p>
              </text:list-item>
            </text:list>
            <text:p text:style-name="P3"><text:span text:style-name="T2">Après </text:span><text:span text:style-name="T3">dire que</text:span><text:span text:style-name="T2"> → indicatif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 règles d’o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ois règles d’o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2">Pas de mot à mot → le </text:span><text:span text:style-name="T6">sens</text:span></text:p>
              </text:list-item>
              <text:list-item>
                <text:p text:style-name="P6"><text:span text:style-name="T2">Garder l’essentiel : qui, quoi, où, quand, combien</text:span></text:p>
              </text:list-item>
              <text:list-item>
                <text:p text:style-name="P6"><text:span text:style-name="T2">Adapter la langue : </text:span><text:span text:style-name="T3">tu</text:span><text:span text:style-name="T2"> / </text:span><text:span text:style-name="T3">vo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source → médiation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source → médiation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ource (DE) : ZKM, ouvert mer.–dim. 10–18 h, 8 € / 4 €, gratuit &lt; 12 ans.</text:span></text:p>
            <text:p text:style-name="P3"><text:span text:style-name="T2">Médiation (FR) : « Le ZKM est un musée d’art numérique à Karlsruhe. Ouvert du mercredi au dimanche, 10 h–18 h. Entrée 8 € (4 € pour les élèves), gratuit pour les moins de 12 an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ZKM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ZKM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ntre d’art des médias et d’art numérique à Karlsruhe</text:span></text:p>
              </text:list-item>
              <text:list-item>
                <text:p text:style-name="P6"><text:span text:style-name="T2">Installé dans une ancienne usine réhabilitée</text:span></text:p>
              </text:list-item>
              <text:list-item>
                <text:p text:style-name="P6"><text:span text:style-name="T2">Musée + ateliers + laboratoires de recherche</text:span></text:p>
              </text:list-item>
              <text:list-item>
                <text:p text:style-name="P6"><text:span text:style-name="T2">Pionnier de l’art numérique en Europ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Vrai / Faux sur le texte source</text:span></text:p>
              </text:list-item>
              <text:list-item>
                <text:p text:style-name="P6"><text:span text:style-name="T2">Ex. 2 : Choisir la bonne tournure</text:span></text:p>
              </text:list-item>
              <text:list-item>
                <text:p text:style-name="P6"><text:span text:style-name="T2">Ex. 3 : Traduire ou médier ?</text:span></text:p>
              </text:list-item>
              <text:list-item>
                <text:p text:style-name="P6"><text:span text:style-name="T2">Ex. 4 : Médier en trois phrase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édiez ce dépliant pour un·e ami·e (registre </text:span><text:span text:style-name="T3">tu</text:span><text:span text:style-name="T2">, ~70 mots) :</text:span></text:p>
            <text:p text:style-name="P3"><text:span text:style-name="T2">Piscine de Karlsruhe : ouverte tous les jours 7 h–22 h ; 5 € / 2,50 € ; baignade dehors en été.</text:span></text:p>
            <text:p text:style-name="P3"><text:span text:style-name="T2">Critères : sens · pas de mot à mot · chiffres exacts · registre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tingue médier et traduire</text:span></text:p>
              </text:list-item>
              <text:list-item>
                <text:p text:style-name="P6"><text:span text:style-name="T2">☐ </text:span><text:span text:style-name="T2">Je repère qui/quoi/où/quand/combien</text:span></text:p>
              </text:list-item>
              <text:list-item>
                <text:p text:style-name="P6"><text:span text:style-name="T2">☐ </text:span><text:span text:style-name="T2">Je médie en cinq phrases</text:span></text:p>
              </text:list-item>
              <text:list-item>
                <text:p text:style-name="P6"><text:span text:style-name="T2">☐ </text:span><text:span text:style-name="T2">J’utilise les tournures d’introduction</text:span></text:p>
              </text:list-item>
              <text:list-item>
                <text:p text:style-name="P6"><text:span text:style-name="T2">☐ </text:span><text:span text:style-name="T2">J’adapte au destinat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médiation (~70 mots) — 15 P.</text:span></text:p>
              </text:list-item>
              <text:list-item>
                <text:p text:style-name="P6"><text:span text:style-name="T2">Tâche 2 : vrai/faux corrigé — 8 P.</text:span></text:p>
              </text:list-item>
              <text:list-item>
                <text:p text:style-name="P6"><text:span text:style-name="T2">Tâche 3 : message à un·e ami·e (~50 mots) — 7 P.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ZKM Karlsruhe — Wikipédia, CC BY-SA 4.0</text:span></text:p>
              </text:list-item>
              <text:list-item>
                <text:p text:style-name="P6"><text:span text:style-name="T2">CECRL (médiation) — Wikipédia, CC BY-SA 4.0</text:span></text:p>
              </text:list-item>
              <text:list-item>
                <text:p text:style-name="P6"><text:span text:style-name="T2">Bildungsplan BW — Französisch (Sprachmittlung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50</meta:creation-date>
    <dc:date>2026-07-21T16:09:50</dc:date>
    <meta:document-statistic meta:object-count="189"/>
    <meta:generator>LibreOffice/24.2.7.2$Linux_X86_64 LibreOffice_project/420$Build-2</meta:generator>
  </office:meta>
</office:document-meta>
</file>