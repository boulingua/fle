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1 — Préparer l’épreuve finale écri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1 — Préparer l’épreuve finale écri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2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Identifier les trois parties de l’épreuve écrite et gérer son temps</text:span></text:p>
              </text:list-item>
              <text:list-item>
                <text:p text:style-name="P6"><text:span text:style-name="T2">Décoder une consigne : résumer / analyser / commenter / rédiger</text:span></text:p>
              </text:list-item>
              <text:list-item>
                <text:p text:style-name="P6"><text:span text:style-name="T2">Rédiger un texte structuré (intro · développement · conclusion)</text:span></text:p>
              </text:list-item>
              <text:list-item>
                <text:p text:style-name="P6"><text:span text:style-name="T2">Se relire avec une grille : contenu, structure, langu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ina : « J’ai lu le texte trois fois et je n’ai rien écrit. » Karim : « Je surligne d’abord les mots-clés de la consigne. » Karim : « Un plan en deux minutes, puis j’écris. La montre est mon amie. »</text:span></text:p>
            <text:p text:style-name="P3"><text:span text:style-name="T2">Que fait Karim de plus que Lina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bien de temps dure votre épreuve ? Comment la répartir ?</text:span></text:p>
              </text:list-item>
              <text:list-item>
                <text:p text:style-name="P6"><text:span text:style-name="T2">Trois types de textes possibles à l’examen ?</text:span></text:p>
              </text:list-item>
              <text:list-item>
                <text:p text:style-name="P6"><text:span text:style-name="T2">Que veulent dire : résumer, analyser, commenter, rédiger ?</text:span></text:p>
              </text:list-item>
              <text:list-item>
                <text:p text:style-name="P6"><text:span text:style-name="T2">Quand vous relisez, sur quoi portez-vous attention d’abord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consigne · die Aufgabenstellung</text:span></text:p>
              </text:list-item>
              <text:list-item>
                <text:p text:style-name="P6"><text:span text:style-name="T2">l’analyse · le commentaire · la médiation</text:span></text:p>
              </text:list-item>
              <text:list-item>
                <text:p text:style-name="P6"><text:span text:style-name="T2">le brouillon · surligner · se relire</text:span></text:p>
              </text:list-item>
              <text:list-item>
                <text:p text:style-name="P6"><text:span text:style-name="T2">l’enchaînement · la mise en pag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Connecte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Connecte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jouter : de plus, par ailleurs, en outre</text:span></text:p>
              </text:list-item>
              <text:list-item>
                <text:p text:style-name="P6"><text:span text:style-name="T2">Opposer : cependant, en revanche, néanmoins</text:span></text:p>
              </text:list-item>
              <text:list-item>
                <text:p text:style-name="P6"><text:span text:style-name="T2">Illustrer : en effet, par exemple, ainsi</text:span></text:p>
              </text:list-item>
              <text:list-item>
                <text:p text:style-name="P6"><text:span text:style-name="T2">Conclure : en somme, pour conclure, en définitive</text:span></text:p>
              </text:list-item>
            </text:list>
            <text:p text:style-name="P3"><text:span text:style-name="T2">Un connecteur en tête de paragraphe = un signal pour le correcteu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rois réflex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rois réflex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Lire la plume à la main (souligner dates, noms, thèse, consigne)</text:span></text:p>
              </text:list-item>
              <text:list-item>
                <text:p text:style-name="P6"><text:span text:style-name="T2">Planifier avant de rédiger (2 min de plan)</text:span></text:p>
              </text:list-item>
              <text:list-item>
                <text:p text:style-name="P6"><text:span text:style-name="T2">Garder 10 minutes pour se relire (accords → temps → ponctuation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CECRL (Conseil de l’Europe) décrit réception, production, interaction. Son volume complémentaire de 2018 met en avant la </text:span><text:span text:style-name="T3">médiation</text:span><text:span text:style-name="T2"> : transmettre un contenu d’une langue à l’autre. C’est la compétence de la partie « transmission » de l’épreuv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relier les verbes de consigne à leur sens</text:span></text:p>
              </text:list-item>
              <text:list-item>
                <text:p text:style-name="P6"><text:span text:style-name="T2">Ex. 2 : repérage dans le texte de méthode</text:span></text:p>
              </text:list-item>
              <text:list-item>
                <text:p text:style-name="P6"><text:span text:style-name="T2">Ex. 3 : compléter avec le bon connecteur</text:span></text:p>
              </text:list-item>
              <text:list-item>
                <text:p text:style-name="P6"><text:span text:style-name="T2">Ex. 4 : mini-plan en trois paragraphes</text:span></text:p>
              </text:list-item>
            </text:list>
            <text:p text:style-name="P3"><text:span text:style-name="T2">Différenciation : G (Ex. 1-2) · M (Ex. 1-3) · E (les 4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exte argumentatif ~250 mots : « Faut-il enseigner la méthode de l’examen ou seulement la matière ? »</text:span></text:p>
            <text:p text:style-name="P3"><text:span text:style-name="T2">Critères : contenu /5 · structure /5 · langue /5 · lexique /3 · relecture /2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nomme les trois parties de l’épreuve</text:span></text:p>
              </text:list-item>
              <text:list-item>
                <text:p text:style-name="P6"><text:span text:style-name="T2">☐ </text:span><text:span text:style-name="T2">Je repère les mots-clés d’une consigne</text:span></text:p>
              </text:list-item>
              <text:list-item>
                <text:p text:style-name="P6"><text:span text:style-name="T2">☐ </text:span><text:span text:style-name="T2">Je fais un plan avant de rédiger</text:span></text:p>
              </text:list-item>
              <text:list-item>
                <text:p text:style-name="P6"><text:span text:style-name="T2">☐ </text:span><text:span text:style-name="T2">J’utilise des connecteurs</text:span></text:p>
              </text:list-item>
              <text:list-item>
                <text:p text:style-name="P6"><text:span text:style-name="T2">☐ </text:span><text:span text:style-name="T2">Je garde du temps pour me reli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rtie A — Compréhension écrite (10 P.) : questions sur le texte de méthode</text:span></text:p>
              </text:list-item>
              <text:list-item>
                <text:p text:style-name="P6"><text:span text:style-name="T2">Partie B — Expression écrite (10 P.) : ~180 mots, un conseil argumenté</text:span></text:p>
              </text:list-item>
              <text:list-item>
                <text:p text:style-name="P6"><text:span text:style-name="T2">Total : 20 po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CRL — Wikipédia, CC BY-SA 4.0</text:span></text:p>
              </text:list-item>
              <text:list-item>
                <text:p text:style-name="P6"><text:span text:style-name="T2">Médiation — Conseil de l’Europe, volume complémentaire (2018)</text:span></text:p>
              </text:list-item>
              <text:list-item>
                <text:p text:style-name="P6"><text:span text:style-name="T2">Textes et exercices : originaux de l’auteur·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29</meta:creation-date>
    <dc:date>2026-07-21T16:30:29</dc:date>
    <meta:document-statistic meta:object-count="185"/>
    <meta:generator>LibreOffice/24.2.7.2$Linux_X86_64 LibreOffice_project/420$Build-2</meta:generator>
  </office:meta>
</office:document-meta>
</file>