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1 — Préparer un disco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1 — Préparer un disco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0 · Niveau E</text:span></text:p>
            <text:p text:style-name="P3"><text:span text:style-name="T2">Structure, rhétorique, prise de paro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tructurer un discours court (3 min) en 4 parties</text:span></text:p>
              </text:list-item>
              <text:list-item>
                <text:p text:style-name="P6"><text:span text:style-name="T2">Repérer et employer 5 figures de style</text:span></text:p>
              </text:list-item>
              <text:list-item>
                <text:p text:style-name="P6"><text:span text:style-name="T2">Rédiger un discours-cause (~250 mots)</text:span></text:p>
              </text:list-item>
              <text:list-item>
                <text:p text:style-name="P6"><text:span text:style-name="T2">Le prononcer : rythme, pauses, regard</text:span></text:p>
              </text:list-item>
              <text:list-item>
                <text:p text:style-name="P6"><text:span text:style-name="T2">Relire et améliorer avec une gril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érémonie de fin de collège.</text:span></text:p>
            <text:p text:style-name="P3"><text:span text:style-name="T2">Mme Lefèvre : « Anouk, prononcerais-tu le discours d’adieu ? »</text:span></text:p>
            <text:p text:style-name="P3"><text:span text:style-name="T2">Anouk : « Moi ? Devant tout le monde ? »</text:span></text:p>
            <text:p text:style-name="P3"><text:span text:style-name="T2">Le conseil : </text:span><text:span text:style-name="T3">« Demande-toi d’abord ce que tu veux faire ressentir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vez-vous déjà parlé en public ?</text:span></text:p>
              </text:list-item>
              <text:list-item>
                <text:p text:style-name="P6"><text:span text:style-name="T2">Quelle figure de style connaissez-vous ?</text:span></text:p>
              </text:list-item>
              <text:list-item>
                <text:p text:style-name="P6"><text:span text:style-name="T2">Plus dur : écrire ou dire un discours ?</text:span></text:p>
              </text:list-item>
              <text:list-item>
                <text:p text:style-name="P6"><text:span text:style-name="T2">Un discours célèbre qui vous a marqué·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plan en 4 parti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plan en 4 parti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Accroche</text:span><text:span text:style-name="T2"> — citation, anecdote, question</text:span></text:p>
              </text:list-item>
              <text:list-item>
                <text:p text:style-name="P6"><text:span text:style-name="T4">Corps</text:span><text:span text:style-name="T2"> — 2 ou 3 idées + exemples</text:span></text:p>
              </text:list-item>
              <text:list-item>
                <text:p text:style-name="P6"><text:span text:style-name="T4">Moment fort</text:span><text:span text:style-name="T2"> — image, souvenir, émotion</text:span></text:p>
              </text:list-item>
              <text:list-item>
                <text:p text:style-name="P6"><text:span text:style-name="T4">Chute</text:span><text:span text:style-name="T2"> — vœu, appel, mot marqua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5 figures de sty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5 figures de sty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Anaphore</text:span><text:span text:style-name="T2"> — </text:span><text:span text:style-name="T3">Je crois… Je crois… Je crois…</text:span></text:p>
              </text:list-item>
              <text:list-item>
                <text:p text:style-name="P6"><text:span text:style-name="T4">Triade</text:span><text:span text:style-name="T2"> — </text:span><text:span text:style-name="T3">liberté, égalité, fraternité</text:span></text:p>
              </text:list-item>
              <text:list-item>
                <text:p text:style-name="P6"><text:span text:style-name="T4">Métaphore</text:span><text:span text:style-name="T2"> — </text:span><text:span text:style-name="T3">l’école est un voyage</text:span></text:p>
              </text:list-item>
              <text:list-item>
                <text:p text:style-name="P6"><text:span text:style-name="T4">Question rhétorique</text:span><text:span text:style-name="T2"> — </text:span><text:span text:style-name="T3">Qui n’a jamais douté ?</text:span></text:p>
              </text:list-item>
              <text:list-item>
                <text:p text:style-name="P6"><text:span text:style-name="T4">Gradation</text:span><text:span text:style-name="T2"> — </text:span><text:span text:style-name="T3">un pas, un élan, un envo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outils de l’orateu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outils de l’orateu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postrophe d’ouverture : </text:span><text:span text:style-name="T3">Chères et chers camarades…</text:span></text:p>
              </text:list-item>
              <text:list-item>
                <text:p text:style-name="P6"><text:span text:style-name="T2">Présent (rapprocher) + futur (projeter)</text:span></text:p>
              </text:list-item>
              <text:list-item>
                <text:p text:style-name="P6"><text:span text:style-name="T2">Connecteurs : </text:span><text:span text:style-name="T3">d’abord… ensuite… enfin…</text:span></text:p>
              </text:list-item>
              <text:list-item>
                <text:p text:style-name="P6"><text:span text:style-name="T2">Rythme ternaire (trois éléments)</text:span></text:p>
              </text:list-item>
              <text:list-item>
                <text:p text:style-name="P6"><text:span text:style-name="T2">À l’oral : pauses, regard, chute ralenti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rhétoriq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rhétoriq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rt antique de bien parler pour convaincre</text:span></text:p>
              </text:list-item>
              <text:list-item>
                <text:p text:style-name="P6"><text:span text:style-name="T2">Étapes : invention → disposition → élocution</text:span></text:p>
              </text:list-item>
              <text:list-item>
                <text:p text:style-name="P6"><text:span text:style-name="T2">Structure : ouverture, faits, arguments, péroraison</text:span></text:p>
              </text:list-item>
              <text:list-item>
                <text:p text:style-name="P6"><text:span text:style-name="T2">Toujours vivante : politique, tribunal, présentations</text:span></text:p>
              </text:list-item>
            </text:list>
            <text:p text:style-name="P3"><text:span text:style-name="T3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du discours d’Anouk</text:span></text:p>
              </text:list-item>
              <text:list-item>
                <text:p text:style-name="P6"><text:span text:style-name="T2">Repérer anaphore, métaphore, triade</text:span></text:p>
              </text:list-item>
              <text:list-item>
                <text:p text:style-name="P6"><text:span text:style-name="T2">Construire deux triades</text:span></text:p>
              </text:list-item>
              <text:list-item>
                <text:p text:style-name="P6"><text:span text:style-name="T2">De la phrase plate à la phrase d’orateur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iscours-cause (~250 mots / 3 min) :</text:span></text:p>
            <text:list text:style-name="L3">
              <text:list-item>
                <text:p text:style-name="P3"><text:span text:style-name="T2">Les 4 parties</text:span></text:p>
              </text:list-item>
              <text:list-item>
                <text:p text:style-name="P3"><text:span text:style-name="T2">3 figures de style</text:span></text:p>
              </text:list-item>
              <text:list-item>
                <text:p text:style-name="P3"><text:span text:style-name="T2">1 citation</text:span></text:p>
              </text:list-item>
              <text:list-item>
                <text:p text:style-name="P3"><text:span text:style-name="T2">1 chute mémorable</text:span></text:p>
              </text:list-item>
            </text:list>
            <text:p text:style-name="P3"><text:span text:style-name="T2">S’entraîner à voix haute au moins 2 foi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tructure en 4 parties</text:span></text:p>
              </text:list-item>
              <text:list-item>
                <text:p text:style-name="P6"><text:span text:style-name="T2">3 figures de style</text:span></text:p>
              </text:list-item>
              <text:list-item>
                <text:p text:style-name="P6"><text:span text:style-name="T2">Accroche + chute efficaces</text:span></text:p>
              </text:list-item>
              <text:list-item>
                <text:p text:style-name="P6"><text:span text:style-name="T2">Connecteurs</text:span></text:p>
              </text:list-item>
              <text:list-item>
                <text:p text:style-name="P6"><text:span text:style-name="T2">Tenir 3 min en regardant le publ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(10 pts)</text:span></text:p>
              </text:list-item>
              <text:list-item>
                <text:p text:style-name="P6"><text:span text:style-name="T2">Tâche 2 — Figures de style (8 pts)</text:span></text:p>
              </text:list-item>
              <text:list-item>
                <text:p text:style-name="P6"><text:span text:style-name="T2">Tâche 3 — Discours écrit ~250 mots (12 pts)</text:span></text:p>
              </text:list-item>
            </text:list>
            <text:p text:style-name="P3"><text:span text:style-name="T4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Rhétorique » — Wikipédia, CC BY-SA</text:span></text:p>
              </text:list-item>
              <text:list-item>
                <text:p text:style-name="P6"><text:span text:style-name="T2">« Anaphore » — Wikipédia, CC BY-SA</text:span></text:p>
              </text:list-item>
              <text:list-item>
                <text:p text:style-name="P6"><text:span text:style-name="T2">Gallica (BnF) — discours du domaine public</text:span></text:p>
              </text:list-item>
            </text:list>
            <text:p text:style-name="P3"><text:span text:style-name="T2">Plateforme indépendante, sans affiliatio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8:56</meta:creation-date>
    <dc:date>2026-07-21T16:28:56</dc:date>
    <meta:document-statistic meta:object-count="185"/>
    <meta:generator>LibreOffice/24.2.7.2$Linux_X86_64 LibreOffice_project/420$Build-2</meta:generator>
  </office:meta>
</office:document-meta>
</file>