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éparer un disco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éparer un disco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11 · Parcours G+M · Classe 10 · Niveau M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tructurer un discours en quatre parties</text:span></text:p>
              </text:list-item>
              <text:list-item>
                <text:p text:style-name="P6"><text:span text:style-name="T2">Employer trois figures de style simples</text:span></text:p>
              </text:list-item>
              <text:list-item>
                <text:p text:style-name="P6"><text:span text:style-name="T2">Présenter un discours d’environ 3 minutes sans lire</text:span></text:p>
              </text:list-item>
              <text:list-item>
                <text:p text:style-name="P6"><text:span text:style-name="T2">Rédiger le texte d’un discours (≈ 25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répète devant Nour :</text:span></text:p>
            <text:list text:style-name="L3">
              <text:list-item>
                <text:p text:style-name="P3"><text:span text:style-name="T2">Léa lit toutes ses notes, comme une liste de courses.</text:span></text:p>
              </text:list-item>
              <text:list-item>
                <text:p text:style-name="P3"><text:span text:style-name="T2">Nour : « Commence par une image, une question ou un chiffre. »</text:span></text:p>
              </text:list-item>
              <text:list-item>
                <text:p text:style-name="P3"><text:span text:style-name="T2">Nour : « Termine par une phrase forte. Regarde les gens ! »</text:span></text:p>
              </text:list-item>
            </text:list>
            <text:p text:style-name="P3"><text:span text:style-name="T2">Qu’est-ce qui rend un discours vivant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ez-vous déjà parlé devant un groupe ?</text:span></text:p>
              </text:list-item>
              <text:list-item>
                <text:p text:style-name="P6"><text:span text:style-name="T2">Quel discours célèbre connaissez-vous ?</text:span></text:p>
              </text:list-item>
              <text:list-item>
                <text:p text:style-name="P6"><text:span text:style-name="T2">Un bon discours vs un discours ennuyeux : trois idé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4 parti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4 parti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3">Accroche</text:span><text:span text:style-name="T2"> — citation, anecdote, question, chiffre choc</text:span></text:p>
              </text:list-item>
              <text:list-item>
                <text:p text:style-name="P6"><text:span text:style-name="T3">Thèse</text:span><text:span text:style-name="T2"> — l’idée principale en une phrase</text:span></text:p>
              </text:list-item>
              <text:list-item>
                <text:p text:style-name="P6"><text:span text:style-name="T3">Arguments</text:span><text:span text:style-name="T2"> — deux ou trois, illustrés d’exemples</text:span></text:p>
              </text:list-item>
              <text:list-item>
                <text:p text:style-name="P6"><text:span text:style-name="T3">Chute</text:span><text:span text:style-name="T2"> — phrase forte, appel, retour à l’accroch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connect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s connect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mencer : </text:span><text:span text:style-name="T4">d’abord, tout d’abord, premièrement</text:span></text:p>
              </text:list-item>
              <text:list-item>
                <text:p text:style-name="P6"><text:span text:style-name="T2">Ajouter : </text:span><text:span text:style-name="T4">ensuite, de plus, par ailleurs</text:span></text:p>
              </text:list-item>
              <text:list-item>
                <text:p text:style-name="P6"><text:span text:style-name="T2">Illustrer : </text:span><text:span text:style-name="T4">par exemple, ainsi</text:span></text:p>
              </text:list-item>
              <text:list-item>
                <text:p text:style-name="P6"><text:span text:style-name="T2">Opposer : </text:span><text:span text:style-name="T4">mais, cependant, pourtant</text:span></text:p>
              </text:list-item>
              <text:list-item>
                <text:p text:style-name="P6"><text:span text:style-name="T2">Conclure : </text:span><text:span text:style-name="T4">enfin, pour finir, en conclusion</text:span></text:p>
              </text:list-item>
            </text:list>
            <text:p text:style-name="P3"><text:span text:style-name="T2">Un connecteur au début de chaque argument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ois figures de sty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rois figures de sty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Anaphore</text:span><text:span text:style-name="T2"> : « Je veux la justice. Je veux l’égalité. Je veux la paix. »</text:span></text:p>
              </text:list-item>
              <text:list-item>
                <text:p text:style-name="P6"><text:span text:style-name="T3">Question rhétorique</text:span><text:span text:style-name="T2"> : « Pouvons-nous accepter cela ? »</text:span></text:p>
              </text:list-item>
              <text:list-item>
                <text:p text:style-name="P6"><text:span text:style-name="T3">Métaphore</text:span><text:span text:style-name="T2"> : « Le climat, c’est notre maison commune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cours modèle (Léa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scours modèle (Léa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Accroche</text:span><text:span text:style-name="T2"> : en octobre 2018, huit ans, pas un mot de français</text:span></text:p>
              </text:list-item>
              <text:list-item>
                <text:p text:style-name="P6"><text:span text:style-name="T4">Thèse</text:span><text:span text:style-name="T2"> : apprendre une langue, c’est voir le monde autrement</text:span></text:p>
              </text:list-item>
              <text:list-item>
                <text:p text:style-name="P6"><text:span text:style-name="T4">Arguments</text:span><text:span text:style-name="T2"> : les amis, les livres, l’avenir</text:span></text:p>
              </text:list-item>
              <text:list-item>
                <text:p text:style-name="P6"><text:span text:style-name="T4">Chute</text:span><text:span text:style-name="T2"> : « Une langue de plus, c’est un monde de plus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Aristot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Aristot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rois moyens de convaincre (</text:span><text:span text:style-name="T4">Rhétorique</text:span><text:span text:style-name="T2">) :</text:span></text:p>
            <text:list text:style-name="L3">
              <text:list-item>
                <text:p text:style-name="P3"><text:span text:style-name="T3">Ethos</text:span><text:span text:style-name="T2"> — la crédibilité de l’orateur</text:span></text:p>
              </text:list-item>
              <text:list-item>
                <text:p text:style-name="P3"><text:span text:style-name="T3">Pathos</text:span><text:span text:style-name="T2"> — l’émotion de l’auditoire</text:span></text:p>
              </text:list-item>
              <text:list-item>
                <text:p text:style-name="P3"><text:span text:style-name="T3">Logos</text:span><text:span text:style-name="T2"> — le raisonnement et les faits</text:span></text:p>
              </text:list-item>
            </text:list>
            <text:p text:style-name="P3"><text:span text:style-name="T4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repérer la structure du texte modèle</text:span></text:p>
              </text:list-item>
              <text:list-item>
                <text:p text:style-name="P6"><text:span text:style-name="T2">Ex. 2 : identifier les figures de style</text:span></text:p>
              </text:list-item>
              <text:list-item>
                <text:p text:style-name="P6"><text:span text:style-name="T2">Ex. 3 : compléter avec des connecteurs</text:span></text:p>
              </text:list-item>
              <text:list-item>
                <text:p text:style-name="P6"><text:span text:style-name="T2">Ex. 4 : rédiger deux accroches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 discours (≈ 3 min) sur un sujet libre :</text:span></text:p>
            <text:list text:style-name="L3">
              <text:list-item>
                <text:p text:style-name="P3"><text:span text:style-name="T2">Accroche → thèse → 3 arguments → chute</text:span></text:p>
              </text:list-item>
              <text:list-item>
                <text:p text:style-name="P3"><text:span text:style-name="T2">Au moins deux figures de style</text:span></text:p>
              </text:list-item>
              <text:list-item>
                <text:p text:style-name="P3"><text:span text:style-name="T2">Un connecteur par argument</text:span></text:p>
              </text:list-item>
              <text:list-item>
                <text:p text:style-name="P3"><text:span text:style-name="T2">Sans lire mot à mo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Structure en quatre parties</text:span></text:p>
              </text:list-item>
              <text:list-item>
                <text:p text:style-name="P6"><text:span text:style-name="T2">☐ </text:span><text:span text:style-name="T2">Deux figures de style</text:span></text:p>
              </text:list-item>
              <text:list-item>
                <text:p text:style-name="P6"><text:span text:style-name="T2">☐ </text:span><text:span text:style-name="T2">Un connecteur par argument</text:span></text:p>
              </text:list-item>
              <text:list-item>
                <text:p text:style-name="P6"><text:span text:style-name="T2">☐ </text:span><text:span text:style-name="T2">Trois minutes sans lire</text:span></text:p>
              </text:list-item>
              <text:list-item>
                <text:p text:style-name="P6"><text:span text:style-name="T2">☐ </text:span><text:span text:style-name="T2">Regard et paus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du discours (8 P.)</text:span></text:p>
              </text:list-item>
              <text:list-item>
                <text:p text:style-name="P6"><text:span text:style-name="T2">Tâche 2 — figures de style (6 P.)</text:span></text:p>
              </text:list-item>
              <text:list-item>
                <text:p text:style-name="P6"><text:span text:style-name="T2">Tâche 3 — rédiger un discours ≈ 250 mots (16 P.)</text:span></text:p>
              </text:list-item>
            </text:list>
            <text:p text:style-name="P3"><text:span text:style-name="T2">Thème : « Un engagement qui me tient à cœur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Rhétorique » — Wikipédia, CC BY-SA 4.0</text:span></text:p>
              </text:list-item>
              <text:list-item>
                <text:p text:style-name="P6"><text:span text:style-name="T2">« Figure de style »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49</meta:creation-date>
    <dc:date>2026-07-21T15:46:49</dc:date>
    <meta:document-statistic meta:object-count="189"/>
    <meta:generator>LibreOffice/24.2.7.2$Linux_X86_64 LibreOffice_project/420$Build-2</meta:generator>
  </office:meta>
</office:document-meta>
</file>