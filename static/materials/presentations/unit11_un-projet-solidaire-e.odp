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1 — Un projet solid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1 — Un projet solid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8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roposer et justifier un projet solidaire (monologue court)</text:span></text:p>
              </text:list-item>
              <text:list-item>
                <text:p text:style-name="P6"><text:span text:style-name="T2">Organiser un projet en 4 étapes : quoi / pour qui / comment / quand</text:span></text:p>
              </text:list-item>
              <text:list-item>
                <text:p text:style-name="P6"><text:span text:style-name="T2">Employer le futur simple et le conditionnel de proposition</text:span></text:p>
              </text:list-item>
              <text:list-item>
                <text:p text:style-name="P6"><text:span text:style-name="T2">Rédiger une affiche-projet d’environ 100 mots</text:span></text:p>
              </text:list-item>
              <text:list-item>
                <text:p text:style-name="P6"><text:span text:style-name="T2">Prendre position sur les idées des autr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Heure de vie de classe, salle 214.</text:span></text:p>
            <text:list text:style-name="L3">
              <text:list-item>
                <text:p text:style-name="P3"><text:span text:style-name="T3">Léa :</text:span><text:span text:style-name="T2"> le foyer n’a presque plus de livres.</text:span></text:p>
              </text:list-item>
              <text:list-item>
                <text:p text:style-name="P3"><text:span text:style-name="T3">Yanis :</text:span><text:span text:style-name="T2"> on pourrait organiser une collecte !</text:span></text:p>
              </text:list-item>
              <text:list-item>
                <text:p text:style-name="P3"><text:span text:style-name="T3">Léa :</text:span><text:span text:style-name="T2"> il faudrait aussi penser aux autres (association, Sénégal).</text:span></text:p>
              </text:list-item>
              <text:list-item>
                <text:p text:style-name="P3"><text:span text:style-name="T3">Yanis :</text:span><text:span text:style-name="T2"> je propose qu’on présente le projet vendredi.</text:span></text:p>
              </text:list-item>
            </text:list>
            <text:p text:style-name="P3"><text:span text:style-name="T2">→ </text:span><text:span text:style-name="T2">Deux solutions, une affiche à écrir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vez-vous déjà participé à une action solidaire ?</text:span></text:p>
              </text:list-item>
              <text:list-item>
                <text:p text:style-name="P6"><text:span text:style-name="T2">Qu’est-ce qu’un « projet solidaire » ? Trois exemples.</text:span></text:p>
              </text:list-item>
              <text:list-item>
                <text:p text:style-name="P6"><text:span text:style-name="T2">200 € pour aider les autres : qu’est-ce que vous feriez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projet solidaire · le bénévolat / un·e bénévole</text:span></text:p>
              </text:list-item>
              <text:list-item>
                <text:p text:style-name="P6"><text:span text:style-name="T2">une association · une collecte · un·e bénéficiaire</text:span></text:p>
              </text:list-item>
              <text:list-item>
                <text:p text:style-name="P6"><text:span text:style-name="T2">un don / faire un don</text:span></text:p>
              </text:list-item>
              <text:list-item>
                <text:p text:style-name="P6"><text:span text:style-name="T2">organiser · collecter · soutenir · sensibiliser</text:span></text:p>
              </text:list-item>
              <text:list-item>
                <text:p text:style-name="P6"><text:span text:style-name="T2">s’engager (pour) · propos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roposer et projet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roposer et projet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Proposer :</text:span><text:span text:style-name="T2"> On pourrait… · Il faudrait… · Je propose de + inf. · Je propose qu’on + subjonctif</text:span></text:p>
              </text:list-item>
              <text:list-item>
                <text:p text:style-name="P6"><text:span text:style-name="T3">Futur simple :</text:span><text:span text:style-name="T2"> infinitif + -ai, -as, -a, -ons, -ez, -ont</text:span></text:p>
              </text:list-item>
              <text:list-item>
                <text:p text:style-name="P6"><text:span text:style-name="T2">Irréguliers : enverrons · ferons · irons · on pourra · aur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’affiche de la class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’affiche de la class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E COLLECTE DE LIVRES, DEUX DESTINATIONS</text:span></text:p>
            <text:list text:style-name="L3">
              <text:list-item>
                <text:p text:style-name="P3"><text:span text:style-name="T3">Quoi ?</text:span><text:span text:style-name="T2"> une collecte au foyer</text:span></text:p>
              </text:list-item>
              <text:list-item>
                <text:p text:style-name="P3"><text:span text:style-name="T3">Pour qui ?</text:span><text:span text:style-name="T2"> le foyer + une école partenaire au Sénégal</text:span></text:p>
              </text:list-item>
              <text:list-item>
                <text:p text:style-name="P3"><text:span text:style-name="T3">Comment ?</text:span><text:span text:style-name="T2"> trier puis envoyer par colis groupé</text:span></text:p>
              </text:list-item>
              <text:list-item>
                <text:p text:style-name="P3"><text:span text:style-name="T3">Quand ?</text:span><text:span text:style-name="T2"> du 5 au 19 décembre</text:span></text:p>
              </text:list-item>
              <text:list-item>
                <text:p text:style-name="P3"><text:span text:style-name="T2">Une seule règle : un livre que </text:span><text:span text:style-name="T4">vous</text:span><text:span text:style-name="T2"> avez aimé 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5 décembre : Journée internationale des volontaires</text:span><text:span text:style-name="T2"> (ONU, 1985).</text:span></text:p>
              </text:list-item>
              <text:list-item>
                <text:p text:style-name="P6"><text:span text:style-name="T2">Le </text:span><text:span text:style-name="T3">bénévolat</text:span><text:span text:style-name="T2"> : activité libre, non rémunérée, au bénéfice d’autrui.</text:span></text:p>
              </text:list-item>
              <text:list-item>
                <text:p text:style-name="P6"><text:span text:style-name="T4">(D’après Wikipédia, CC BY-SA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Ex. 1</text:span><text:span text:style-name="T2"> Compréhension du texte</text:span></text:p>
              </text:list-item>
              <text:list-item>
                <text:p text:style-name="P6"><text:span text:style-name="T3">Ex. 2</text:span><text:span text:style-name="T2"> Futur simple (5 verbes)</text:span></text:p>
              </text:list-item>
              <text:list-item>
                <text:p text:style-name="P6"><text:span text:style-name="T3">Ex. 3</text:span><text:span text:style-name="T2"> Reformuler avec une expression de proposition</text:span></text:p>
              </text:list-item>
              <text:list-item>
                <text:p text:style-name="P6"><text:span text:style-name="T3">Ex. 4</text:span><text:span text:style-name="T2"> Structurer un projet en 4 questions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Oral (~1 min 30) :</text:span><text:span text:style-name="T2"> besoin → proposition → étapes au futur → invitation</text:span></text:p>
              </text:list-item>
              <text:list-item>
                <text:p text:style-name="P6"><text:span text:style-name="T3">Écrit (~100 mots) :</text:span><text:span text:style-name="T2"> l’affiche-projet (4 questions)</text:span></text:p>
              </text:list-item>
              <text:list-item>
                <text:p text:style-name="P6"><text:span text:style-name="T3">Critères :</text:span><text:span text:style-name="T2"> structure · 3 futurs + 2 propositions · 5 mots · effe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propose une idée (on pourrait / il faudrait / je propose de)</text:span></text:p>
              </text:list-item>
              <text:list-item>
                <text:p text:style-name="P6"><text:span text:style-name="T2">☐ </text:span><text:span text:style-name="T2">Je structure un projet en 4 questions</text:span></text:p>
              </text:list-item>
              <text:list-item>
                <text:p text:style-name="P6"><text:span text:style-name="T2">☐ </text:span><text:span text:style-name="T2">3 verbes au futur simple corrects</text:span></text:p>
              </text:list-item>
              <text:list-item>
                <text:p text:style-name="P6"><text:span text:style-name="T2">☐ </text:span><text:span text:style-name="T2">5 mots de l’engagement</text:span></text:p>
              </text:list-item>
              <text:list-item>
                <text:p text:style-name="P6"><text:span text:style-name="T2">☐ </text:span><text:span text:style-name="T2">Mon affiche donne envie de particip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de l’écrit : 8 pts</text:span></text:p>
              </text:list-item>
              <text:list-item>
                <text:p text:style-name="P6"><text:span text:style-name="T2">Tâche 2 — Grammaire (futur + proposition) : 10 pts</text:span></text:p>
              </text:list-item>
              <text:list-item>
                <text:p text:style-name="P6"><text:span text:style-name="T2">Tâche 3 — Affiche-projet (~100 mots) : 12 p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ournée internationale des volontaires — Wikipédia, CC BY-SA 4.0</text:span></text:p>
              </text:list-item>
              <text:list-item>
                <text:p text:style-name="P6"><text:span text:style-name="T2">Bénévolat — Wikipédia, CC BY-SA 4.0</text:span></text:p>
              </text:list-item>
              <text:list-item>
                <text:p text:style-name="P6"><text:span text:style-name="T2">Plateforme indépendante, sans affiliation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1:31</meta:creation-date>
    <dc:date>2026-07-21T16:11:31</dc:date>
    <meta:document-statistic meta:object-count="185"/>
    <meta:generator>LibreOffice/24.2.7.2$Linux_X86_64 LibreOffice_project/420$Build-2</meta:generator>
  </office:meta>
</office:document-meta>
</file>