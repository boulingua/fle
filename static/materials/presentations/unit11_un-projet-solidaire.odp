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 projet solid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 projet solid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Unité 11 · Parcours G+M · classe 8 · Niveau M</text:span></text:p>
            <text:p text:style-name="P3"><text:span text:style-name="T2">Modèle : 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Proposer un projet avec le conditionnel (</text:span><text:span text:style-name="T3">on pourrait, j’aimerais, il faudrait</text:span><text:span text:style-name="T2">).</text:span></text:p>
              </text:list-item>
              <text:list-item>
                <text:p text:style-name="P6"><text:span text:style-name="T2">Décrire les étapes au futur simple (</text:span><text:span text:style-name="T3">nous organiserons, la classe récoltera</text:span><text:span text:style-name="T2">).</text:span></text:p>
              </text:list-item>
              <text:list-item>
                <text:p text:style-name="P6"><text:span text:style-name="T2">Exprimer un but avec </text:span><text:span text:style-name="T3">pour</text:span><text:span text:style-name="T2"> et </text:span><text:span text:style-name="T3">afin de</text:span><text:span text:style-name="T2">.</text:span></text:p>
              </text:list-item>
              <text:list-item>
                <text:p text:style-name="P6"><text:span text:style-name="T2">Présenter un projet en un monologue d’environ 2 minutes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Salle 12. Au tableau : </text:span><text:span text:style-name="T4">SOLIDARITÉ</text:span><text:span text:style-name="T2">.</text:span></text:p>
            <text:list text:style-name="L3">
              <text:list-item>
                <text:p text:style-name="P3"><text:span text:style-name="T4">Mme Renault :</text:span><text:span text:style-name="T2"> La semaine prochaine, c’est la Journée des volontaires. Vous avez des idées ?</text:span></text:p>
              </text:list-item>
              <text:list-item>
                <text:p text:style-name="P3"><text:span text:style-name="T4">Léa :</text:span><text:span text:style-name="T2"> On pourrait organiser une vente de gâteaux.</text:span></text:p>
              </text:list-item>
              <text:list-item>
                <text:p text:style-name="P3"><text:span text:style-name="T4">Karim :</text:span><text:span text:style-name="T2"> Ou une collecte de livres. Il faudrait des cartons.</text:span></text:p>
              </text:list-item>
            </text:list>
            <text:p text:style-name="P3"><text:span text:style-name="T2">Et vous, quelle proposition préférez-vous ?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Avez-vous déjà participé à une action solidaire ?</text:span></text:p>
              </text:list-item>
              <text:list-item>
                <text:p text:style-name="P6"><text:span text:style-name="T2">Qu’est-ce qu’un projet réussi ? Trois conditions.</text:span></text:p>
              </text:list-item>
              <text:list-item>
                <text:p text:style-name="P6"><text:span text:style-name="T2">Comment propose-t-on une idée poliment en français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la solidarité · une association · un·e bénévole</text:span></text:p>
              </text:list-item>
              <text:list-item>
                <text:p text:style-name="P6"><text:span text:style-name="T2">une collecte · un don · récolter des fonds</text:span></text:p>
              </text:list-item>
              <text:list-item>
                <text:p text:style-name="P6"><text:span text:style-name="T2">proposer · organiser</text:span></text:p>
              </text:list-item>
              <text:list-item>
                <text:p text:style-name="P6"><text:span text:style-name="T2">le but / l’objectif · le suivi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Proposer (conditionnel)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Proposer (conditionnel)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Radical du futur + terminaisons </text:span><text:span text:style-name="T3">-ais, -ais, -ait, -ions, -iez, -aient</text:span><text:span text:style-name="T2">.</text:span></text:p>
            <text:list text:style-name="L3">
              <text:list-item>
                <text:p text:style-name="P3"><text:span text:style-name="T3">pouvoir</text:span><text:span text:style-name="T2"> → on </text:span><text:span text:style-name="T4">pourrait</text:span><text:span text:style-name="T2"> organiser une vente.</text:span></text:p>
              </text:list-item>
              <text:list-item>
                <text:p text:style-name="P3"><text:span text:style-name="T3">aimer</text:span><text:span text:style-name="T2"> → j’</text:span><text:span text:style-name="T4">aimerais</text:span><text:span text:style-name="T2"> aider.</text:span></text:p>
              </text:list-item>
              <text:list-item>
                <text:p text:style-name="P3"><text:span text:style-name="T3">falloir</text:span><text:span text:style-name="T2"> → il </text:span><text:span text:style-name="T4">faudrait</text:span><text:span text:style-name="T2"> des cartons.</text:span></text:p>
              </text:list-item>
              <text:list-item>
                <text:p text:style-name="P3"><text:span text:style-name="T3">être</text:span><text:span text:style-name="T2"> → ce </text:span><text:span text:style-name="T4">serait</text:span><text:span text:style-name="T2"> une bonne idée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Décrire (futur simple)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Décrire (futur simple)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Infinitif + terminaisons </text:span><text:span text:style-name="T3">-ai, -as, -a, -ons, -ez, -ont</text:span><text:span text:style-name="T2">.</text:span></text:p>
            <text:list text:style-name="L3">
              <text:list-item>
                <text:p text:style-name="P3"><text:span text:style-name="T3">Nous organiserons une vente.</text:span></text:p>
              </text:list-item>
              <text:list-item>
                <text:p text:style-name="P3"><text:span text:style-name="T3">La classe récoltera 300 €.</text:span></text:p>
              </text:list-item>
              <text:list-item>
                <text:p text:style-name="P3"><text:span text:style-name="T3">Nous afficherons le résultat.</text:span></text:p>
              </text:list-item>
            </text:list>
            <text:p text:style-name="P3"><text:span text:style-name="T2">Le but : </text:span><text:span text:style-name="T3">pour</text:span><text:span text:style-name="T2"> / </text:span><text:span text:style-name="T3">afin de</text:span><text:span text:style-name="T2"> + infinitif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Note culturell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Note culturell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4">Association loi de 1901</text:span><text:span text:style-name="T2"> : un groupe à but </text:span><text:span text:style-name="T4">non lucratif</text:span><text:span text:style-name="T2"> (loi du 1er juillet 1901).</text:span></text:p>
              </text:list-item>
              <text:list-item>
                <text:p text:style-name="P6"><text:span text:style-name="T4">5 décembre</text:span><text:span text:style-name="T2"> : Journée internationale des volontaires, créée par l’ONU en 1985.</text:span></text:p>
              </text:list-item>
            </text:list>
            <text:p text:style-name="P3"><text:span text:style-name="T3">(D’après Wikipédia et l’ONU, CC BY-SA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5">
              <text:list-item>
                <text:p text:style-name="P6"><text:span text:style-name="T2">Proposer poliment (conditionnel).</text:span></text:p>
              </text:list-item>
              <text:list-item>
                <text:p text:style-name="P6"><text:span text:style-name="T2">Décrire le projet décidé (futur simple).</text:span></text:p>
              </text:list-item>
              <text:list-item>
                <text:p text:style-name="P6"><text:span text:style-name="T2">Vocabulaire à compléter.</text:span></text:p>
              </text:list-item>
              <text:list-item>
                <text:p text:style-name="P6"><text:span text:style-name="T2">Exprimer le but (</text:span><text:span text:style-name="T3">pour / afin de</text:span><text:span text:style-name="T2">).</text:span></text:p>
              </text:list-item>
            </text:list>
            <text:p text:style-name="P3"><text:span text:style-name="T2">Différenciation : G (1, 3) · M (1–4) · E (+ phrases personnelles)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Monologue d’environ 2 minutes : </text:span><text:span text:style-name="T4">mon projet solidaire</text:span><text:span text:style-name="T2">.</text:span></text:p>
            <text:list text:style-name="L5">
              <text:list-item>
                <text:p text:style-name="P3"><text:span text:style-name="T2">Le problème.</text:span></text:p>
              </text:list-item>
              <text:list-item>
                <text:p text:style-name="P3"><text:span text:style-name="T2">La proposition (conditionnel).</text:span></text:p>
              </text:list-item>
              <text:list-item>
                <text:p text:style-name="P3"><text:span text:style-name="T2">L’objectif (futur + un chiffre).</text:span></text:p>
              </text:list-item>
              <text:list-item>
                <text:p text:style-name="P3"><text:span text:style-name="T2">Le suivi.</text:span></text:p>
              </text:list-item>
            </text:list>
            <text:p text:style-name="P3"><text:span text:style-name="T2">Critères : structure · conditionnel · futur · but · fluidité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☐ </text:span><text:span text:style-name="T2">Je propose avec </text:span><text:span text:style-name="T3">on pourrait / j’aimerais / il faudrait</text:span><text:span text:style-name="T2">.</text:span></text:p>
              </text:list-item>
              <text:list-item>
                <text:p text:style-name="P6"><text:span text:style-name="T2">☐ </text:span><text:span text:style-name="T2">Je conjugue le futur simple du projet.</text:span></text:p>
              </text:list-item>
              <text:list-item>
                <text:p text:style-name="P6"><text:span text:style-name="T2">☐ </text:span><text:span text:style-name="T2">Je distingue proposition et décision.</text:span></text:p>
              </text:list-item>
              <text:list-item>
                <text:p text:style-name="P6"><text:span text:style-name="T2">☐ </text:span><text:span text:style-name="T2">J’exprime un but avec </text:span><text:span text:style-name="T3">pour / afin de</text:span><text:span text:style-name="T2">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âche 1 — Grammaire (10 P.)</text:span></text:p>
              </text:list-item>
              <text:list-item>
                <text:p text:style-name="P6"><text:span text:style-name="T2">Tâche 2 — Expression écrite, ~80 mots (10 P.)</text:span></text:p>
              </text:list-item>
              <text:list-item>
                <text:p text:style-name="P6"><text:span text:style-name="T2">Tâche 3 — Expression orale, ~2 min (10 P.)</text:span></text:p>
              </text:list-item>
            </text:list>
            <text:p text:style-name="P3"><text:span text:style-name="T4">Total : 30 P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Association loi de 1901 — Wikipédia, CC BY-SA.</text:span></text:p>
              </text:list-item>
              <text:list-item>
                <text:p text:style-name="P6"><text:span text:style-name="T2">Journée internationale des Volontaires — ONU / Wikipédia (résolution 40/212, 1985)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5:34:07</meta:creation-date>
    <dc:date>2026-07-21T15:34:07</dc:date>
    <meta:document-statistic meta:object-count="185"/>
    <meta:generator>LibreOffice/24.2.7.2$Linux_X86_64 LibreOffice_project/420$Build-2</meta:generator>
  </office:meta>
</office:document-meta>
</file>