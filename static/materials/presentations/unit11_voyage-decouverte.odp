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1.058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1 — Voyage de découvert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1 — Voyage de découverte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3"><text:span text:style-name="T2">Strasbourg · Parcours E · Niveau E</text:span></text:p>
            <text:p text:style-name="P4"><text:span text:style-name="T3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Comprendre une annonce de visite guidée</text:span></text:p>
              </text:list-item>
              <text:list-item>
                <text:p text:style-name="P7"><text:span text:style-name="T3">Repérer des noms de monuments et de lieux</text:span></text:p>
              </text:list-item>
              <text:list-item>
                <text:p text:style-name="P7"><text:span text:style-name="T3">Présenter une visite en 6-8 phrases</text:span></text:p>
              </text:list-item>
              <text:list-item>
                <text:p text:style-name="P7"><text:span text:style-name="T3">Employer le vocabulaire du tourisme + prépositions</text:span></text:p>
              </text:list-item>
              <text:list-item>
                <text:p text:style-name="P7"><text:span text:style-name="T3">Situer Strasbourg et citer son patrimoin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3">Lena et Malik arrivent à la gare de Strasbourg.</text:span></text:p>
            <text:list text:style-name="L3">
              <text:list-item>
                <text:p text:style-name="P4"><text:span text:style-name="T2">Lena :</text:span><text:span text:style-name="T3"> Le guide nous attend devant la cathédrale.</text:span></text:p>
              </text:list-item>
              <text:list-item>
                <text:p text:style-name="P4"><text:span text:style-name="T2">Malik :</text:span><text:span text:style-name="T3"> Qu’est-ce qu’on va faire ?</text:span></text:p>
              </text:list-item>
              <text:list-item>
                <text:p text:style-name="P4"><text:span text:style-name="T2">Lena :</text:span><text:span text:style-name="T3"> On va visiter la cathédrale, puis se promener à la Petite France.</text:span></text:p>
              </text:list-item>
              <text:list-item>
                <text:p text:style-name="P4"><text:span text:style-name="T2">Malik :</text:span><text:span text:style-name="T3"> On y va à pied ?</text:span></text:p>
              </text:list-item>
              <text:list-item>
                <text:p text:style-name="P4"><text:span text:style-name="T2">Lena :</text:span><text:span text:style-name="T3"> À pied, c’est tout près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Avez-vous déjà visité Strasbourg ou une ville française ?</text:span></text:p>
              </text:list-item>
              <text:list-item>
                <text:p text:style-name="P7"><text:span text:style-name="T3">Que savez-vous du Parlement européen ?</text:span></text:p>
              </text:list-item>
              <text:list-item>
                <text:p text:style-name="P7"><text:span text:style-name="T3">Quels monuments aimeriez-vous découvrir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un voyage scolaire · une visite guidée</text:span></text:p>
              </text:list-item>
              <text:list-item>
                <text:p text:style-name="P7"><text:span text:style-name="T3">un guide · un audioguide · un billet · un tarif</text:span></text:p>
              </text:list-item>
              <text:list-item>
                <text:p text:style-name="P7"><text:span text:style-name="T3">un monument · un quartier · l’entrée</text:span></text:p>
              </text:list-item>
              <text:list-item>
                <text:p text:style-name="P7"><text:span text:style-name="T3">se promener · découvrir · visiter</text:span></text:p>
              </text:list-item>
              <text:list-item>
                <text:p text:style-name="P7"><text:span text:style-name="T3">à pied · en tram · en bu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orter — Cinq lieux à Strasbourg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pporter — Cinq lieux à Strasbourg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la </text:span><text:span text:style-name="T2">cathédrale Notre-Dame</text:span><text:span text:style-name="T3"> — flèche de 142 m</text:span></text:p>
              </text:list-item>
              <text:list-item>
                <text:p text:style-name="P7"><text:span text:style-name="T3">la </text:span><text:span text:style-name="T2">Petite France</text:span><text:span text:style-name="T3"> — quartier des tanneurs</text:span></text:p>
              </text:list-item>
              <text:list-item>
                <text:p text:style-name="P7"><text:span text:style-name="T3">le </text:span><text:span text:style-name="T2">Parlement européen</text:span><text:span text:style-name="T3"> — siège officiel</text:span></text:p>
              </text:list-item>
              <text:list-item>
                <text:p text:style-name="P7"><text:span text:style-name="T3">le </text:span><text:span text:style-name="T2">Palais Rohan</text:span><text:span text:style-name="T3"> — musées</text:span></text:p>
              </text:list-item>
              <text:list-item>
                <text:p text:style-name="P7"><text:span text:style-name="T3">les </text:span><text:span text:style-name="T2">Ponts couverts</text:span><text:span text:style-name="T3"> — tours médiéval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2">Prépositions de lieu</text:span><text:span text:style-name="T3"> à Strasbourg · au musée · à la Petite France · à l’office</text:span></text:p>
            <text:p text:style-name="P4"><text:span text:style-name="T2">Futur proche (aller + infinitif)</text:span><text:span text:style-name="T3"> On </text:span><text:span text:style-name="T2">va visiter</text:span><text:span text:style-name="T3"> la cathédrale. Nous </text:span><text:span text:style-name="T2">allons manger</text:span><text:span text:style-name="T3"> une tarte flambé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’annonce du guid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’annonce du guide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4">« Bienvenue à Strasbourg ! La visite commence à 10 h, place de la Cathédrale. La flèche mesure 142 m. Ensuite, à pied, direction la Petite France. La visite dure 2 h. Tarif : 8 € / 4 € (moins de 18 ans). Audioguide : 2 € en plus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La </text:span><text:span text:style-name="T2">Grande-Île</text:span><text:span text:style-name="T3"> (centre ancien) : patrimoine mondial UNESCO depuis </text:span><text:span text:style-name="T2">1988</text:span></text:p>
              </text:list-item>
              <text:list-item>
                <text:p text:style-name="P7"><text:span text:style-name="T3">Premier centre-ville entier ainsi reconnu</text:span></text:p>
              </text:list-item>
              <text:list-item>
                <text:p text:style-name="P7"><text:span text:style-name="T3">Cathédrale, Petite France, siège du Parlement européen</text:span></text:p>
              </text:list-item>
            </text:list>
            <text:p text:style-name="P4"><text:span text:style-name="T4">(D’après Wikipédia, CC BY-SA — voir Source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2">Ex. 1</text:span><text:span text:style-name="T3"> — Compréhension de l’annonce (5 questions)</text:span></text:p>
              </text:list-item>
              <text:list-item>
                <text:p text:style-name="P7"><text:span text:style-name="T2">Ex. 2</text:span><text:span text:style-name="T3"> — Vocabulaire (traduction)</text:span></text:p>
              </text:list-item>
              <text:list-item>
                <text:p text:style-name="P7"><text:span text:style-name="T2">Ex. 3</text:span><text:span text:style-name="T3"> — Prépositions + futur proche</text:span></text:p>
              </text:list-item>
              <text:list-item>
                <text:p text:style-name="P7"><text:span text:style-name="T2">Ex. 4</text:span><text:span text:style-name="T3"> — Quel lieu ?</text:span></text:p>
              </text:list-item>
            </text:list>
            <text:p text:style-name="P4"><text:span text:style-name="T3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2">Prise de parole en continu (~6-8 phrases)</text:span></text:p>
            <text:list text:style-name="L5">
              <text:list-item>
                <text:p text:style-name="P4"><text:span text:style-name="T3">Nom + lieu du monument</text:span></text:p>
              </text:list-item>
              <text:list-item>
                <text:p text:style-name="P4"><text:span text:style-name="T3">Une particularité</text:span></text:p>
              </text:list-item>
              <text:list-item>
                <text:p text:style-name="P4"><text:span text:style-name="T3">Ce que vous allez y faire (futur proche)</text:span></text:p>
              </text:list-item>
              <text:list-item>
                <text:p text:style-name="P4"><text:span text:style-name="T3">Votre avis</text:span></text:p>
              </text:list-item>
            </text:list>
            <text:p text:style-name="P4"><text:span text:style-name="T3">Critères : contenu · vocabulaire · grammaire · fluid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☐ </text:span><text:span text:style-name="T3">Je comprends une annonce de visite</text:span></text:p>
              </text:list-item>
              <text:list-item>
                <text:p text:style-name="P7"><text:span text:style-name="T3">☐ </text:span><text:span text:style-name="T3">Je connais cinq lieux de Strasbourg</text:span></text:p>
              </text:list-item>
              <text:list-item>
                <text:p text:style-name="P7"><text:span text:style-name="T3">☐ </text:span><text:span text:style-name="T3">J’utilise le futur proche et les prépositions</text:span></text:p>
              </text:list-item>
              <text:list-item>
                <text:p text:style-name="P7"><text:span text:style-name="T3">☐ </text:span><text:span text:style-name="T3">Je présente une visite en 6-8 phrases</text:span></text:p>
              </text:list-item>
              <text:list-item>
                <text:p text:style-name="P7"><text:span text:style-name="T3">☐ </text:span><text:span text:style-name="T3">Je cite un élément du patrimoin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2">Tâche 1</text:span><text:span text:style-name="T3"> — Compréhension orale (12 P.)</text:span></text:p>
              </text:list-item>
              <text:list-item>
                <text:p text:style-name="P7"><text:span text:style-name="T2">Tâche 2</text:span><text:span text:style-name="T3"> — Expression orale en continu (12 P.)</text:span></text:p>
              </text:list-item>
            </text:list>
            <text:p text:style-name="P4"><text:span text:style-name="T2">Total : 24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« Strasbourg » — Wikipédia, CC BY-SA 4.0</text:span></text:p>
              </text:list-item>
              <text:list-item>
                <text:p text:style-name="P7"><text:span text:style-name="T3">« Cathédrale Notre-Dame de Strasbourg » — Wikipédia, CC BY-SA 4.0</text:span></text:p>
              </text:list-item>
              <text:list-item>
                <text:p text:style-name="P7"><text:span text:style-name="T3">« Grande Île (Strasbourg) » — Wikipédia, CC BY-SA 4.0</text:span></text:p>
              </text:list-item>
              <text:list-item>
                <text:p text:style-name="P7"><text:span text:style-name="T3">Office de tourisme de Strasbourg (non affilié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7:26</meta:creation-date>
    <dc:date>2026-07-21T15:47:26</dc:date>
    <meta:document-statistic meta:object-count="189"/>
    <meta:generator>LibreOffice/24.2.7.2$Linux_X86_64 LibreOffice_project/420$Build-2</meta:generator>
  </office:meta>
</office:document-meta>
</file>