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oyag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yag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1 · premières impressions Parcours G+M · classe 6 · Niveau 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e carte postale simple</text:span></text:p>
              </text:list-item>
              <text:list-item>
                <text:p text:style-name="P6"><text:span text:style-name="T2">Situer 5 villes + 3 monuments</text:span></text:p>
              </text:list-item>
              <text:list-item>
                <text:p text:style-name="P6"><text:span text:style-name="T2">Utiliser le vocabulaire du voyage</text:span></text:p>
              </text:list-item>
              <text:list-item>
                <text:p text:style-name="P6"><text:span text:style-name="T2">Écrire une carte postale (~50 mots)</text:span></text:p>
              </text:list-item>
              <text:list-item>
                <text:p text:style-name="P6"><text:span text:style-name="T2">Présenter une région françai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me Renault déplie la carte de France.</text:span></text:p>
            <text:list text:style-name="L3">
              <text:list-item>
                <text:p text:style-name="P3"><text:span text:style-name="T2">La classe part à </text:span><text:span text:style-name="T3">Marseille</text:span><text:span text:style-name="T2"> !</text:span></text:p>
              </text:list-item>
              <text:list-item>
                <text:p text:style-name="P3"><text:span text:style-name="T2">À Marseille : la </text:span><text:span text:style-name="T3">mer Méditerranée</text:span><text:span text:style-name="T2">, il fait chaud</text:span></text:p>
              </text:list-item>
              <text:list-item>
                <text:p text:style-name="P3"><text:span text:style-name="T2">Léa veut écrire une </text:span><text:span text:style-name="T3">carte posta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villes françaises que vous connaissez ?</text:span></text:p>
              </text:list-item>
              <text:list-item>
                <text:p text:style-name="P6"><text:span text:style-name="T2">Avez-vous déjà voyagé en France ?</text:span></text:p>
              </text:list-item>
              <text:list-item>
                <text:p text:style-name="P6"><text:span text:style-name="T2">Quel monument vous fait rêver ?</text:span></text:p>
              </text:list-item>
              <text:list-item>
                <text:p text:style-name="P6"><text:span text:style-name="T2">Mer ou montagne pour les vacance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mer · la plage · le port</text:span></text:p>
              </text:list-item>
              <text:list-item>
                <text:p text:style-name="P6"><text:span text:style-name="T2">la ville · la région · le monument</text:span></text:p>
              </text:list-item>
              <text:list-item>
                <text:p text:style-name="P6"><text:span text:style-name="T2">visiter · monter</text:span></text:p>
              </text:list-item>
              <text:list-item>
                <text:p text:style-name="P6"><text:span text:style-name="T2">il fait chaud · il fait beau</text:span></text:p>
              </text:list-item>
              <text:list-item>
                <text:p text:style-name="P6"><text:span text:style-name="T2">une carte postale · biso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: en / à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: en / à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n</text:span><text:span text:style-name="T2"> + pays féminin → </text:span><text:span text:style-name="T4">en France</text:span></text:p>
              </text:list-item>
              <text:list-item>
                <text:p text:style-name="P6"><text:span text:style-name="T3">à</text:span><text:span text:style-name="T2"> + ville → </text:span><text:span text:style-name="T4">à Marseille</text:span></text:p>
              </text:list-item>
              <text:list-item>
                <text:p text:style-name="P6"><text:span text:style-name="T2">Le temps : </text:span><text:span text:style-name="T3">il fait</text:span><text:span text:style-name="T2"> chaud / beau / froi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 vill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 vill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aris</text:span><text:span text:style-name="T2"> — la Seine, la capitale</text:span></text:p>
              </text:list-item>
              <text:list-item>
                <text:p text:style-name="P6"><text:span text:style-name="T3">Marseille</text:span><text:span text:style-name="T2"> — la mer Méditerranée</text:span></text:p>
              </text:list-item>
              <text:list-item>
                <text:p text:style-name="P6"><text:span text:style-name="T3">Lyon</text:span><text:span text:style-name="T2"> — le Rhône</text:span></text:p>
              </text:list-item>
              <text:list-item>
                <text:p text:style-name="P6"><text:span text:style-name="T3">Strasbourg</text:span><text:span text:style-name="T2"> — le Rhin</text:span></text:p>
              </text:list-item>
              <text:list-item>
                <text:p text:style-name="P6"><text:span text:style-name="T3">Nice</text:span><text:span text:style-name="T2"> — la Côte d’Azu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monume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 monume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</text:span><text:span text:style-name="T3">tour Eiffel</text:span><text:span text:style-name="T2"> — Paris</text:span></text:p>
              </text:list-item>
              <text:list-item>
                <text:p text:style-name="P6"><text:span text:style-name="T2">le </text:span><text:span text:style-name="T3">Mont-Saint-Michel</text:span><text:span text:style-name="T2"> — Normandie</text:span></text:p>
              </text:list-item>
              <text:list-item>
                <text:p text:style-name="P6"><text:span text:style-name="T2">le </text:span><text:span text:style-name="T3">pont du Gard</text:span><text:span text:style-name="T2"> — Occitanie (Sud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te postale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arte postale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Marseille, le 15 juillet</text:span></text:p>
            <text:p text:style-name="P3"><text:span text:style-name="T2">Salut maman, salut papa ! Je suis à Marseille. Il fait très chaud, la mer est bleue. Hier, on a visité le Vieux-Port. J’ai mangé une bouillabaisse. Demain, on monte à Notre-Dame de la Garde. Bisous, Lé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: PAC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: PAC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gion du </text:span><text:span text:style-name="T3">sud-est</text:span><text:span text:style-name="T2"> de la France</text:span></text:p>
              </text:list-item>
              <text:list-item>
                <text:p text:style-name="P6"><text:span text:style-name="T3">Alpes</text:span><text:span text:style-name="T2"> au nord · </text:span><text:span text:style-name="T3">Provence</text:span><text:span text:style-name="T2"> au centre · </text:span><text:span text:style-name="T3">Côte d’Azur</text:span><text:span text:style-name="T2"> au sud</text:span></text:p>
              </text:list-item>
              <text:list-item>
                <text:p text:style-name="P6"><text:span text:style-name="T2">Climat </text:span><text:span text:style-name="T3">méditerranéen</text:span><text:span text:style-name="T2"> : étés chauds et secs</text:span></text:p>
              </text:list-item>
              <text:list-item>
                <text:p text:style-name="P6"><text:span text:style-name="T3">Notre-Dame de la Garde</text:span><text:span text:style-name="T2"> domine Marseille (1853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Géographie (relier)</text:span></text:p>
              </text:list-item>
              <text:list-item>
                <text:p text:style-name="P6"><text:span text:style-name="T2">Ex. 2 — Compréhension de la carte postale</text:span></text:p>
              </text:list-item>
              <text:list-item>
                <text:p text:style-name="P6"><text:span text:style-name="T2">Ex. 3 — Vocabulaire</text:span></text:p>
              </text:list-item>
              <text:list-item>
                <text:p text:style-name="P6"><text:span text:style-name="T2">Ex. 4 — « en » ou « à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crivez votre </text:span><text:span text:style-name="T3">carte postale</text:span><text:span text:style-name="T2"> (~50 mots)</text:span></text:p>
            <text:list text:style-name="L3">
              <text:list-item>
                <text:p text:style-name="P3"><text:span text:style-name="T2">Lieu + date</text:span></text:p>
              </text:list-item>
              <text:list-item>
                <text:p text:style-name="P3"><text:span text:style-name="T2">Salutation</text:span></text:p>
              </text:list-item>
              <text:list-item>
                <text:p text:style-name="P3"><text:span text:style-name="T2">Météo / activité / nourriture</text:span></text:p>
              </text:list-item>
              <text:list-item>
                <text:p text:style-name="P3"><text:span text:style-name="T2">À bientôt ! Biso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itue 5 villes</text:span></text:p>
              </text:list-item>
              <text:list-item>
                <text:p text:style-name="P6"><text:span text:style-name="T2">Je nomme 3 monuments</text:span></text:p>
              </text:list-item>
              <text:list-item>
                <text:p text:style-name="P6"><text:span text:style-name="T2">J’utilise « en France » / « à »</text:span></text:p>
              </text:list-item>
              <text:list-item>
                <text:p text:style-name="P6"><text:span text:style-name="T2">J’écris une carte postale</text:span></text:p>
              </text:list-item>
              <text:list-item>
                <text:p text:style-name="P6"><text:span text:style-name="T2">Je présente la région PAC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ovence-Alpes-Côte d’Azur — Wikipédia, CC-BY-SA</text:span></text:p>
              </text:list-item>
              <text:list-item>
                <text:p text:style-name="P6"><text:span text:style-name="T2">Climat de PACA — Wikipédia, CC-BY-SA</text:span></text:p>
              </text:list-item>
              <text:list-item>
                <text:p text:style-name="P6"><text:span text:style-name="T2">Notre-Dame de la Garde — Simple English Wikipedia, CC-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07</meta:creation-date>
    <dc:date>2026-07-21T15:08:07</dc:date>
    <meta:document-statistic meta:object-count="189"/>
    <meta:generator>LibreOffice/24.2.7.2$Linux_X86_64 LibreOffice_project/420$Build-2</meta:generator>
  </office:meta>
</office:document-meta>
</file>