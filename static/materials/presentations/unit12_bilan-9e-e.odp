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2 — Bilan : la 9e vers le cycle termina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2 — Bilan : la 9e vers le cycle termina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9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résenter oralement mon bilan de 9e en 4 axes</text:span></text:p>
              </text:list-item>
              <text:list-item>
                <text:p text:style-name="P6"><text:span text:style-name="T2">Exposer en continu 3 objectifs pour le cycle terminal</text:span></text:p>
              </text:list-item>
              <text:list-item>
                <text:p text:style-name="P6"><text:span text:style-name="T2">Rédiger une lettre à mon « moi futur » (~180 mots)</text:span></text:p>
              </text:list-item>
              <text:list-item>
                <text:p text:style-name="P6"><text:span text:style-name="T2">Employer les connecteurs du bilan et de la projection</text:span></text:p>
              </text:list-item>
              <text:list-item>
                <text:p text:style-name="P6"><text:span text:style-name="T2">Articuler passé composé, présent et futur simp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Fin juin. M. Klein réunit la 9e.</text:span></text:p>
            <text:list text:style-name="L3">
              <text:list-item>
                <text:p text:style-name="P3"><text:span text:style-name="T2">« L’an prochain : </text:span><text:span text:style-name="T3">Leistungsfach</text:span><text:span text:style-name="T2"> ou </text:span><text:span text:style-name="T3">Basisfach</text:span><text:span text:style-name="T2"> ? »</text:span></text:p>
              </text:list-item>
              <text:list-item>
                <text:p text:style-name="P3"><text:span text:style-name="T2">Anouk : forte à l’écrit, timide à l’oral</text:span></text:p>
              </text:list-item>
              <text:list-item>
                <text:p text:style-name="P3"><text:span text:style-name="T2">Karim : à l’aise à l’oral, peu de connecteurs</text:span></text:p>
              </text:list-item>
            </text:list>
            <text:p text:style-name="P3"><text:span text:style-name="T4">Où en êtes-vous ? Où voulez-vous aller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Votre moment le plus marquant de la 9e ?</text:span></text:p>
              </text:list-item>
              <text:list-item>
                <text:p text:style-name="P6"><text:span text:style-name="T2">Un acquis vraiment nouveau cette année ?</text:span></text:p>
              </text:list-item>
              <text:list-item>
                <text:p text:style-name="P6"><text:span text:style-name="T2">« Au début… je savais… » / « Maintenant… je sais… »</text:span></text:p>
              </text:list-item>
              <text:list-item>
                <text:p text:style-name="P6"><text:span text:style-name="T2">Votre objectif prioritaire pour le cycle terminal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resser un bilan · un acquis · consolider</text:span></text:p>
              </text:list-item>
              <text:list-item>
                <text:p text:style-name="P6"><text:span text:style-name="T2">une progression / un progrès</text:span></text:p>
              </text:list-item>
              <text:list-item>
                <text:p text:style-name="P6"><text:span text:style-name="T2">se projeter · viser un objectif</text:span></text:p>
              </text:list-item>
              <text:list-item>
                <text:p text:style-name="P6"><text:span text:style-name="T2">franchir une étape · l’orienta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Trois temp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Trois temp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Passé composé</text:span><text:span text:style-name="T2"> — ce que j’ai accompli</text:span></text:p>
              </text:list-item>
              <text:list-item>
                <text:p text:style-name="P6"><text:span text:style-name="T4">Présent</text:span><text:span text:style-name="T2"> — où j’en suis</text:span></text:p>
              </text:list-item>
              <text:list-item>
                <text:p text:style-name="P6"><text:span text:style-name="T4">Futur simple</text:span><text:span text:style-name="T2"> — ce que je vise</text:span></text:p>
              </text:list-item>
              <text:list-item>
                <text:p text:style-name="P6"><text:span text:style-name="T2">Connecteurs : </text:span><text:span text:style-name="T3">auparavant · maintenant · à l’avenir</text:span></text:p>
              </text:list-item>
              <text:list-item>
                <text:p text:style-name="P6"><text:span text:style-name="T2">Conséquence : </text:span><text:span text:style-name="T3">si bien que / de sorte que</text:span><text:span text:style-name="T2"> + indicatif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Le CECRL</text:span><text:span text:style-name="T2"> (Conseil de l’Europe, 2001)</text:span></text:p>
            <text:list text:style-name="L3">
              <text:list-item>
                <text:p text:style-name="P3"><text:span text:style-name="T2">Une échelle commune : A1 → C2</text:span></text:p>
              </text:list-item>
              <text:list-item>
                <text:p text:style-name="P3"><text:span text:style-name="T2">Situer ses compétences partout en Europe</text:span></text:p>
              </text:list-item>
              <text:list-item>
                <text:p text:style-name="P3"><text:span text:style-name="T2">Faire son bilan = se demander « où j’en suis, vers quel niveau ? »</text:span></text:p>
              </text:list-item>
              <text:list-item>
                <text:p text:style-name="P3"><text:span text:style-name="T3">(D’après Wikipédia, 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de la lettre</text:span></text:p>
              </text:list-item>
              <text:list-item>
                <text:p text:style-name="P6"><text:span text:style-name="T2">Ex. 2 — Connecteurs à compléter</text:span></text:p>
              </text:list-item>
              <text:list-item>
                <text:p text:style-name="P6"><text:span text:style-name="T2">Ex. 3 — Trois temps à conjuguer</text:span></text:p>
              </text:list-item>
              <text:list-item>
                <text:p text:style-name="P6"><text:span text:style-name="T2">Ex. 4 — Mini-bilan guidé (3 phrases)</text:span></text:p>
              </text:list-item>
            </text:list>
            <text:p text:style-name="P3"><text:span text:style-name="T2">Différenciation :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Écrit :</text:span><text:span text:style-name="T2"> lettre à mon moi de 13e (~180 mots)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4 axes · 6 connecteurs · 3 temps · 1 phrase forte</text:span></text:p>
                  </text:list-item>
                </text:list>
              </text:list-item>
              <text:list-item>
                <text:p text:style-name="P6"><text:span text:style-name="T4">Oral :</text:span><text:span text:style-name="T2"> bilan en continu (~2 min), sans lire</text:span></text:p>
              </text:list-item>
            </text:list>
            <text:p text:style-name="P3"><text:span text:style-name="T2">Critères : contenu · langue · structure · débit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Bilan en 4 axes ?</text:span></text:p>
              </text:list-item>
              <text:list-item>
                <text:p text:style-name="P6"><text:span text:style-name="T2">3 objectifs pour le cycle terminal ?</text:span></text:p>
              </text:list-item>
              <text:list-item>
                <text:p text:style-name="P6"><text:span text:style-name="T2">Trois temps maîtrisés ?</text:span></text:p>
              </text:list-item>
              <text:list-item>
                <text:p text:style-name="P6"><text:span text:style-name="T2">Six connecteurs employés ?</text:span></text:p>
              </text:list-item>
              <text:list-item>
                <text:p text:style-name="P6"><text:span text:style-name="T2">Monologue sans lectur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— 30 poin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— 30 poin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éhension écrite — 8 P.</text:span></text:p>
              </text:list-item>
              <text:list-item>
                <text:p text:style-name="P6"><text:span text:style-name="T2">Langue (temps + connecteurs) — 7 P.</text:span></text:p>
              </text:list-item>
              <text:list-item>
                <text:p text:style-name="P6"><text:span text:style-name="T2">Expression écrite — 8 P.</text:span></text:p>
              </text:list-item>
              <text:list-item>
                <text:p text:style-name="P6"><text:span text:style-name="T2">Expression orale (monologue) — 7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ECRL — Wikipédia, CC BY-SA 4.0</text:span></text:p>
              </text:list-item>
              <text:list-item>
                <text:p text:style-name="P6"><text:span text:style-name="T2">DELF — Wikipédia, CC BY-SA 4.0</text:span></text:p>
              </text:list-item>
              <text:list-item>
                <text:p text:style-name="P6"><text:span text:style-name="T2">Bildungsplan 2016 Französisch, Baden-Württemberg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6:39</meta:creation-date>
    <dc:date>2026-07-21T16:16:39</dc:date>
    <meta:document-statistic meta:object-count="181"/>
    <meta:generator>LibreOffice/24.2.7.2$Linux_X86_64 LibreOffice_project/420$Build-2</meta:generator>
  </office:meta>
</office:document-meta>
</file>