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3.528cm" fo:margin-right="0cm" fo:margin-top="0.141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11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11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11 · Niveau E</text:span></text:p>
            <text:p text:style-name="P3"><text:span text:style-name="T2">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le bilan de l’année (acquis / lacunes)</text:span></text:p>
              </text:list-item>
              <text:list-item>
                <text:p text:style-name="P6"><text:span text:style-name="T2">Projeter ses priorités au futur simple</text:span></text:p>
              </text:list-item>
              <text:list-item>
                <text:p text:style-name="P6"><text:span text:style-name="T2">Rédiger une note de bilan (~250 mots)</text:span></text:p>
              </text:list-item>
              <text:list-item>
                <text:p text:style-name="P6"><text:span text:style-name="T2">Présenter un monologue de 2 à 3 minutes</text:span></text:p>
              </text:list-item>
              <text:list-item>
                <text:p text:style-name="P6"><text:span text:style-name="T2">Situer son niveau avec le CECR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Salle 214, fin juin.</text:span></text:p>
            <text:p text:style-name="P3"><text:span text:style-name="T4">M. Berger :</text:span><text:span text:style-name="T2"> Si vous deviez résumer l’année en une phrase ? </text:span><text:span text:style-name="T4">Léa :</text:span><text:span text:style-name="T2"> Progrès à l’écrit, mais l’oral me fait peur. </text:span><text:span text:style-name="T4">M. Berger :</text:span><text:span text:style-name="T2"> Un point fort, un point à travailler. Et l’an prochain ? </text:span><text:span text:style-name="T4">Léa :</text:span><text:span text:style-name="T2"> Trois priorités, pour ne pas me dispers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choses que vous savez faire aujourd’hui et pas il y a un an</text:span></text:p>
              </text:list-item>
              <text:list-item>
                <text:p text:style-name="P6"><text:span text:style-name="T2">L’unité qui vous a le plus marqué·e</text:span></text:p>
              </text:list-item>
              <text:list-item>
                <text:p text:style-name="P6"><text:span text:style-name="T2">La compétence où vous êtes le moins à l’aise</text:span></text:p>
              </text:list-item>
              <text:list-item>
                <text:p text:style-name="P6"><text:span text:style-name="T2">Un mot pour l’année termina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un bilan — eine Bilanz ziehen</text:span></text:p>
              </text:list-item>
              <text:list-item>
                <text:p text:style-name="P6"><text:span text:style-name="T2">un acquis — eine erworbene Kompetenz</text:span></text:p>
              </text:list-item>
              <text:list-item>
                <text:p text:style-name="P6"><text:span text:style-name="T2">une lacune — eine Lücke</text:span></text:p>
              </text:list-item>
              <text:list-item>
                <text:p text:style-name="P6"><text:span text:style-name="T2">se fixer un objectif — sich ein Ziel setzen</text:span></text:p>
              </text:list-item>
              <text:list-item>
                <text:p text:style-name="P6"><text:span text:style-name="T2">l’année terminale — das Abschlussjahr</text:span></text:p>
              </text:list-item>
              <text:list-item>
                <text:p text:style-name="P6"><text:span text:style-name="T2">l’épreuve finale — die Abschlussprüfung</text:span></text:p>
              </text:list-item>
              <text:list-item>
                <text:p text:style-name="P6"><text:span text:style-name="T2">progresser · approfondi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futur simp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futur simp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finitif + </text:span><text:span text:style-name="T3">-ai, -as, -a, -ons, -ez, -ont</text:span></text:p>
            <text:p text:style-name="P3"><text:span text:style-name="T3">travailler → je travaillerai · finir → je finirai</text:span></text:p>
            <text:p text:style-name="P3"><text:span text:style-name="T2">Irréguliers : </text:span><text:span text:style-name="T3">serai, aurai, ferai, irai, pourrai, devrai, voudrai</text:span></text:p>
            <text:p text:style-name="P3"><text:span text:style-name="T2">Nuance : </text:span><text:span text:style-name="T3">je voudrais</text:span><text:span text:style-name="T2"> (souhait) ≠ </text:span><text:span text:style-name="T3">je réviserai</text:span><text:span text:style-name="T2"> (résolution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le bilan de Léa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le bilan de Léa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7"><text:span text:style-name="T5">Progrès nets à l’écrit ; la médiation est un acquis. À l’oral, je perds mes moyens : mon point à travailler.</text:span></text:p>
            <text:p text:style-name="P7"><text:span text:style-name="T5">Pour la terminale : je m’entraînerai chaque jour, j’approfondirai ma culture littéraire, je réviserai la grammaire.</text:span></text:p>
            <text:p text:style-name="P7"><text:span text:style-name="T5">Objectif : un B2 solide, viser le C1 en compréhension écri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CECR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CECR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ublié en 2001 par le Conseil de l’Europe</text:span></text:p>
              </text:list-item>
              <text:list-item>
                <text:p text:style-name="P6"><text:span text:style-name="T2">Six niveaux : A1, A2, B1, B2, C1, C2</text:span></text:p>
              </text:list-item>
              <text:list-item>
                <text:p text:style-name="P6"><text:span text:style-name="T2">Trois groupes : élémentaire / indépendant / expérimenté</text:span></text:p>
              </text:list-item>
              <text:list-item>
                <text:p text:style-name="P6"><text:span text:style-name="T2">Grille d’auto-évaluation, cinq activités langagières</text:span></text:p>
              </text:list-item>
            </text:list>
            <text:p text:style-name="P3"><text:span text:style-name="T3">(Paraphrasé 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du texte (G)</text:span></text:p>
              </text:list-item>
              <text:list-item>
                <text:p text:style-name="P6"><text:span text:style-name="T2">Le futur simple (M)</text:span></text:p>
              </text:list-item>
              <text:list-item>
                <text:p text:style-name="P6"><text:span text:style-name="T2">Vocabulaire du bilan (M)</text:span></text:p>
              </text:list-item>
              <text:list-item>
                <text:p text:style-name="P6"><text:span text:style-name="T2">Trois priorités au futur (E)</text:span></text:p>
              </text:list-item>
            </text:list>
            <text:p text:style-name="P3"><text:span text:style-name="T3">Solutions au dos de la fich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érenc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fférenc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G :</text:span><text:span text:style-name="T2"> surligner les réponses dans le texte ; amorces de phrases</text:span></text:p>
              </text:list-item>
              <text:list-item>
                <text:p text:style-name="P6"><text:span text:style-name="T4">M :</text:span><text:span text:style-name="T2"> mémo des terminaisons du futur</text:span></text:p>
              </text:list-item>
              <text:list-item>
                <text:p text:style-name="P6"><text:span text:style-name="T4">E :</text:span><text:span text:style-name="T2"> un verbe irrégulier + un connecteur + une justific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monolo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monolo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Mon bilan de 11e et mes trois priorités »</text:span></text:p>
            <text:p text:style-name="P3"><text:span text:style-name="T2">2 à 3 minutes : deux acquis + une lacune · trois priorités au futur · un objectif chiffré</text:span></text:p>
            <text:p text:style-name="P3"><text:span text:style-name="T2">Critères : contenu · structure · langue · aisanc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Acquis / lacunes distingués</text:span></text:p>
              </text:list-item>
              <text:list-item>
                <text:p text:style-name="P6"><text:span text:style-name="T2">☐ </text:span><text:span text:style-name="T2">Futur simple correct</text:span></text:p>
              </text:list-item>
              <text:list-item>
                <text:p text:style-name="P6"><text:span text:style-name="T2">☐ </text:span><text:span text:style-name="T2">Trois priorités concrètes</text:span></text:p>
              </text:list-item>
              <text:list-item>
                <text:p text:style-name="P6"><text:span text:style-name="T2">☐ </text:span><text:span text:style-name="T2">Niveau CECRL situé</text:span></text:p>
              </text:list-item>
              <text:list-item>
                <text:p text:style-name="P6"><text:span text:style-name="T2">☐ </text:span><text:span text:style-name="T2">Deux à trois minutes en contin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Tâche 1 — Écrit (20 P.) :</text:span><text:span text:style-name="T2"> note de bilan ~250 mots</text:span></text:p>
              </text:list-item>
              <text:list-item>
                <text:p text:style-name="P6"><text:span text:style-name="T4">Tâche 2 — Oral monologique (10 P.) :</text:span><text:span text:style-name="T2"> trois priorités justifiées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, CC BY-SA 4.0</text:span></text:p>
              </text:list-item>
              <text:list-item>
                <text:p text:style-name="P6"><text:span text:style-name="T2">Conseil de l’Europe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29:55</meta:creation-date>
    <dc:date>2026-07-21T16:29:55</dc:date>
    <meta:document-statistic meta:object-count="189"/>
    <meta:generator>LibreOffice/24.2.7.2$Linux_X86_64 LibreOffice_project/420$Build-2</meta:generator>
  </office:meta>
</office:document-meta>
</file>