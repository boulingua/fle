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ité 12 — Bilan : fin de la Mittlere Reif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Unité 12 — Bilan : fin de la Mittlere Reif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Parcours G+M · classe 10 · Niveau M Modèle : Activer → Apporter → S’entraîner → Produire → Réfléc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bjectifs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resser le bilan de mon parcours (CECRL, B1)</text:span></text:p>
              </text:list-item>
              <text:list-item>
                <text:p text:style-name="P6"><text:span text:style-name="T2">Présenter un monologue de bilan (~3 min)</text:span></text:p>
              </text:list-item>
              <text:list-item>
                <text:p text:style-name="P6"><text:span text:style-name="T2">Rédiger un texte de bilan (~250 mots)</text:span></text:p>
              </text:list-item>
              <text:list-item>
                <text:p text:style-name="P6"><text:span text:style-name="T2">Appliquer des stratégies d’examen</text:span></text:p>
              </text:list-item>
              <text:list-item>
                <text:p text:style-name="P6"><text:span text:style-name="T2">M’auto-évaluer et fixer un objectif pour la 11ᵉ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 de départ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tuation de départ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Devant la salle d’examen : - Yanis : « À l’oral, ma tête se vide. » - Fatou : « On prépare un plan : trois parties, des connecteurs, deux exemples. » - Question : Yanis ou Fatou, à qui ressemblez-vous 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Activ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1. Activ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Les cinq compétences : écouter, lire, parler en continu, dialoguer, écrire</text:span></text:p>
              </text:list-item>
              <text:list-item>
                <text:p text:style-name="P6"><text:span text:style-name="T2">Votre point le plus fort ? Le plus fragile ?</text:span></text:p>
              </text:list-item>
              <text:list-item>
                <text:p text:style-name="P6"><text:span text:style-name="T2">Trois stratégies qui vous aident</text:span></text:p>
              </text:list-item>
              <text:list-item>
                <text:p text:style-name="P6"><text:span text:style-name="T2">En un mot : le français, c’est…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Vocabula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Vocabula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dresser un bilan — eine Bilanz ziehen</text:span></text:p>
              </text:list-item>
              <text:list-item>
                <text:p text:style-name="P6"><text:span text:style-name="T2">une épreuve — die Prüfung</text:span></text:p>
              </text:list-item>
              <text:list-item>
                <text:p text:style-name="P6"><text:span text:style-name="T2">gérer son temps — die Zeit einteilen</text:span></text:p>
              </text:list-item>
              <text:list-item>
                <text:p text:style-name="P6"><text:span text:style-name="T2">se relire — Korrektur lesen</text:span></text:p>
              </text:list-item>
              <text:list-item>
                <text:p text:style-name="P6"><text:span text:style-name="T2">progresser — Fortschritte machen</text:span></text:p>
              </text:list-item>
              <text:list-item>
                <text:p text:style-name="P6"><text:span text:style-name="T2">poursuivre — fortsetze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Les temps du bila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Les temps du bila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assé : </text:span><text:span text:style-name="T3">En 6ᵉ, je ne comprenais rien ; puis j’ai lu…</text:span></text:p>
              </text:list-item>
              <text:list-item>
                <text:p text:style-name="P6"><text:span text:style-name="T2">Présent : </text:span><text:span text:style-name="T3">Aujourd’hui, je rédige 250 mots.</text:span></text:p>
              </text:list-item>
              <text:list-item>
                <text:p text:style-name="P6"><text:span text:style-name="T2">Futur : </text:span><text:span text:style-name="T3">L’an prochain, je passerai le DELF B1.</text:span></text:p>
              </text:list-item>
              <text:list-item>
                <text:p text:style-name="P6"><text:span text:style-name="T2">Connecteurs : d’abord · ensuite · en revanche · pour conclu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Apporter — Note culturel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2. Apporter — Note culturel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CECRL (Conseil de l’Europe, 2001) : six niveaux, A1 à C2</text:span></text:p>
              </text:list-item>
              <text:list-item>
                <text:p text:style-name="P6"><text:span text:style-name="T2">B1 = « niveau seuil », utilisateur indépendant</text:span></text:p>
              </text:list-item>
              <text:list-item>
                <text:p text:style-name="P6"><text:span text:style-name="T2">DELF B1 : quatre épreuves sur 25 pts chacune ; 50/100 pour réussir</text:span></text:p>
              </text:list-item>
              <text:list-item>
                <text:p text:style-name="P6"><text:span text:style-name="T2">Source : Wikipédia, CC-BY-SA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S’entraîne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3. S’entraîne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Ex. 1 — Compréhension du texte « Ma méthode pour l’oral »</text:span></text:p>
              </text:list-item>
              <text:list-item>
                <text:p text:style-name="P6"><text:span text:style-name="T2">Ex. 2 — Les temps du bilan</text:span></text:p>
              </text:list-item>
              <text:list-item>
                <text:p text:style-name="P6"><text:span text:style-name="T2">Ex. 3 — Connecteurs</text:span></text:p>
              </text:list-item>
              <text:list-item>
                <text:p text:style-name="P6"><text:span text:style-name="T2">Ex. 4 — Stratégies d’examen (appariement)</text:span></text:p>
              </text:list-item>
              <text:list-item>
                <text:p text:style-name="P6"><text:span text:style-name="T2">Différenciation G / M / 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roduir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4. Produir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Monologue de bilan (~3 min) - Plan : d’où je pars · où j’en suis · où je veux aller - 4 connecteurs, 2 exemples concrets - Critères : structure · cohérence · contenu · langue · fluidité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Réfléchir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5. Réfléchir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oints forts et faibles</text:span></text:p>
              </text:list-item>
              <text:list-item>
                <text:p text:style-name="P6"><text:span text:style-name="T2">Monologue en trois parties</text:span></text:p>
              </text:list-item>
              <text:list-item>
                <text:p text:style-name="P6"><text:span text:style-name="T2">Trois temps du bilan</text:span></text:p>
              </text:list-item>
              <text:list-item>
                <text:p text:style-name="P6"><text:span text:style-name="T2">Trois stratégies d’examen</text:span></text:p>
              </text:list-item>
              <text:list-item>
                <text:p text:style-name="P6"><text:span text:style-name="T2">Un objectif pour la 11ᵉ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Évaluation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6"><text:span text:style-name="T2">Partie A — Oral : monologue de bilan (12 P.)</text:span></text:p>
              </text:list-item>
              <text:list-item>
                <text:p text:style-name="P6"><text:span text:style-name="T2">Partie B — Écrit : lettre de bilan ~250 mots (18 P.)</text:span></text:p>
              </text:list-item>
              <text:list-item>
                <text:p text:style-name="P6"><text:span text:style-name="T2">Total : 30 P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7-21T15:46:52</meta:creation-date>
    <dc:date>2026-07-21T15:46:52</dc:date>
    <meta:document-statistic meta:object-count="177"/>
    <meta:generator>LibreOffice/24.2.7.2$Linux_X86_64 LibreOffice_project/420$Build-2</meta:generator>
  </office:meta>
</office:document-meta>
</file>