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fin de la Sekundarstufe 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fin de la Sekundarstufe 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0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le bilan de mes cinq années de français</text:span></text:p>
              </text:list-item>
              <text:list-item>
                <text:p text:style-name="P6"><text:span text:style-name="T2">Présenter mon parcours en quatre domaines</text:span></text:p>
              </text:list-item>
              <text:list-item>
                <text:p text:style-name="P6"><text:span text:style-name="T2">Situer mon niveau sur l’échelle du CECRL</text:span></text:p>
              </text:list-item>
              <text:list-item>
                <text:p text:style-name="P6"><text:span text:style-name="T2">Rédiger un CV scolaire francophone (~200 mots)</text:span></text:p>
              </text:list-item>
              <text:list-item>
                <text:p text:style-name="P6"><text:span text:style-name="T2">Me fixer des objectifs pour le cycle termin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in juin, classe 10 E. Mme Lefèvre : « Avant de vous quitter, faites votre bilan. » Anouk : « En 6e, je comptais jusqu’à vingt ; aujourd’hui, j’ai lu un roman. » Nils : « Avant, je bloquais sur chaque mot ; maintenant, je comprends l’essentiel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otre unité préférée de la Sek. I ?</text:span></text:p>
              </text:list-item>
              <text:list-item>
                <text:p text:style-name="P6"><text:span text:style-name="T2">Votre domaine le plus à l’aise ?</text:span></text:p>
              </text:list-item>
              <text:list-item>
                <text:p text:style-name="P6"><text:span text:style-name="T2">Un acquis dont vous êtes fier·ère ?</text:span></text:p>
              </text:list-item>
              <text:list-item>
                <text:p text:style-name="P6"><text:span text:style-name="T2">Que voulez-vous encore améliore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un bilan — eine Bilanz ziehen</text:span></text:p>
              </text:list-item>
              <text:list-item>
                <text:p text:style-name="P6"><text:span text:style-name="T2">faire des progrès — Fortschritte machen</text:span></text:p>
              </text:list-item>
              <text:list-item>
                <text:p text:style-name="P6"><text:span text:style-name="T2">un point fort / faible — eine Stärke / Schwäche</text:span></text:p>
              </text:list-item>
              <text:list-item>
                <text:p text:style-name="P6"><text:span text:style-name="T2">se fixer un objectif — sich ein Ziel setzen</text:span></text:p>
              </text:list-item>
              <text:list-item>
                <text:p text:style-name="P6"><text:span text:style-name="T2">l’autoévaluation — die Selbsteinschätzung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conter son parcours : - Passé composé : j’ai lu, j’ai appris à… - Imparfait : au début, je ne comprenais rien - Connecteurs : au début / puis / ensuite / aujourd’hui / désormais</text:span></text:p>
            <text:p text:style-name="P3"><text:span text:style-name="T2">« Au début je bloquais ; puis j’ai appris ; aujourd’hui je lis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monologue-bilan de Nil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monologue-bilan de Nil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début, en 6e, je confondais </text:span><text:span text:style-name="T3">le</text:span><text:span text:style-name="T2"> et </text:span><text:span text:style-name="T3">la</text:span><text:span text:style-name="T2">. Puis, en 8e, j’ai compris une BD entière. Ensuite, en 9e, j’ai osé faire un exposé. Aujourd’hui : point fort = la lecture ; point faible = la grammaire. Objectif : parler plus spontanémen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CECR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CECR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ublié par le Conseil de l’Europe en 2001</text:span></text:p>
              </text:list-item>
              <text:list-item>
                <text:p text:style-name="P6"><text:span text:style-name="T2">Six niveaux, trois groupes : A (élémentaire), B (indépendant), C (expérimenté)</text:span></text:p>
              </text:list-item>
              <text:list-item>
                <text:p text:style-name="P6"><text:span text:style-name="T2">Descripteurs « je peux… » → autoévaluation</text:span></text:p>
              </text:list-item>
              <text:list-item>
                <text:p text:style-name="P6"><text:span text:style-name="T2">Référence commune en Europe (d’après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passé composé / imparfait</text:span></text:p>
              </text:list-item>
              <text:list-item>
                <text:p text:style-name="P6"><text:span text:style-name="T2">Ex. 3 : niveaux du CECRL</text:span></text:p>
              </text:list-item>
              <text:list-item>
                <text:p text:style-name="P6"><text:span text:style-name="T2">Ex. 4 : vocabulaire du bilan 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monologue-bila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monologue-bila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1 à 2 minutes : 1. Le passé (imparfait) 2. Le chemin (passé composé + connecteurs) 3. Le présent (point fort / faible) 4. La suite (un objectif) Fiche de notes autorisée, texte lu interdi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relie passé et présent</text:span></text:p>
              </text:list-item>
              <text:list-item>
                <text:p text:style-name="P6"><text:span text:style-name="T2">Je nomme un point fort et un point faible</text:span></text:p>
              </text:list-item>
              <text:list-item>
                <text:p text:style-name="P6"><text:span text:style-name="T2">Je situe mon niveau CECRL</text:span></text:p>
              </text:list-item>
              <text:list-item>
                <text:p text:style-name="P6"><text:span text:style-name="T2">Je me fixe un objectif pour la Kursstufe</text:span></text:p>
              </text:list-item>
              <text:list-item>
                <text:p text:style-name="P6"><text:span text:style-name="T2">Je tiens un monologue d’une minute sans l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rtie A — monologue-bilan (15 P.)</text:span></text:p>
              </text:list-item>
              <text:list-item>
                <text:p text:style-name="P6"><text:span text:style-name="T2">Partie B — CV scolaire ~200 mots (15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, CC BY-SA 4.0</text:span></text:p>
              </text:list-item>
              <text:list-item>
                <text:p text:style-name="P6"><text:span text:style-name="T2">Portfolio européen des langues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59</meta:creation-date>
    <dc:date>2026-07-21T16:28:59</dc:date>
    <meta:document-statistic meta:object-count="185"/>
    <meta:generator>LibreOffice/24.2.7.2$Linux_X86_64 LibreOffice_project/420$Build-2</meta:generator>
  </office:meta>
</office:document-meta>
</file>