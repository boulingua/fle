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fin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fin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preuve finale en vue : recap, checklist, confiance.</text:span></text:p>
            <text:p text:style-name="P3"><text:span text:style-name="T2">Parcours E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le bilan de mes acquis et situer mon niveau.</text:span></text:p>
              </text:list-item>
              <text:list-item>
                <text:p text:style-name="P6"><text:span text:style-name="T2">Présenter oralement, en continu, mon parcours (2-3 min).</text:span></text:p>
              </text:list-item>
              <text:list-item>
                <text:p text:style-name="P6"><text:span text:style-name="T2">Rédiger un texte structuré avec des connecteurs.</text:span></text:p>
              </text:list-item>
              <text:list-item>
                <text:p text:style-name="P6"><text:span text:style-name="T2">Relire et corriger avec une grille.</text:span></text:p>
              </text:list-item>
              <text:list-item>
                <text:p text:style-name="P6"><text:span text:style-name="T2">Aborder l’épreuve avec méthode et confianc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rnière séance avant l’épreuve.</text:span></text:p>
            <text:p text:style-name="P3"><text:span text:style-name="T2">M. Rivière : « Avant l’épreuve, faites le point : ce que vous savez faire, ce qui reste fragile, et comment employer les jours qui viennent. »</text:span></text:p>
            <text:p text:style-name="P3"><text:span text:style-name="T2">Léa : « Et si on a l’impression d’avoir tout oublié ? »</text:span></text:p>
            <text:p text:style-name="P3"><text:span text:style-name="T2">« C’est le rôle d’un bilan : transformer cette impression en une liste concrèt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stez en 60 s tout ce que vous savez faire en français.</text:span></text:p>
              </text:list-item>
              <text:list-item>
                <text:p text:style-name="P6"><text:span text:style-name="T2">Classez : « acquis » / « à consolider » / « fragile ».</text:span></text:p>
              </text:list-item>
              <text:list-item>
                <text:p text:style-name="P6"><text:span text:style-name="T2">Comparez avec un·e voisin·e : où vous entraider ?</text:span></text:p>
              </text:list-item>
              <text:list-item>
                <text:p text:style-name="P6"><text:span text:style-name="T2">Dites à voix haute : « Je suis capable de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 · une épreuve · les acquis</text:span></text:p>
              </text:list-item>
              <text:list-item>
                <text:p text:style-name="P6"><text:span text:style-name="T2">une lacune · consolider · la confiance en soi</text:span></text:p>
              </text:list-item>
              <text:list-item>
                <text:p text:style-name="P6"><text:span text:style-name="T2">un point fort / faible · aborder une épreuve</text:span></text:p>
              </text:list-item>
              <text:list-item>
                <text:p text:style-name="P6"><text:span text:style-name="T2">relire et corrig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connecteurs logiqu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connecteurs logiqu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jouter : de plus, en outre, par ailleurs</text:span></text:p>
              </text:list-item>
              <text:list-item>
                <text:p text:style-name="P6"><text:span text:style-name="T2">Illustrer : par exemple, ainsi, notamment</text:span></text:p>
              </text:list-item>
              <text:list-item>
                <text:p text:style-name="P6"><text:span text:style-name="T2">Opposer : cependant, en revanche, néanmoins</text:span></text:p>
              </text:list-item>
              <text:list-item>
                <text:p text:style-name="P6"><text:span text:style-name="T2">Conclure : en somme, pour finir, en définitive</text:span></text:p>
              </text:list-item>
            </text:list>
            <text:p text:style-name="P3"><text:span text:style-name="T2">Un connecteur au début de chaque idée = structure audible et lisib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bilan d’Am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bilan d’Am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En sixième, je disais bonjour et merci. Aujourd’hui, je lis un article sans dictionnaire et je défends un point de vue.</text:span></text:p>
            <text:p text:style-name="P3"><text:span text:style-name="T2">Mon point faible : le subjonctif. En revanche, mon oral s’est beaucoup amélioré.</text:span></text:p>
            <text:p text:style-name="P3"><text:span text:style-name="T2">Mon plan : relire mes fiches, parler deux minutes chaque soir, puis dormir.</text:span></text:p>
            <text:p text:style-name="P3"><text:span text:style-name="T2">Je ne vise pas la perfection. Je vise ma meilleure version, le jour J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Situer son niveau (CECR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Situer son niveau (CECR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laboré par le Conseil de l’Europe, publié en 2001.</text:span></text:p>
              </text:list-item>
              <text:list-item>
                <text:p text:style-name="P6"><text:span text:style-name="T2">Six niveaux : A1-A2, B1-B2, C1-C2.</text:span></text:p>
              </text:list-item>
              <text:list-item>
                <text:p text:style-name="P6"><text:span text:style-name="T2">Décrit ce qu’on SAIT faire, pas ce qu’on ignore.</text:span></text:p>
              </text:list-item>
              <text:list-item>
                <text:p text:style-name="P6"><text:span text:style-name="T2">En fin de lycée, on vise souvent B2, parfois C1.</text:span></text:p>
              </text:list-item>
            </text:list>
            <text:p text:style-name="P3"><text:span text:style-name="T2">Source : Wikipédia, CC BY-SA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Vocabulaire : relier terme et définition.</text:span></text:p>
              </text:list-item>
              <text:list-item>
                <text:p text:style-name="P6"><text:span text:style-name="T2">Connecteurs : compléter les phrases.</text:span></text:p>
              </text:list-item>
              <text:list-item>
                <text:p text:style-name="P6"><text:span text:style-name="T2">Transformer en bilan positif.</text:span></text:p>
              </text:list-item>
              <text:list-item>
                <text:p text:style-name="P6"><text:span text:style-name="T2">Mini-monologue guidé (5 étapes).</text:span></text:p>
              </text:list-item>
            </text:list>
            <text:p text:style-name="P3"><text:span text:style-name="T2">Différenciation G / M / 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choix (Niveau E) :</text:span></text:p>
            <text:list text:style-name="L3">
              <text:list-item>
                <text:p text:style-name="P3"><text:span text:style-name="T3">Oral (2-3 min)</text:span><text:span text:style-name="T2"> : bilan personnel, un exemple par compétence.</text:span></text:p>
              </text:list-item>
              <text:list-item>
                <text:p text:style-name="P3"><text:span text:style-name="T3">Écrit (250-300 mots)</text:span><text:span text:style-name="T2"> : lettre-bilan à votre futur·e vous-même.</text:span></text:p>
              </text:list-item>
            </text:list>
            <text:p text:style-name="P3"><text:span text:style-name="T2">Critères : Contenu /4 · Langue /4 · Cohérence /2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mes points forts avec des exemples.</text:span></text:p>
              </text:list-item>
              <text:list-item>
                <text:p text:style-name="P6"><text:span text:style-name="T2">Situer mon niveau (CECRL).</text:span></text:p>
              </text:list-item>
              <text:list-item>
                <text:p text:style-name="P6"><text:span text:style-name="T2">Parler en continu deux minutes.</text:span></text:p>
              </text:list-item>
              <text:list-item>
                <text:p text:style-name="P6"><text:span text:style-name="T2">Structurer un écrit avec des connecteurs.</text:span></text:p>
              </text:list-item>
              <text:list-item>
                <text:p text:style-name="P6"><text:span text:style-name="T2">Avoir un plan de révision réaliste.</text:span></text:p>
              </text:list-item>
              <text:list-item>
                <text:p text:style-name="P6"><text:span text:style-name="T2">Aborder l’épreuve avec confianc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A — Écrit (18 pts)</text:span><text:span text:style-name="T2"> : bilan structuré en trois parties, 5 connecteurs minimum.</text:span></text:p>
              </text:list-item>
              <text:list-item>
                <text:p text:style-name="P6"><text:span text:style-name="T3">B — Oral en continu (12 pts)</text:span><text:span text:style-name="T2"> : monologue de 2 min, « Qu’est-ce que le français m’a apporté ?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 après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Et après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On n’oublie pas huit ans de travail en une nuit — on les organise.</text:span></text:p>
            <text:p text:style-name="P3"><text:span text:style-name="T2">Bonne chance. Vous êtes prêt·e·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Cadre européen commun de référence pour les langues » — Wikipédia (2026), CC BY-SA 4.0.</text:span></text:p>
              </text:list-item>
              <text:list-item>
                <text:p text:style-name="P6"><text:span text:style-name="T2">« Conseil de l’Europe » — Wikipédia (2026), CC BY-SA 4.0.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1:10</meta:creation-date>
    <dc:date>2026-07-21T16:31:10</dc:date>
    <meta:document-statistic meta:object-count="189"/>
    <meta:generator>LibreOffice/24.2.7.2$Linux_X86_64 LibreOffice_project/420$Build-2</meta:generator>
  </office:meta>
</office:document-meta>
</file>