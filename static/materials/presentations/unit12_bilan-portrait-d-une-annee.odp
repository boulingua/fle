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7.62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italic" style:text-underline-style="none" fo:font-weight="normal" fo:background-color="transparent" style:font-size-asian="13.5pt" style:font-style-asian="italic" style:font-weight-asian="normal" style:font-size-complex="13.5pt" style:font-style-complex="italic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portrait d’une ann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portrait d’une ann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aconter mon année de 7e au passé composé (oral en continu)</text:span></text:p>
              </text:list-item>
              <text:list-item>
                <text:p text:style-name="P6"><text:span text:style-name="T2">Mobiliser trois temps : présent, passé composé, futur proche</text:span></text:p>
              </text:list-item>
              <text:list-item>
                <text:p text:style-name="P6"><text:span text:style-name="T2">Relier mes idées avec des connecteurs</text:span></text:p>
              </text:list-item>
              <text:list-item>
                <text:p text:style-name="P6"><text:span text:style-name="T2">Rédiger un portrait personnel d’environ 100 mots</text:span></text:p>
              </text:list-item>
              <text:list-item>
                <text:p text:style-name="P6"><text:span text:style-name="T2">M’auto-évaluer et me fixer un objectif pour la 8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in juin, salle 214. Mme Renault distribue une feuille verte.</text:span></text:p>
            <text:p text:style-name="P3"><text:span text:style-name="T2">« Aujourd’hui, pas de nouvelle leçon. On fait le </text:span><text:span text:style-name="T3">bilan</text:span><text:span text:style-name="T2"> de l’année. »</text:span></text:p>
            <text:list text:style-name="L3">
              <text:list-item>
                <text:p text:style-name="P3"><text:span text:style-name="T2">Léa : « J’ai appris le passé composé, j’ai découvert le Québec… »</text:span></text:p>
              </text:list-item>
              <text:list-item>
                <text:p text:style-name="P3"><text:span text:style-name="T2">Karim : « Au début, je ne savais rien dire. Maintenant, je peux raconter mon week-end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le unité avez-vous préférée ? Pourquoi ?</text:span></text:p>
              </text:list-item>
              <text:list-item>
                <text:p text:style-name="P6"><text:span text:style-name="T2">Dans quel domaine avez-vous le plus progressé ?</text:span></text:p>
              </text:list-item>
              <text:list-item>
                <text:p text:style-name="P6"><text:span text:style-name="T2">Que voulez-vous améliorer en 8e ?</text:span></text:p>
              </text:list-item>
            </text:list>
            <text:p text:style-name="P3"><text:span text:style-name="T3">Nuage de mots :</text:span><text:span text:style-name="T2"> un mot qui résume mon anné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bilan · un progrès / progresser</text:span></text:p>
              </text:list-item>
              <text:list-item>
                <text:p text:style-name="P6"><text:span text:style-name="T2">apprendre (appris) · découvrir (découvert) · réussir (réussi)</text:span></text:p>
              </text:list-item>
              <text:list-item>
                <text:p text:style-name="P6"><text:span text:style-name="T2">une difficulté · s’améliorer · avoir confiance</text:span></text:p>
              </text:list-item>
              <text:list-item>
                <text:p text:style-name="P6"><text:span text:style-name="T2">au début / à la fin · l’an procha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trois temp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trois temps</text:span></text:p>
          </draw:text-box>
        </draw:frame>
        <draw:frame draw:name="Content Placeholder 5" draw:style-name="gr2" draw:layer="layout" svg:width="22.859cm" svg:height="3.339cm" svg:x="1.27cm" svg:y="3.31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Temps</text:span></text:p>
              </table:table-cell>
              <table:table-cell>
                <text:p text:style-name="P7"><text:span text:style-name="T4">Emploi</text:span></text:p>
              </table:table-cell>
              <table:table-cell>
                <text:p text:style-name="P7"><text:span text:style-name="T4">Exempl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présent</text:span></text:p>
              </table:table-cell>
              <table:table-cell>
                <text:p text:style-name="P7"><text:span text:style-name="T5">vrai maintenant</text:span></text:p>
              </table:table-cell>
              <table:table-cell>
                <text:p text:style-name="P7"><text:span text:style-name="T6">Je parle français.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passé composé</text:span></text:p>
              </table:table-cell>
              <table:table-cell>
                <text:p text:style-name="P7"><text:span text:style-name="T5">action terminée</text:span></text:p>
              </table:table-cell>
              <table:table-cell>
                <text:p text:style-name="P7"><text:span text:style-name="T6">J’ai appris le passé composé.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futur proche</text:span></text:p>
              </table:table-cell>
              <table:table-cell>
                <text:p text:style-name="P7"><text:span text:style-name="T5">un projet</text:span></text:p>
              </table:table-cell>
              <table:table-cell>
                <text:p text:style-name="P7"><text:span text:style-name="T6">Je vais continuer en 8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vec </text:span><text:span text:style-name="T7">être</text:span><text:span text:style-name="T2"> : le participe s’accorde (</text:span><text:span text:style-name="T7">Je suis devenue…</text:span><text:span text:style-name="T2">)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ortrait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ortrait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Au début</text:span><text:span text:style-name="T2"> : à peine 50 mots, elle n’ose pas parler.</text:span></text:p>
              </text:list-item>
              <text:list-item>
                <text:p text:style-name="P6"><text:span text:style-name="T3">Ensuite</text:span><text:span text:style-name="T2"> : elle prend confiance ; leçon préférée = le passé composé.</text:span></text:p>
              </text:list-item>
              <text:list-item>
                <text:p text:style-name="P6"><text:span text:style-name="T3">Aujourd’hui</text:span><text:span text:style-name="T2"> : plus de 300 mots, elle participe sans peur.</text:span></text:p>
              </text:list-item>
              <text:list-item>
                <text:p text:style-name="P6"><text:span text:style-name="T3">L’an prochain</text:span><text:span text:style-name="T2"> : lire un roman, écrire à Inès (Montréal)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e CECRL</text:span><text:span text:style-name="T2"> (Conseil de l’Europe, 2001) : six niveaux, de A1 à C2.</text:span></text:p>
            <text:p text:style-name="P3"><text:span text:style-name="T2">Une </text:span><text:span text:style-name="T3">grille d’auto-évaluation</text:span><text:span text:style-name="T2"> faite de phrases « Je peux… ».</text:span></text:p>
            <text:p text:style-name="P3"><text:span text:style-name="T2">En fin de 7e : niveau A1. Faire son bilan = remplir cette grille.</text:span></text:p>
            <text:p text:style-name="P3"><text:span text:style-name="T7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x. 1</text:span><text:span text:style-name="T2"> Compréhension du texte (5 questions)</text:span></text:p>
              </text:list-item>
              <text:list-item>
                <text:p text:style-name="P6"><text:span text:style-name="T3">Ex. 2</text:span><text:span text:style-name="T2"> Identifier le temps (5 phrases)</text:span></text:p>
              </text:list-item>
              <text:list-item>
                <text:p text:style-name="P6"><text:span text:style-name="T3">Ex. 3</text:span><text:span text:style-name="T2"> Connecteurs (au début / ensuite / maintenant / l’an prochain)</text:span></text:p>
              </text:list-item>
              <text:list-item>
                <text:p text:style-name="P6"><text:span text:style-name="T3">Ex. 4</text:span><text:span text:style-name="T2"> Conjugaison aux trois temps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Mon portrait de l’année (~100 mots)</text:span><text:span text:style-name="T2"> — à l’écrit ou à l’oral (en continu)</text:span></text:p>
            <text:list text:style-name="L7">
              <text:list-item>
                <text:p text:style-name="P3"><text:span text:style-name="T2">D’où je pars (au début…)</text:span></text:p>
              </text:list-item>
              <text:list-item>
                <text:p text:style-name="P3"><text:span text:style-name="T2">Ce que j’ai appris / réussi (passé composé)</text:span></text:p>
              </text:list-item>
              <text:list-item>
                <text:p text:style-name="P3"><text:span text:style-name="T2">Ce que je sais faire maintenant (présent)</text:span></text:p>
              </text:list-item>
              <text:list-item>
                <text:p text:style-name="P3"><text:span text:style-name="T2">Ce que je vais faire en 8e (futur proche)</text:span></text:p>
              </text:list-item>
              <text:list-item>
                <text:p text:style-name="P3"><text:span text:style-name="T2">Au moins trois connecteurs</text:span></text:p>
              </text:list-item>
            </text:list>
            <text:p text:style-name="P3"><text:span text:style-name="T2">Critères : contenu /4 · trois temps /4 · connecteurs /2 · langue /2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Présent + passé composé + futur proche</text:span></text:p>
              </text:list-item>
              <text:list-item>
                <text:p text:style-name="P6"><text:span text:style-name="T2">☐ </text:span><text:span text:style-name="T2">Au moins trois connecteurs</text:span></text:p>
              </text:list-item>
              <text:list-item>
                <text:p text:style-name="P6"><text:span text:style-name="T2">☐ </text:span><text:span text:style-name="T2">Portrait d’environ 100 mots</text:span></text:p>
              </text:list-item>
              <text:list-item>
                <text:p text:style-name="P6"><text:span text:style-name="T2">☐ </text:span><text:span text:style-name="T2">Présentation orale en continu</text:span></text:p>
              </text:list-item>
              <text:list-item>
                <text:p text:style-name="P6"><text:span text:style-name="T2">☐ </text:span><text:span text:style-name="T2">Un progrès + un objectif pour la 8e</text:span></text:p>
              </text:list-item>
            </text:list>
            <text:p text:style-name="P3"><text:span text:style-name="T3">Mon objectif pour la 8e : …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âche 1</text:span><text:span text:style-name="T2"> — Compréhension écrite : 8 P.</text:span></text:p>
              </text:list-item>
              <text:list-item>
                <text:p text:style-name="P6"><text:span text:style-name="T3">Tâche 2</text:span><text:span text:style-name="T2"> — Grammaire (5 verbes, 3 temps) : 10 P.</text:span></text:p>
              </text:list-item>
              <text:list-item>
                <text:p text:style-name="P6"><text:span text:style-name="T3">Tâche 3</text:span><text:span text:style-name="T2"> — Expression écrite (portrait ~100 mots) :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 (CC BY-SA 4.0)</text:span></text:p>
              </text:list-item>
              <text:list-item>
                <text:p text:style-name="P6"><text:span text:style-name="T2">Portfolio européen des langues — Wikipédia (CC BY-SA 4.0)</text:span></text:p>
              </text:list-item>
            </text:list>
            <text:p text:style-name="P3"><text:span text:style-name="T2">Plateforme indépendante, sans affiliation officiell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4:13</meta:creation-date>
    <dc:date>2026-07-21T15:44:13</dc:date>
    <meta:document-statistic meta:object-count="188"/>
    <meta:generator>LibreOffice/24.2.7.2$Linux_X86_64 LibreOffice_project/420$Build-2</meta:generator>
  </office:meta>
</office:document-meta>
</file>