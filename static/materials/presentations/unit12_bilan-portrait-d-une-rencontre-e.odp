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Portrait d’une rencont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Portrait d’une rencont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8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diger le portrait écrit d’une rencontre marquante de l’année.</text:span></text:p>
              </text:list-item>
              <text:list-item>
                <text:p text:style-name="P6"><text:span text:style-name="T2">Présenter oralement, en continu, une personne rencontrée.</text:span></text:p>
              </text:list-item>
              <text:list-item>
                <text:p text:style-name="P6"><text:span text:style-name="T2">Combiner passé composé, imparfait et futur simple.</text:span></text:p>
              </text:list-item>
              <text:list-item>
                <text:p text:style-name="P6"><text:span text:style-name="T2">Enchaîner ses idées avec des connecteurs logiques.</text:span></text:p>
              </text:list-item>
              <text:list-item>
                <text:p text:style-name="P6"><text:span text:style-name="T2">Faire le bilan de ses progrès de 8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n juin. Mme Devos : « Choisissez une seule personne et faites son portrait. »</text:span></text:p>
            <text:list text:style-name="L3">
              <text:list-item>
                <text:p text:style-name="P3"><text:span text:style-name="T2">Réelle ou tirée d’un texte, peu importe.</text:span></text:p>
              </text:list-item>
              <text:list-item>
                <text:p text:style-name="P3"><text:span text:style-name="T2">Raconter : qui elle était, ce qu’on a vécu, ce qu’on fera.</text:span></text:p>
              </text:list-item>
            </text:list>
            <text:p text:style-name="P3"><text:span text:style-name="T2">Léo : « Je choisis mon correspondant — on s’écrit depuis septembr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unité de 8e avez-vous préférée ?</text:span></text:p>
              </text:list-item>
              <text:list-item>
                <text:p text:style-name="P6"><text:span text:style-name="T2">Quelle personne vous a le plus marqué·e ?</text:span></text:p>
              </text:list-item>
              <text:list-item>
                <text:p text:style-name="P6"><text:span text:style-name="T2">Que savez-vous faire mieux qu’en 7e ?</text:span></text:p>
              </text:list-item>
              <text:list-item>
                <text:p text:style-name="P6"><text:span text:style-name="T2">Trois mots français appris cette anné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rencontre marquante</text:span></text:p>
              </text:list-item>
              <text:list-item>
                <text:p text:style-name="P6"><text:span text:style-name="T2">un correspondant / une correspondante</text:span></text:p>
              </text:list-item>
              <text:list-item>
                <text:p text:style-name="P6"><text:span text:style-name="T2">faire le portrait de qqn</text:span></text:p>
              </text:list-item>
              <text:list-item>
                <text:p text:style-name="P6"><text:span text:style-name="T2">avoir l’esprit ouvert</text:span></text:p>
              </text:list-item>
              <text:list-item>
                <text:p text:style-name="P6"><text:span text:style-name="T2">au fil des mois</text:span></text:p>
              </text:list-item>
              <text:list-item>
                <text:p text:style-name="P6"><text:span text:style-name="T2">garder le contac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rois temps dans un portrait :</text:span></text:p>
            <text:list text:style-name="L3">
              <text:list-item>
                <text:p text:style-name="P3"><text:span text:style-name="T2">Imparfait = décrire le contexte (</text:span><text:span text:style-name="T3">il avait 13 ans</text:span><text:span text:style-name="T2">).</text:span></text:p>
              </text:list-item>
              <text:list-item>
                <text:p text:style-name="P3"><text:span text:style-name="T2">Passé composé = raconter les actions (</text:span><text:span text:style-name="T3">il est venu</text:span><text:span text:style-name="T2">).</text:span></text:p>
              </text:list-item>
              <text:list-item>
                <text:p text:style-name="P3"><text:span text:style-name="T2">Futur simple = annoncer la suite (</text:span><text:span text:style-name="T3">je partirai</text:span><text:span text:style-name="T2">).</text:span></text:p>
              </text:list-item>
            </text:list>
            <text:p text:style-name="P3"><text:span text:style-name="T2">Connecteurs : d’abord · ensuite · puis · cependant · grâce à · enfi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: le portrait de Karim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: le portrait de Karim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ncontre par lettre (PC + imparfait).</text:span></text:p>
              </text:list-item>
              <text:list-item>
                <text:p text:style-name="P6"><text:span text:style-name="T2">Visite en février : collège, vélo le long du Rhin (PC).</text:span></text:p>
              </text:list-item>
              <text:list-item>
                <text:p text:style-name="P6"><text:span text:style-name="T2">Projet : partir à Lille au printemps (futur simple).</text:span></text:p>
              </text:list-item>
              <text:list-item>
                <text:p text:style-name="P6"><text:span text:style-name="T2">Phrase-bilan : « Cette rencontre m’a ouvert l’esprit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 : la Vieille Bourse de L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 : la Vieille Bourse de L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struite vers 1652-1653, Renaissance flamande.</text:span></text:p>
              </text:list-item>
              <text:list-item>
                <text:p text:style-name="P6"><text:span text:style-name="T2">Façades ornées de guirlandes de fruits et de pilastres.</text:span></text:p>
              </text:list-item>
              <text:list-item>
                <text:p text:style-name="P6"><text:span text:style-name="T2">Ancienne bourse des marchands.</text:span></text:p>
              </text:list-item>
              <text:list-item>
                <text:p text:style-name="P6"><text:span text:style-name="T2">Aujourd’hui : bouquinistes, fleurs, joueurs d’échecs — un lieu de rencontre.</text:span></text:p>
              </text:list-item>
            </text:list>
            <text:p text:style-name="P3"><text:span text:style-name="T2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.</text:span></text:p>
              </text:list-item>
              <text:list-item>
                <text:p text:style-name="P6"><text:span text:style-name="T2">Ex. 2 : les trois temps (conjuguer).</text:span></text:p>
              </text:list-item>
              <text:list-item>
                <text:p text:style-name="P6"><text:span text:style-name="T2">Ex. 3 : connecteurs à compléter.</text:span></text:p>
              </text:list-item>
              <text:list-item>
                <text:p text:style-name="P6"><text:span text:style-name="T2">Ex. 4 : mini-portrait (imparfait + PC + futur).</text:span></text:p>
              </text:list-item>
            </text:list>
            <text:p text:style-name="P3"><text:span text:style-name="T2">Différenciation G / M / 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ortrait d’une rencontre (~150 mots, 3 paragraphes) :</text:span></text:p>
            <text:list text:style-name="L3">
              <text:list-item>
                <text:p text:style-name="P3"><text:span text:style-name="T2">§1 PC + imparfait · §2 PC · §3 futur simple.</text:span></text:p>
              </text:list-item>
              <text:list-item>
                <text:p text:style-name="P3"><text:span text:style-name="T2">6 connecteurs + phrase-bilan.</text:span></text:p>
              </text:list-item>
            </text:list>
            <text:p text:style-name="P3"><text:span text:style-name="T2">Variante orale : monologue 1-2 min à partir de trois mots-clé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utilise PC, imparfait et futur simple ensemble.</text:span></text:p>
              </text:list-item>
              <text:list-item>
                <text:p text:style-name="P6"><text:span text:style-name="T2">J’enchaîne avec six connecteurs.</text:span></text:p>
              </text:list-item>
              <text:list-item>
                <text:p text:style-name="P6"><text:span text:style-name="T2">Je rédige un portrait de 150 mots.</text:span></text:p>
              </text:list-item>
              <text:list-item>
                <text:p text:style-name="P6"><text:span text:style-name="T2">Je le présente aussi à l’oral, en continu.</text:span></text:p>
              </text:list-item>
              <text:list-item>
                <text:p text:style-name="P6"><text:span text:style-name="T2">Je mesure mes progrès depuis la 7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(Klassenarbeit) — 30 points</text:span></text:p>
            <text:list text:style-name="L3">
              <text:list-item>
                <text:p text:style-name="P3"><text:span text:style-name="T2">Tâche 1 — Expression écrite (18 P.) : portrait ~150 mots.</text:span></text:p>
              </text:list-item>
              <text:list-item>
                <text:p text:style-name="P3"><text:span text:style-name="T2">Tâche 2 — Expression orale en continu (12 P.) : monologue 1-2 min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ieille Bourse — Wikipédia (contributeurs), 2026, fr.wikipedia.org/wiki/Vieille_Bourse — CC BY-SA 4.0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34</meta:creation-date>
    <dc:date>2026-07-21T16:11:34</dc:date>
    <meta:document-statistic meta:object-count="185"/>
    <meta:generator>LibreOffice/24.2.7.2$Linux_X86_64 LibreOffice_project/420$Build-2</meta:generator>
  </office:meta>
</office:document-meta>
</file>