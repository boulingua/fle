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portrait d’une rencont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portrait d’une rencont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8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écrire une personne au présent</text:span></text:p>
              </text:list-item>
              <text:list-item>
                <text:p text:style-name="P6"><text:span text:style-name="T2">Raconter une rencontre au passé composé / imparfait</text:span></text:p>
              </text:list-item>
              <text:list-item>
                <text:p text:style-name="P6"><text:span text:style-name="T2">Exprimer un projet au futur simple</text:span></text:p>
              </text:list-item>
              <text:list-item>
                <text:p text:style-name="P6"><text:span text:style-name="T2">Rédiger un portrait structuré (~120 mots)</text:span></text:p>
              </text:list-item>
              <text:list-item>
                <text:p text:style-name="P6"><text:span text:style-name="T2">Présenter à l’oral, en continu, 2 minu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rnière séance avant les vacances.</text:span></text:p>
            <text:p text:style-name="P3"><text:span text:style-name="T2">Mme Renault : « Quel visage revient ? »</text:span></text:p>
            <text:list text:style-name="L3">
              <text:list-item>
                <text:p text:style-name="P3"><text:span text:style-name="T2">Léa → Inès, sa correspondante de Montréal</text:span></text:p>
              </text:list-item>
              <text:list-item>
                <text:p text:style-name="P3"><text:span text:style-name="T2">Karim → une dame âgée devant Notre-Dame</text:span></text:p>
              </text:list-item>
              <text:list-item>
                <text:p text:style-name="P3"><text:span text:style-name="T2">Sandrine → une voix, une chanson de Soolking</text:span></text:p>
              </text:list-item>
            </text:list>
            <text:p text:style-name="P3"><text:span text:style-name="T2">Aujourd’hui : le portrait d’une rencont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rencontres francophones de l’année</text:span></text:p>
              </text:list-item>
              <text:list-item>
                <text:p text:style-name="P6"><text:span text:style-name="T2">Décrivez-en une en une phrase au présent</text:span></text:p>
              </text:list-item>
              <text:list-item>
                <text:p text:style-name="P6"><text:span text:style-name="T2">Que saurez-vous d’elle dans 5 an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rencontre marquante</text:span></text:p>
              </text:list-item>
              <text:list-item>
                <text:p text:style-name="P6"><text:span text:style-name="T2">un·e correspondant·e</text:span></text:p>
              </text:list-item>
              <text:list-item>
                <text:p text:style-name="P6"><text:span text:style-name="T2">dresser le portrait de</text:span></text:p>
              </text:list-item>
              <text:list-item>
                <text:p text:style-name="P6"><text:span text:style-name="T2">par écrit / en personne</text:span></text:p>
              </text:list-item>
              <text:list-item>
                <text:p text:style-name="P6"><text:span text:style-name="T2">ce qu’elle représente pour moi</text:span></text:p>
              </text:list-item>
              <text:list-item>
                <text:p text:style-name="P6"><text:span text:style-name="T2">cela m’a appris que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rois temp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rois temp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résent</text:span><text:span text:style-name="T2"> : qui elle est (elle est, elle vit)</text:span></text:p>
              </text:list-item>
              <text:list-item>
                <text:p text:style-name="P6"><text:span text:style-name="T3">Passé composé</text:span><text:span text:style-name="T2"> : la rencontre (je l’ai rencontrée)</text:span></text:p>
              </text:list-item>
              <text:list-item>
                <text:p text:style-name="P6"><text:span text:style-name="T3">Imparfait</text:span><text:span text:style-name="T2"> : l’arrière-plan (je ne connaissais pas…)</text:span></text:p>
              </text:list-item>
              <text:list-item>
                <text:p text:style-name="P6"><text:span text:style-name="T3">Futur simple</text:span><text:span text:style-name="T2"> : le projet (j’irai, je verrai)</text:span></text:p>
              </text:list-item>
            </text:list>
            <text:p text:style-name="P3"><text:span text:style-name="T2">Piège : </text:span><text:span text:style-name="T4">cela m’a appris que</text:span><text:span text:style-name="T2"> + indicatif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Tremblay, 14 ans, Montréal.</text:span></text:p>
            <text:p text:style-name="P3"><text:span text:style-name="T2">Correspondante depuis octobre · « écœurant » = génial au Québec · matchs d’improvisation.</text:span></text:p>
            <text:p text:style-name="P3"><text:span text:style-name="T2">« Plus tard, j’irai à Montréal. Je verrai le mont Royal sous la neige. Et je rencontrerai Inès, enfin, en personne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impro québécoi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impro québécoi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gue nationale d’improvisation (LNI)</text:span></text:p>
              </text:list-item>
              <text:list-item>
                <text:p text:style-name="P6"><text:span text:style-name="T2">Fondée à Montréal en 1977 (Robert Gravel, Yvon Leduc)</text:span></text:p>
              </text:list-item>
              <text:list-item>
                <text:p text:style-name="P6"><text:span text:style-name="T2">Théâtre présenté comme un match de hockey : équipes, arbitre, patinoire, vote du public</text:span></text:p>
              </text:list-item>
              <text:list-item>
                <text:p text:style-name="P6"><text:span text:style-name="T2">A inspiré des ligues scolaires francophones</text:span></text:p>
              </text:list-item>
            </text:list>
            <text:p text:style-name="P3"><text:span text:style-name="T4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(G) : repérer présent / passé composé / futur</text:span></text:p>
              </text:list-item>
              <text:list-item>
                <text:p text:style-name="P6"><text:span text:style-name="T2">Ex. 2 (G/M) : relier les connecteurs</text:span></text:p>
              </text:list-item>
              <text:list-item>
                <text:p text:style-name="P6"><text:span text:style-name="T2">Ex. 3 (M) : conjuguer au bon temps</text:span></text:p>
              </text:list-item>
              <text:list-item>
                <text:p text:style-name="P6"><text:span text:style-name="T2">Ex. 4 (M/E) : trois phrases de portra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ortrait ~120 mots :</text:span></text:p>
            <text:list text:style-name="L5">
              <text:list-item>
                <text:p text:style-name="P3"><text:span text:style-name="T2">présentation (présent)</text:span></text:p>
              </text:list-item>
              <text:list-item>
                <text:p text:style-name="P3"><text:span text:style-name="T2">rencontre (passé composé)</text:span></text:p>
              </text:list-item>
              <text:list-item>
                <text:p text:style-name="P3"><text:span text:style-name="T2">apport (imparfait / passé composé)</text:span></text:p>
              </text:list-item>
              <text:list-item>
                <text:p text:style-name="P3"><text:span text:style-name="T2">réflexion (présent)</text:span></text:p>
              </text:list-item>
              <text:list-item>
                <text:p text:style-name="P3"><text:span text:style-name="T2">projet (futur simple)</text:span></text:p>
              </text:list-item>
            </text:list>
            <text:p text:style-name="P3"><text:span text:style-name="T2">Bonus : présentation orale, 2 min, en continu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temps reliés ?</text:span></text:p>
              </text:list-item>
              <text:list-item>
                <text:p text:style-name="P6"><text:span text:style-name="T2">Quatre connecteurs ?</text:span></text:p>
              </text:list-item>
              <text:list-item>
                <text:p text:style-name="P6"><text:span text:style-name="T2">Structure en cinq étapes ?</text:span></text:p>
              </text:list-item>
              <text:list-item>
                <text:p text:style-name="P6"><text:span text:style-name="T2">Présentation orale sans li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portrait écrit 120–150 mots (28 P.)</text:span></text:p>
              </text:list-item>
              <text:list-item>
                <text:p text:style-name="P6"><text:span text:style-name="T2">Partie B — présentation orale 2 min (12 P.)</text:span></text:p>
              </text:list-item>
              <text:list-item>
                <text:p text:style-name="P6"><text:span text:style-name="T2">Total : 4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Ligue nationale d’improvisation », CC BY-SA 4.0</text:span></text:p>
              </text:list-item>
              <text:list-item>
                <text:p text:style-name="P6"><text:span text:style-name="T2">France Culture · France Inter (liens de référenc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10</meta:creation-date>
    <dc:date>2026-07-21T15:34:10</dc:date>
    <meta:document-statistic meta:object-count="185"/>
    <meta:generator>LibreOffice/24.2.7.2$Linux_X86_64 LibreOffice_project/420$Build-2</meta:generator>
  </office:meta>
</office:document-meta>
</file>