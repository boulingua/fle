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: portrait de clas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: portrait de clas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6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ésenter ma classe à l’oral (1 à 2 min)</text:span></text:p>
              </text:list-item>
              <text:list-item>
                <text:p text:style-name="P6"><text:span text:style-name="T2">Médier un texte allemand en français simple</text:span></text:p>
              </text:list-item>
              <text:list-item>
                <text:p text:style-name="P6"><text:span text:style-name="T2">Réutiliser le vocabulaire de l’année</text:span></text:p>
              </text:list-item>
              <text:list-item>
                <text:p text:style-name="P6"><text:span text:style-name="T2">Structurer avec </text:span><text:span text:style-name="T3">d’abord / ensuite / enfin</text:span></text:p>
              </text:list-item>
              <text:list-item>
                <text:p text:style-name="P6"><text:span text:style-name="T2">Faire le bilan de ma classe de 6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rnière séance. Mme Renault :</text:span></text:p>
            <text:p text:style-name="P3"><text:span text:style-name="T2">« Une classe de Lyon veut faire notre connaissance. À nous de leur envoyer notre portrait ! »</text:span></text:p>
            <text:list text:style-name="L3">
              <text:list-item>
                <text:p text:style-name="P3"><text:span text:style-name="T2">Qui écrit à la classe ?</text:span></text:p>
              </text:list-item>
              <text:list-item>
                <text:p text:style-name="P3"><text:span text:style-name="T2">Que raconter dans un portrait de classe ?</text:span></text:p>
              </text:list-item>
              <text:list-item>
                <text:p text:style-name="P3"><text:span text:style-name="T2">Qu’est-ce qui rend une classe uniqu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d’élèves dans votre classe ?</text:span></text:p>
              </text:list-item>
              <text:list-item>
                <text:p text:style-name="P6"><text:span text:style-name="T2">Combien de filles et de garçons ?</text:span></text:p>
              </text:list-item>
              <text:list-item>
                <text:p text:style-name="P6"><text:span text:style-name="T2">Qui fait du sport / de la musique / du théâtre ?</text:span></text:p>
              </text:list-item>
              <text:list-item>
                <text:p text:style-name="P6"><text:span text:style-name="T2">Quelle est votre matière préférée ?</text:span></text:p>
              </text:list-item>
            </text:list>
            <text:p text:style-name="P3"><text:span text:style-name="T2">Remue-méninges : tous les mots de l’année pour décrire une class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classe / eine Klasse</text:span></text:p>
              </text:list-item>
              <text:list-item>
                <text:p text:style-name="P6"><text:span text:style-name="T2">un·e élève / ein·e Schüler·in</text:span></text:p>
              </text:list-item>
              <text:list-item>
                <text:p text:style-name="P6"><text:span text:style-name="T2">la moitié / die Hälfte</text:span></text:p>
              </text:list-item>
              <text:list-item>
                <text:p text:style-name="P6"><text:span text:style-name="T2">la majorité / die Mehrheit</text:span></text:p>
              </text:list-item>
              <text:list-item>
                <text:p text:style-name="P6"><text:span text:style-name="T2">un point commun / eine Gemeinsamkeit</text:span></text:p>
              </text:list-item>
              <text:list-item>
                <text:p text:style-name="P6"><text:span text:style-name="T2">unique / einzigartig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structur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structur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ots-outils :</text:span></text:p>
            <text:list text:style-name="L3">
              <text:list-item>
                <text:p text:style-name="P3"><text:span text:style-name="T4">D’abord</text:span><text:span text:style-name="T2">, nous sommes 24 élèves.</text:span></text:p>
              </text:list-item>
              <text:list-item>
                <text:p text:style-name="P3"><text:span text:style-name="T4">Ensuite</text:span><text:span text:style-name="T2">, la majorité aime le sport.</text:span></text:p>
              </text:list-item>
              <text:list-item>
                <text:p text:style-name="P3"><text:span text:style-name="T4">Enfin</text:span><text:span text:style-name="T2">, notre classe est unique parce que…</text:span></text:p>
              </text:list-item>
            </text:list>
            <text:p text:style-name="P3"><text:span text:style-name="T2">Proportions : la moitié · un tiers · la majorité · quelques · presque tou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modèle — la 6e M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modèle — la 6e M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’abord, nous sommes 24 élèves : 12 filles, 12 garçons.</text:span></text:p>
            <text:p text:style-name="P3"><text:span text:style-name="T2">Ensuite, la moitié fait du sport ; quelques élèves jouent d’un instrument.</text:span></text:p>
            <text:p text:style-name="P3"><text:span text:style-name="T2">Enfin, notre classe est unique : chaque vendredi, nous chantons une chanson français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écrire à une autre clas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écrire à une autre clas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correspondance interscolaire a été lancée par Célestin Freinet dès 1926.</text:span></text:p>
            <text:p text:style-name="P3"><text:span text:style-name="T2">Le journal de classe servait à communiquer avec d’autres villages, puis à échanger de vraies lettres.</text:span></text:p>
            <text:p text:style-name="P3"><text:span text:style-name="T2">Fondée sur l’expression libre des enfants.</text:span></text:p>
            <text:p text:style-name="P3"><text:span text:style-name="T2">(Source :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 modèle</text:span></text:p>
              </text:list-item>
              <text:list-item>
                <text:p text:style-name="P6"><text:span text:style-name="T2">Ex. 2 : médiation (texte allemand → 4 phrases)</text:span></text:p>
              </text:list-item>
              <text:list-item>
                <text:p text:style-name="P6"><text:span text:style-name="T2">Ex. 3 : proportions (la moitié, la majorité…)</text:span></text:p>
              </text:list-item>
              <text:list-item>
                <text:p text:style-name="P6"><text:span text:style-name="T2">Ex. 4 : mots-outils (d’abord / ensuite / enfin)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ez votre classe à la 6e B de Lyon (1 à 2 min) :</text:span></text:p>
            <text:list text:style-name="L3">
              <text:list-item>
                <text:p text:style-name="P3"><text:span text:style-name="T2">nombre d’élèves (filles / garçons)</text:span></text:p>
              </text:list-item>
              <text:list-item>
                <text:p text:style-name="P3"><text:span text:style-name="T2">au moins deux professeur·e·s</text:span></text:p>
              </text:list-item>
              <text:list-item>
                <text:p text:style-name="P3"><text:span text:style-name="T2">trois activités ou goûts</text:span></text:p>
              </text:list-item>
              <text:list-item>
                <text:p text:style-name="P3"><text:span text:style-name="T2">une chose unique</text:span></text:p>
              </text:list-item>
            </text:list>
            <text:p text:style-name="P3"><text:span text:style-name="T2">Structure : d’abord / ensuite / enfi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 — Bilan 6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 — Bilan 6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présente ma classe (1-2 min)</text:span></text:p>
              </text:list-item>
              <text:list-item>
                <text:p text:style-name="P6"><text:span text:style-name="T2">Je médie un texte allemand</text:span></text:p>
              </text:list-item>
              <text:list-item>
                <text:p text:style-name="P6"><text:span text:style-name="T2">J’utilise d’abord / ensuite / enfin</text:span></text:p>
              </text:list-item>
              <text:list-item>
                <text:p text:style-name="P6"><text:span text:style-name="T2">Je donne des proportions</text:span></text:p>
              </text:list-item>
            </text:list>
            <text:p text:style-name="P3"><text:span text:style-name="T2">12 unités vues : de « saluer » à « portrait de classe » — base du A1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Médiation : 5 phrases françaises (15 pts)</text:span></text:p>
              </text:list-item>
              <text:list-item>
                <text:p text:style-name="P6"><text:span text:style-name="T2">Tâche 2 — Oral : présentation de la classe + 1 question (15 pts)</text:span></text:p>
              </text:list-item>
            </text:list>
            <text:p text:style-name="P3"><text:span text:style-name="T2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édagogie Freinet — Wikipédia, CC BY-SA</text:span></text:p>
              </text:list-item>
              <text:list-item>
                <text:p text:style-name="P6"><text:span text:style-name="T2">Journal scolaire — Wikipédia, CC BY-SA</text:span></text:p>
              </text:list-item>
              <text:list-item>
                <text:p text:style-name="P6"><text:span text:style-name="T2">Célestin Freinet — Wikipédia, CC BY-SA</text:span></text:p>
              </text:list-item>
              <text:list-item>
                <text:p text:style-name="P6"><text:span text:style-name="T2">Textes français : originaux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8:10</meta:creation-date>
    <dc:date>2026-07-21T15:08:10</dc:date>
    <meta:document-statistic meta:object-count="185"/>
    <meta:generator>LibreOffice/24.2.7.2$Linux_X86_64 LibreOffice_project/420$Build-2</meta:generator>
  </office:meta>
</office:document-meta>
</file>