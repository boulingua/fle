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2 — Bilan : mon portrai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2 — Bilan : mon portrai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6 · Niveau E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assembler le vocabulaire de l’année pour parler de moi</text:span></text:p>
              </text:list-item>
              <text:list-item>
                <text:p text:style-name="P6"><text:span text:style-name="T2">Présenter mon portrait à l’oral (~2 min), sans lire</text:span></text:p>
              </text:list-item>
              <text:list-item>
                <text:p text:style-name="P6"><text:span text:style-name="T2">Rédiger mon portrait (~120 mots) avec des connecteurs</text:span></text:p>
              </text:list-item>
              <text:list-item>
                <text:p text:style-name="P6"><text:span text:style-name="T2">Utiliser </text:span><text:span text:style-name="T3">être</text:span><text:span text:style-name="T2">, </text:span><text:span text:style-name="T3">avoir</text:span><text:span text:style-name="T2">, </text:span><text:span text:style-name="T3">aller</text:span><text:span text:style-name="T2"> et les verbes en </text:span><text:span text:style-name="T3">-er</text:span></text:p>
              </text:list-item>
              <text:list-item>
                <text:p text:style-name="P6"><text:span text:style-name="T2">Dresser le bilan de mes progrè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rnière semaine de juin — un échange avec Strasbourg.</text:span></text:p>
            <text:p text:style-name="P3"><text:span text:style-name="T2">Léo écrit : « Salut ! Je m’appelle Léo, j’ai 11 ans. Et toi, qui es-tu ? »</text:span></text:p>
            <text:p text:style-name="P3"><text:span text:style-name="T2">Mme Devos : « Présentez-vous comme à un·e ami·e francophone. Tout ce que vous avez appris cette année !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on unité préférée cette année ?</text:span></text:p>
              </text:list-item>
              <text:list-item>
                <text:p text:style-name="P6"><text:span text:style-name="T2">Le mot français qui t’a marqué·e ?</text:span></text:p>
              </text:list-item>
              <text:list-item>
                <text:p text:style-name="P6"><text:span text:style-name="T2">Trois choses que tu sais dire sur toi</text:span></text:p>
              </text:list-item>
              <text:list-item>
                <text:p text:style-name="P6"><text:span text:style-name="T2">Ce que tu veux améliorer en 7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Identité · Famille · École · Journée · Goûts · Météo/saison · Ma chambre · Voyages</text:span></text:p>
            <text:p text:style-name="P3"><text:span text:style-name="T2">Connecteurs : et, mais, parce que, alors, aussi, d’abord, enfi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présen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présen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être</text:span><text:span text:style-name="T2"> : suis, es, est, sommes, êtes, sont</text:span></text:p>
              </text:list-item>
              <text:list-item>
                <text:p text:style-name="P6"><text:span text:style-name="T4">avoir</text:span><text:span text:style-name="T2"> : ai, as, a, avons, avez, ont</text:span></text:p>
              </text:list-item>
              <text:list-item>
                <text:p text:style-name="P6"><text:span text:style-name="T4">aller</text:span><text:span text:style-name="T2"> : vais, vas, va, allons, allez, vont</text:span></text:p>
              </text:list-item>
              <text:list-item>
                <text:p text:style-name="P6"><text:span text:style-name="T4">-er</text:span><text:span text:style-name="T2"> : je parle, tu parles, il parle, nous parlons, vous parlez, ils parle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plan d’un portrait (9 étape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 plan d’un portrait (9 étape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6"><text:span text:style-name="T2">Identité — 2. Famille — 3. École — 4. Journée — 5. Goûts</text:span></text:p>
              </text:list-item>
              <text:list-item>
                <text:p text:style-name="P6"><text:span text:style-name="T2">Météo/saison — 7. Ma chambre — 8. Rêve de voyage — 9. Conclusion + ques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portrait d’Anouk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 portrait d’Anouk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alut ! Je m’appelle Anouk, j’ai 11 ans. Je suis allemande, j’habite à Karlsruhe.</text:span></text:p>
            <text:p text:style-name="P3"><text:span text:style-name="T2">Ma matière préférée est l’art, mais j’aime le français aussi. Le week-end, je vais au marché avec ma mère.</text:span></text:p>
            <text:p text:style-name="P3"><text:span text:style-name="T2">Je rêve d’aller à Strasbourg. Et toi, qui es-tu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Strasbourg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Strasbourg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athédrale gothique Notre-Dame de Strasbourg</text:span></text:p>
              </text:list-item>
              <text:list-item>
                <text:p text:style-name="P6"><text:span text:style-name="T2">Bâtie en grès rose des Vosges</text:span></text:p>
              </text:list-item>
              <text:list-item>
                <text:p text:style-name="P6"><text:span text:style-name="T2">Flèche d’environ 142 m — longtemps parmi les plus hautes du monde</text:span></text:p>
              </text:list-item>
              <text:list-item>
                <text:p text:style-name="P6"><text:span text:style-name="T2">Victor Hugo : « prodige du gigantesque et du délicat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6"><text:span text:style-name="T2">Compréhension (texte d’Anouk)</text:span></text:p>
              </text:list-item>
              <text:list-item>
                <text:p text:style-name="P6"><text:span text:style-name="T2">Conjugaison : </text:span><text:span text:style-name="T3">être, avoir, aller</text:span></text:p>
              </text:list-item>
              <text:list-item>
                <text:p text:style-name="P6"><text:span text:style-name="T2">Remets un portrait dans l’ordre</text:span></text:p>
              </text:list-item>
              <text:list-item>
                <text:p text:style-name="P6"><text:span text:style-name="T2">Écris ton plan en 9 étapes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résente ton portrait à un·e correspondant·e (~2 min, sans lire) : 9 éléments + une question finale.</text:span></text:p>
            <text:p text:style-name="P3"><text:span text:style-name="T2">Critères : contenu · durée · langue · connecteurs · interacti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Portrait en 9 éléments</text:span></text:p>
              </text:list-item>
              <text:list-item>
                <text:p text:style-name="P6"><text:span text:style-name="T2">☐ </text:span><text:span text:style-name="T2">~2 min sans lire</text:span></text:p>
              </text:list-item>
              <text:list-item>
                <text:p text:style-name="P6"><text:span text:style-name="T2">☐ </text:span><text:span text:style-name="T3">être, avoir, aller</text:span><text:span text:style-name="T2"> corrects</text:span></text:p>
              </text:list-item>
              <text:list-item>
                <text:p text:style-name="P6"><text:span text:style-name="T2">☐ </text:span><text:span text:style-name="T2">connecteurs employés</text:span></text:p>
              </text:list-item>
              <text:list-item>
                <text:p text:style-name="P6"><text:span text:style-name="T2">☐ </text:span><text:span text:style-name="T2">points forts et progrès identifié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(10 P.)</text:span></text:p>
              </text:list-item>
              <text:list-item>
                <text:p text:style-name="P6"><text:span text:style-name="T2">Tâche 2 — Oral monologique (10 P.)</text:span></text:p>
              </text:list-item>
              <text:list-item>
                <text:p text:style-name="P6"><text:span text:style-name="T2">Tâche 3 — Expression écrite ~120 mots (15 P.)</text:span></text:p>
              </text:list-item>
            </text:list>
            <text:p text:style-name="P3"><text:span text:style-name="T2">Total : 35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rci et bonnes vacances !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erci et bonnes vacances !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perçu classe 7 E → /track_e_kl07/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7:29</meta:creation-date>
    <dc:date>2026-07-21T15:47:29</dc:date>
    <meta:document-statistic meta:object-count="189"/>
    <meta:generator>LibreOffice/24.2.7.2$Linux_X86_64 LibreOffice_project/420$Build-2</meta:generator>
  </office:meta>
</office:document-meta>
</file>